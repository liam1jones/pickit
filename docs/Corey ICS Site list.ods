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86.09pt"/>
    </style:style>
    <style:style style:name="co3" style:family="table-column">
      <style:table-column-properties fo:break-before="auto" style:column-width="70.16pt"/>
    </style:style>
    <style:style style:name="co4" style:family="table-column">
      <style:table-column-properties fo:break-before="auto" style:column-width="95.84pt"/>
    </style:style>
    <style:style style:name="co5" style:family="table-column">
      <style:table-column-properties fo:break-before="auto" style:column-width="77.1pt"/>
    </style:style>
    <style:style style:name="co6" style:family="table-column">
      <style:table-column-properties fo:break-before="auto" style:column-width="120.16pt"/>
    </style:style>
    <style:style style:name="co7" style:family="table-column">
      <style:table-column-properties fo:break-before="auto" style:column-width="260.45pt"/>
    </style:style>
    <style:style style:name="co8" style:family="table-column">
      <style:table-column-properties fo:break-before="auto" style:column-width="115.31pt"/>
    </style:style>
    <style:style style:name="co9" style:family="table-column">
      <style:table-column-properties fo:break-before="auto" style:column-width="133.34pt"/>
    </style:style>
    <style:style style:name="co10" style:family="table-column">
      <style:table-column-properties fo:break-before="auto" style:column-width="115.99pt"/>
    </style:style>
    <style:style style:name="co11" style:family="table-column">
      <style:table-column-properties fo:break-before="auto" style:column-width="97.94pt"/>
    </style:style>
    <style:style style:name="co12" style:family="table-column">
      <style:table-column-properties fo:break-before="auto" style:column-width="124.36pt"/>
    </style:style>
    <style:style style:name="co13" style:family="table-column">
      <style:table-column-properties fo:break-before="auto" style:column-width="191.71pt"/>
    </style:style>
    <style:style style:name="co14" style:family="table-column">
      <style:table-column-properties fo:break-before="auto" style:column-width="245.85pt"/>
    </style:style>
    <style:style style:name="co15" style:family="table-column">
      <style:table-column-properties fo:break-before="auto" style:column-width="72.26pt"/>
    </style:style>
    <style:style style:name="co16" style:family="table-column">
      <style:table-column-properties fo:break-before="auto" style:column-width="72.96pt"/>
    </style:style>
    <style:style style:name="co17" style:family="table-column">
      <style:table-column-properties fo:break-before="auto" style:column-width="204.89pt"/>
    </style:style>
    <style:style style:name="co18" style:family="table-column">
      <style:table-column-properties fo:break-before="auto" style:column-width="106.95pt"/>
    </style:style>
    <style:style style:name="co19" style:family="table-column">
      <style:table-column-properties fo:break-before="auto" style:column-width="79.91pt"/>
    </style:style>
    <style:style style:name="co20" style:family="table-column">
      <style:table-column-properties fo:break-before="auto" style:column-width="86.85pt"/>
    </style:style>
    <style:style style:name="co21" style:family="table-column">
      <style:table-column-properties fo:break-before="auto" style:column-width="108.34pt"/>
    </style:style>
    <style:style style:name="co22" style:family="table-column">
      <style:table-column-properties fo:break-before="auto" style:column-width="121.55pt"/>
    </style:style>
    <style:style style:name="co23" style:family="table-column">
      <style:table-column-properties fo:break-before="auto" style:column-width="65.31pt"/>
    </style:style>
    <style:style style:name="co24" style:family="table-column">
      <style:table-column-properties fo:break-before="auto" style:column-width="166pt"/>
    </style:style>
    <style:style style:name="co25" style:family="table-column">
      <style:table-column-properties fo:break-before="auto" style:column-width="207.64pt"/>
    </style:style>
    <style:style style:name="co26" style:family="table-column">
      <style:table-column-properties fo:break-before="auto" style:column-width="101.4pt"/>
    </style:style>
    <style:style style:name="co27" style:family="table-column">
      <style:table-column-properties fo:break-before="auto" style:column-width="97.26pt"/>
    </style:style>
    <style:style style:name="co28" style:family="table-column">
      <style:table-column-properties fo:break-before="auto" style:column-width="82.66pt"/>
    </style:style>
    <style:style style:name="co29" style:family="table-column">
      <style:table-column-properties fo:break-before="auto" style:column-width="71.55pt"/>
    </style:style>
    <style:style style:name="co30" style:family="table-column">
      <style:table-column-properties fo:break-before="auto" style:column-width="411.85pt"/>
    </style:style>
    <style:style style:name="co31" style:family="table-column">
      <style:table-column-properties fo:break-before="auto" style:column-width="193.8pt"/>
    </style:style>
    <style:style style:name="co32" style:family="table-column">
      <style:table-column-properties fo:break-before="auto" style:column-width="81.24pt"/>
    </style:style>
    <style:style style:name="co33" style:family="table-column">
      <style:table-column-properties fo:break-before="auto" style:column-width="297.24pt"/>
    </style:style>
    <style:style style:name="co34" style:family="table-column">
      <style:table-column-properties fo:break-before="auto" style:column-width="520.84pt"/>
    </style:style>
    <style:style style:name="co35" style:family="table-column">
      <style:table-column-properties fo:break-before="auto" style:column-width="73.59pt"/>
    </style:style>
    <style:style style:name="co36" style:family="table-column">
      <style:table-column-properties fo:break-before="auto" style:column-width="104.14pt"/>
    </style:style>
    <style:style style:name="co37" style:family="table-column">
      <style:table-column-properties fo:break-before="auto" style:column-width="119.45pt"/>
    </style:style>
    <style:style style:name="co38" style:family="table-column">
      <style:table-column-properties fo:break-before="auto" style:column-width="123.59pt"/>
    </style:style>
    <style:style style:name="co39" style:family="table-column">
      <style:table-column-properties fo:break-before="auto" style:column-width="247.95pt"/>
    </style:style>
    <style:style style:name="co40" style:family="table-column">
      <style:table-column-properties fo:break-before="auto" style:column-width="77.81pt"/>
    </style:style>
    <style:style style:name="co41" style:family="table-column">
      <style:table-column-properties fo:break-before="auto" style:column-width="111.09pt"/>
    </style:style>
    <style:style style:name="co42" style:family="table-column">
      <style:table-column-properties fo:break-before="auto" style:column-width="154.2pt"/>
    </style:style>
    <style:style style:name="co43" style:family="table-column">
      <style:table-column-properties fo:break-before="auto" style:column-width="175.69pt"/>
    </style:style>
    <style:style style:name="co44" style:family="table-column">
      <style:table-column-properties fo:break-before="auto" style:column-width="104.91pt"/>
    </style:style>
    <style:style style:name="ro1" style:family="table-row">
      <style:table-row-properties style:row-height="15.76pt" fo:break-before="auto" style:use-optimal-row-height="true"/>
    </style:style>
    <style:style style:name="ro2" style:family="table-row">
      <style:table-row-properties style:row-height="90pt" fo:break-before="auto" style:use-optimal-row-height="false"/>
    </style:style>
    <style:style style:name="ro3" style:family="table-row">
      <style:table-row-properties style:row-height="7.51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69pt" fo:break-before="auto" style:use-optimal-row-height="false"/>
    </style:style>
    <style:style style:name="ro6" style:family="table-row">
      <style:table-row-properties style:row-height="18.74pt" fo:break-before="auto" style:use-optimal-row-height="false"/>
    </style:style>
    <style:style style:name="ro7" style:family="table-row">
      <style:table-row-properties style:row-height="14.26pt" fo:break-before="auto" style:use-optimal-row-height="false"/>
    </style:style>
    <style:style style:name="ro8" style:family="table-row">
      <style:table-row-properties style:row-height="20.24pt" fo:break-before="auto" style:use-optimal-row-height="false"/>
    </style:style>
    <style:style style:name="ro9" style:family="table-row">
      <style:table-row-properties style:row-height="22.51pt" fo:break-before="auto" style:use-optimal-row-height="false"/>
    </style:style>
    <style:style style:name="ta1" style:family="table" style:master-page-name="PageStyle_5f_Dashboard">
      <style:table-properties table:display="true" style:writing-mode="lr-tb" tableooo:tab-color="#93c47d"/>
    </style:style>
    <style:style style:name="ta2" style:family="table" style:master-page-name="PageStyle_5f_Logistics_20_Database">
      <style:table-properties table:display="true" style:writing-mode="lr-tb" tableooo:tab-color="#6d9eeb"/>
    </style:style>
    <style:style style:name="ta3" style:family="table" style:master-page-name="PageStyle_5f_DC_20_Operations_20_Database">
      <style:table-properties table:display="true" style:writing-mode="lr-tb" tableooo:tab-color="#6d9eeb"/>
    </style:style>
    <style:style style:name="ta4" style:family="table" style:master-page-name="PageStyle_5f_Extra_20_Data">
      <style:table-properties table:display="true" style:writing-mode="lr-tb"/>
    </style:style>
    <style:style style:name="ta5" style:family="table" style:master-page-name="PageStyle_5f_TPOP_20_Sites">
      <style:table-properties table:display="true" style:writing-mode="lr-tb"/>
    </style:style>
    <style:style style:name="ta6" style:family="table" style:master-page-name="PageStyle_5f_Site_20_Storage_20_Status">
      <style:table-properties table:display="false" style:writing-mode="lr-tb"/>
    </style:style>
    <style:style style:name="ta7" style:family="table" style:master-page-name="PageStyle_5f_Request_20_Changes">
      <style:table-properties table:display="false" style:writing-mode="lr-tb"/>
    </style:style>
    <style:style style:name="ce1" style:family="table-cell" style:parent-style-name="Default">
      <style:table-cell-properties fo:background-color="#cccccc"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a4c2f4"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wrap" fo:border-left="2.49pt solid #ffffff" style:direction="ltr" fo:border-right="2.49pt solid #ffffff" style:rotation-angle="0" style:rotation-align="none" style:shrink-to-fit="false" fo:border-top="2.49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6aa84f"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b6d7a8"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000000"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2.49pt solid #ffffff" style:diagonal-bl-tr="none" style:diagonal-tl-br="none" fo:border-left="none" fo:border-right="none" style:rotation-align="none" fo:border-top="2.49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9daf8"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2.49pt solid #ffffff" style:direction="ltr" fo:border-right="2.49pt solid #ffffff"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2.49pt solid #ffffff" style:diagonal-bl-tr="none" style:diagonal-tl-br="none" fo:border-left="none" fo:border-right="2.49pt solid #ffffff" style:rotation-align="none" fo:border-top="2.49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d9ead3"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2.49pt solid #ffffff" fo:background-color="#9fc5e8" style:diagonal-bl-tr="none" style:diagonal-tl-br="none" style:text-align-source="fix" style:repeat-content="false" fo:wrap-option="wrap" fo:border-left="none" style:direction="ltr" fo:border-right="2.49pt solid #ffffff" style:rotation-angle="0" style:rotation-align="none" style:shrink-to-fit="false" fo:border-top="2.49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2.49pt solid #ffffff" fo:background-color="#a4c2f4" style:diagonal-bl-tr="none" style:diagonal-tl-br="none" style:text-align-source="fix" style:repeat-content="false" fo:wrap-option="wrap" fo:border-left="none" style:direction="ltr" fo:border-right="2.49pt solid #ffffff" style:rotation-angle="0" style:rotation-align="none" style:shrink-to-fit="false" fo:border-top="2.49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2.49pt solid #ffffff" fo:background-color="#ffffff" style:diagonal-bl-tr="none" style:diagonal-tl-br="none" style:text-align-source="value-type" style:repeat-content="false" fo:wrap-option="wrap" fo:border-left="2.49pt solid #ffffff" style:direction="ltr" fo:border-right="none" style:rotation-angle="0" style:rotation-align="none" style:shrink-to-fit="false" fo:border-top="2.49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order-bottom="2.49pt solid #ffffff" style:diagonal-bl-tr="none" style:diagonal-tl-br="none" style:text-align-source="value-type" style:repeat-content="false" fo:wrap-option="wrap" fo:border-left="2.49pt solid #ffffff" style:direction="ltr" fo:border-right="none" style:rotation-angle="0" style:rotation-align="none" style:shrink-to-fit="false" fo:border-top="2.49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9daf8"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2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2.49pt solid #ffffff" style:diagonal-bl-tr="none" style:diagonal-tl-br="none" style:text-align-source="value-type" style:repeat-content="false" fo:wrap-option="wrap" fo:border-left="2.49pt solid #ffffff" style:direction="ltr" fo:border-right="2.49pt solid #ffffff"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e599"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2cc"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f2cc"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a4c2f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29" style:family="table-cell" style:parent-style-name="Default">
      <style:table-cell-properties fo:background-color="#f9cb9c"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fce5cd"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ce5cd"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2.49pt solid #ffffff"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2.49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2.49pt solid #ffffff" style:diagonal-bl-tr="none" style:diagonal-tl-br="none" style:text-align-source="value-type" style:repeat-content="false" fo:wrap-option="wrap" fo:border-left="none" style:direction="ltr" fo:border-right="2.49pt solid #ffffff" style:rotation-angle="0" style:rotation-align="none" style:shrink-to-fit="false" fo:border-top="2.49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ea9999"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ackground-color="#ffffff"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4cccc"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4cccc"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dd7e6b"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fo:background-color="#e6b8af"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b4a7d6"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ackground-color="#b4a7d6"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ackground-color="#d9d2e9" style:diagonal-bl-tr="none" style:diagonal-tl-br="none" style:text-align-source="value-type" style:repeat-content="false" fo:wrap-option="wrap" fo:border="2.49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5b3f8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4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5" style:family="table-cell" style:parent-style-name="Default">
      <style:table-cell-properties fo:background-color="#f6f8f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6" style:family="table-cell" style:parent-style-name="Default">
      <style:table-cell-properties fo:background-color="#f6f8f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6f8f9" style:diagonal-bl-tr="none" style:diagonal-tl-br="none" style:text-align-source="fix" style:repeat-content="false" fo:wrap-option="no-wrap" fo:border="0.74pt solid #ddddd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no-wrap" fo:border="0.74pt solid #ddddd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9" style:family="table-cell" style:parent-style-name="Default">
      <style:table-cell-properties fo:background-color="#f6f8f9" style:diagonal-bl-tr="none" style:diagonal-tl-br="none" style:text-align-source="fix" style:repeat-content="false" fo:wrap-option="no-wrap" fo:border="0.74pt solid #f8f9fa"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5b3f8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5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4" style:family="table-cell" style:parent-style-name="Default">
      <style:table-cell-properties fo:background-color="#f6f8f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5" style:family="table-cell" style:parent-style-name="Default">
      <style:table-cell-properties fo:background-color="#f6f8f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5b3f8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9" style:family="table-cell" style:parent-style-name="Default">
      <style:table-cell-properties fo:background-color="#f6f8f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diagonal-bl-tr="none" style:diagonal-tl-br="none" style:text-align-source="value-type" style:repeat-content="false" fo:wrap-option="no-wrap" fo:border="0.74pt solid #dddddd"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7" style:family="table-cell" style:parent-style-name="Default">
      <style:table-cell-properties fo:background-color="#6aa84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6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6f8f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ogistics Database'.$A$2:.$A25])" table:allow-empty-cell="true" table:display-list="unsorted" table:base-cell-address="Dashboard.B2">
          <table:error-message table:message-type="stop" table:display="true"/>
        </table:content-validation>
        <table:content-validation table:name="val2" table:condition="of:cell-content-is-in-list(&quot;Alissah Wiles&quot;;&quot;Amanda Desir&quot;;&quot;Angel Rosado&quot;;&quot;Anthony Neis&quot;;&quot;Ashlie Munro&quot;;&quot;Austin Lum&quot;;&quot;Ben Callahan&quot;;&quot;Brian McClure&quot;;&quot;Devin Felix&quot;;&quot;Ezequiel Ramos Vertiz&quot;;&quot;Francis Cabangcalan&quot;;&quot;Frank D'Arrigo&quot;;&quot;George Agbo&quot;;&quot;Grady Martin&quot;;&quot;Ismailyn Bonilla&quot;;&quot;Jared Varkonda&quot;;&quot;Jesse Brackenbury&quot;;&quot;Jesse Flores&quot;;&quot;Jonathan Clemente&quot;;&quot;Joseph Styers&quot;;&quot;Justin Fillmore&quot;;&quot;Kaelin Lipscomb&quot;;&quot;Kenneth Taylor&quot;;&quot;Lane Gibson&quot;;&quot;Nehemiah Johnson&quot;;&quot;Otis Tate&quot;;&quot;Pat McDermott&quot;;&quot;Reanna Moore&quot;;&quot;Robert White&quot;;&quot;Rafael Perez&quot;;&quot;Rodrigo Espino&quot;;&quot;Scott Hall&quot;;&quot;Scott Middleton&quot;;&quot;Shantanell Robinson&quot;;&quot;Tony Hendrix&quot;;&quot;Xavier Adams&quot;;&quot;Andrew Barnhart&quot;;&quot;Esteban Sotelo&quot;;&quot;Ben Pauling&quot;;&quot;Terry Simien&quot;;&quot;Arthur Tran&quot;;&quot;Brady Bonario&quot;;&quot;Jason Turek&quot;;&quot;Rhys Lopez-Lloyd&quot;;&quot;Anthony Navarrete&quot;;&quot;Jabbar Mendez&quot;;&quot;Tamara Beisti&quot;;&quot;Bryan Ennis&quot;;&quot;Michael Rayburn&quot;;&quot;John Sauer&quot;;&quot;Zain Nasir&quot;;&quot;Alyson McElroy&quot;;&quot;Jaylon Heller&quot;;&quot;Justin Czubas&quot;;&quot;My Bui&quot;;&quot;Randall Gomez&quot;;&quot;Raymond Fuller&quot;;&quot;Diego Monroy&quot;;&quot;Andres Cordova&quot;)" table:allow-empty-cell="true" table:display-list="unsorted" table:base-cell-address="'Logistics Database'.C2">
          <table:error-message table:message-type="stop" table:display="true"/>
        </table:content-validation>
        <table:content-validation table:name="val3" table:condition="of:cell-content-is-in-list(&quot;US-EAST&quot;;&quot;US-CENTRAL&quot;;&quot;US-WEST&quot;;&quot;CA-EAST&quot;;&quot;EU-WEST&quot;;&quot;EU-SOUTH&quot;;&quot;EU-NORTH&quot;)" table:allow-empty-cell="true" table:display-list="unsorted" table:base-cell-address="'Extra Data'.A2"/>
        <table:content-validation table:name="val4" table:condition="of:cell-content-is-in-list(&quot;Data Center&quot;;&quot;Warehouse&quot;;&quot;Inventory Storage&quot;)" table:allow-empty-cell="true" table:display-list="unsorted" table:base-cell-address="'Extra Data'.B2"/>
        <table:content-validation table:name="val5" table:condition="of:cell-content-is-in-list(&quot;Operational&quot;;&quot;Announced / Planned&quot;;&quot;Under construction&quot;)" table:allow-empty-cell="true" table:display-list="unsorted" table:base-cell-address="'Extra Data'.C2"/>
        <table:content-validation table:name="val6" table:condition="of:cell-content-is-in-list(&quot;USA&quot;;&quot;Canada&quot;;&quot;Germany&quot;;&quot;Spain&quot;)" table:allow-empty-cell="true" table:display-list="unsorted" table:base-cell-address="'TPOP Sites'.C2"/>
        <table:content-validation table:name="val7" table:condition="of:cell-content-is-in-list(&quot;Jesus Robles&quot;;&quot;Juan Martinez&quot;;&quot;Liam Jones&quot;;&quot;Matt Whittle&quot;;&quot;Rhys Lopez-Lloyd&quot;)" table:allow-empty-cell="true" table:display-list="unsorted" table:base-cell-address="'Site Storage Status'.B2">
          <table:error-message table:message-type="stop" table:display="true"/>
        </table:content-validation>
        <table:content-validation table:name="val8" table:condition="of:cell-content-is-in-list(&quot;Alissah Wiles&quot;;&quot;Amanda Desir&quot;;&quot;Angel Rosado&quot;;&quot;Anthony Neis&quot;;&quot;Ashlie Munro&quot;;&quot;Austin Lum&quot;;&quot;Ben Callahan&quot;;&quot;Brian McClure&quot;;&quot;Devin Felix&quot;;&quot;Ezequiel Ramos Vertiz&quot;;&quot;Francis Cabangcalan&quot;;&quot;Frank D'Arrigo&quot;;&quot;George Agbo&quot;;&quot;Grady Martin&quot;;&quot;Ismailyn Bonilla&quot;;&quot;Jared Varkonda&quot;;&quot;Jesse Brackenbury&quot;;&quot;Jesse Flores&quot;;&quot;Jonathan Clemente&quot;;&quot;Joseph Styers&quot;;&quot;Justin Fillmore&quot;;&quot;Kaelin Lipscomb&quot;;&quot;Kenneth Taylor&quot;;&quot;Lane Gibson&quot;;&quot;Nehemiah Johnson&quot;;&quot;Otis Tate&quot;;&quot;Pat McDermott&quot;;&quot;Reanna Moore&quot;;&quot;Robert White&quot;;&quot;Rafael Perez&quot;;&quot;Rodrigo Espino&quot;;&quot;Scott Hall&quot;;&quot;Scott Middleton&quot;;&quot;Shantanell Robinson&quot;;&quot;Tony Hendrix&quot;;&quot;Xavier Adams&quot;;&quot;Andrew Barnhart&quot;;&quot;Esteban Sotelo&quot;;&quot;Ben Pauling&quot;;&quot;Terry Simien&quot;;&quot;Arthur Tran&quot;;&quot;Brady Bonario&quot;;&quot;Jason Turek&quot;;&quot;Rhys Lopez-Lloyd&quot;;&quot;Anthony Navarrete&quot;;&quot;Jabbar Mendez&quot;;&quot;Tamara Beisti&quot;;&quot;Bryan Ennis&quot;;&quot;Michael Rayburn&quot;;&quot;John Sauer&quot;;&quot;Zain Nasir&quot;;&quot;Alyson McElroy&quot;;&quot;Jaylon Heller&quot;;&quot;Justin Czubas&quot;;&quot;My Bui&quot;;&quot;Randall Gomez&quot;;&quot;Raymond Fuller&quot;)" table:allow-empty-cell="true" table:display-list="unsorted" table:base-cell-address="'Site Storage Status'.C2">
          <table:error-message table:message-type="stop" table:display="true"/>
        </table:content-validation>
        <table:content-validation table:name="val9" table:condition="of:cell-content-is-in-list(&quot;Lots of excess space&quot;;&quot;Moderately full&quot;;&quot;Overflowing&quot;)" table:allow-empty-cell="true" table:display-list="unsorted" table:base-cell-address="'Site Storage Status'.D2">
          <table:error-message table:message-type="stop" table:display="true"/>
        </table:content-validation>
        <table:content-validation table:name="val10" table:condition="of:cell-content-is-in-list(&quot;Q1&quot;;&quot;Q2&quot;;&quot;Q3&quot;;&quot;Q4&quot;;&quot;2024&quot;;&quot;2025&quot;)" table:allow-empty-cell="true" table:display-list="unsorted" table:base-cell-address="'Site Storage Status'.E2">
          <table:error-message table:message-type="stop" table:display="true"/>
        </table:content-validation>
        <table:content-validation table:name="val11" table:condition="of:cell-content-is-in-list(&quot;Yes&quot;;&quot;No&quot;)" table:allow-empty-cell="true" table:display-list="unsorted" table:base-cell-address="'Site Storage Status'.F2">
          <table:error-message table:message-type="stop" table:display="true"/>
        </table:content-validation>
        <table:content-validation table:name="val12" table:condition="of:cell-content-is-in-list(&quot;Excess is labeled&quot;;&quot;Segregated by CCAC&quot;;&quot;Palletized&quot;)" table:allow-empty-cell="true" table:display-list="unsorted" table:base-cell-address="'Site Storage Status'.G2">
          <table:error-message table:message-type="stop" table:display="true"/>
        </table:content-validation>
      </table:content-validations>
      <table:table table:name="Dashboard" table:style-name="ta1">
        <office:forms form:automatic-focus="false" form:apply-design-mode="false"/>
        <table:table-column table:style-name="co1" table:default-cell-style-name="Default"/>
        <table:table-column table:style-name="co2" table:default-cell-style-name="Default"/>
        <table:table-column table:style-name="co1" table:number-columns-repeated="12" table:default-cell-style-name="Default"/>
        <table:table-column table:style-name="co3" table:number-columns-repeated="1010" table:default-cell-style-name="Default"/>
        <table:table-row table:style-name="ro1">
          <table:table-cell table:style-name="ce1" office:value-type="string" calcext:value-type="string" table:number-columns-spanned="3" table:number-rows-spanned="1">
            <text:p>Search</text:p>
          </table:table-cell>
          <table:covered-table-cell table:style-name="ce7"/>
          <table:covered-table-cell table:style-name="ce10"/>
          <table:table-cell table:style-name="ce16"/>
          <table:table-cell table:style-name="ce20" office:value-type="string" calcext:value-type="string" table:number-columns-spanned="2" table:number-rows-spanned="2">
            <text:p><text:a xlink:href="https://docs.google.com/forms/d/e/1FAIpQLSf6YouM0p365mJjiuTaEWJKYcAFxeWaOpPZ59bEgo9zpelSRg/viewform?usp=publish-editor" xlink:type="simple">➡️ Request Change ⬅️</text:a></text:p>
          </table:table-cell>
          <table:covered-table-cell table:style-name="ce24"/>
          <table:table-cell table:style-name="ce28" office:value-type="string" calcext:value-type="string" table:number-columns-spanned="2" table:number-rows-spanned="2">
            <text:p><text:a xlink:href="https://docs.google.com/forms/d/1LL-xw_rzeEUXlULAKfGxJP6FpttS9RjYw3sFXQbO0m8/edit" xlink:type="simple">➡️ Add Location ⬅️</text:a></text:p>
          </table:table-cell>
          <table:covered-table-cell table:style-name="ce24"/>
          <table:table-cell table:style-name="ce32"/>
          <table:table-cell table:style-name="ce35" table:number-columns-repeated="5"/>
          <table:table-cell table:number-columns-repeated="1010"/>
        </table:table-row>
        <table:table-row table:style-name="ro1">
          <table:table-cell table:style-name="ce2" office:value-type="string" calcext:value-type="string">
            <text:p>Location</text:p>
          </table:table-cell>
          <table:table-cell table:style-name="ce8" table:content-validation-name="val1" office:value-type="string" calcext:value-type="string" table:number-columns-spanned="2" table:number-rows-spanned="1">
            <text:p>ES-BCN01</text:p>
          </table:table-cell>
          <table:covered-table-cell table:style-name="ce10"/>
          <table:table-cell table:style-name="ce17"/>
          <table:covered-table-cell table:style-name="ce21"/>
          <table:covered-table-cell table:style-name="ce25"/>
          <table:covered-table-cell table:style-name="ce21"/>
          <table:covered-table-cell table:style-name="ce25"/>
          <table:table-cell table:style-name="ce33"/>
          <table:table-cell table:style-name="ce13" table:number-columns-repeated="5"/>
          <table:table-cell table:number-columns-repeated="1010"/>
        </table:table-row>
        <table:table-row table:style-name="ro1">
          <table:table-cell table:style-name="ce3"/>
          <table:table-cell table:style-name="ce9"/>
          <table:table-cell table:style-name="ce13" table:number-columns-repeated="2"/>
          <table:table-cell table:style-name="ce22" table:number-columns-repeated="4"/>
          <table:table-cell table:style-name="ce13" table:number-columns-repeated="6"/>
          <table:table-cell table:number-columns-repeated="1010"/>
        </table:table-row>
        <table:table-row table:style-name="ro1">
          <table:table-cell table:style-name="ce4" office:value-type="string" calcext:value-type="string" table:number-columns-spanned="14" table:number-rows-spanned="1">
            <text:p>Logistics Information</text:p>
          </table:table-cell>
          <table:covered-table-cell table:number-columns-repeated="12" table:style-name="ce7"/>
          <table:covered-table-cell table:style-name="ce10"/>
          <table:table-cell table:number-columns-repeated="1010"/>
        </table:table-row>
        <table:table-row-group>
          <table:table-row table:style-name="ro1">
            <table:table-cell table:style-name="ce5" office:value-type="string" calcext:value-type="string" table:number-columns-spanned="2" table:number-rows-spanned="1">
              <text:p>General Information</text:p>
            </table:table-cell>
            <table:covered-table-cell table:style-name="ce10"/>
            <table:table-cell table:style-name="ce14" office:value-type="string" calcext:value-type="string" table:number-columns-spanned="2" table:number-rows-spanned="1">
              <text:p>Loading Dock &amp; Access</text:p>
            </table:table-cell>
            <table:covered-table-cell table:style-name="ce10"/>
            <table:table-cell table:style-name="ce23" office:value-type="string" calcext:value-type="string" table:number-columns-spanned="2" table:number-rows-spanned="1">
              <text:p>Receiving Procedures &amp; Schedule</text:p>
            </table:table-cell>
            <table:covered-table-cell table:style-name="ce10"/>
            <table:table-cell table:style-name="ce29" office:value-type="string" calcext:value-type="string" table:number-columns-spanned="2" table:number-rows-spanned="1">
              <text:p>Security &amp; Personnel</text:p>
            </table:table-cell>
            <table:covered-table-cell table:style-name="ce10"/>
            <table:table-cell table:style-name="ce34" office:value-type="string" calcext:value-type="string" table:number-columns-spanned="2" table:number-rows-spanned="1">
              <text:p>Material Handling &amp; Delivery Path</text:p>
            </table:table-cell>
            <table:covered-table-cell table:style-name="ce10"/>
            <table:table-cell table:style-name="ce38" office:value-type="string" calcext:value-type="string" table:number-columns-spanned="2" table:number-rows-spanned="1">
              <text:p>Documentation, Waste, and Storage</text:p>
            </table:table-cell>
            <table:covered-table-cell table:style-name="ce10"/>
            <table:table-cell table:style-name="ce40" office:value-type="string" calcext:value-type="string" table:number-columns-spanned="2" table:number-rows-spanned="1">
              <text:p>Project Integration &amp; Finalization</text:p>
            </table:table-cell>
            <table:covered-table-cell table:style-name="ce10"/>
            <table:table-cell table:number-columns-repeated="1010"/>
          </table:table-row>
          <table:table-row table:style-name="ro2">
            <table:table-cell table:style-name="ce5" office:value-type="string" calcext:value-type="string">
              <text:p>ICS</text:p>
            </table:table-cell>
            <table:table-cell table:style-name="ce11" table:number-matrix-columns-spanned="1" table:number-matrix-rows-spanned="1" table:formula="of:=IFERROR(INDEX([$'Logistics Database'.C$1:.C$1048576];MATCH(#REF!;[$'Logistics Database'.C$1:.C$1048576];0));INDEX([$'Logistics Database'.C$1:.C$1048576];MATCH([.B2];[$'Logistics Database'.A$1:.A$1048576];0)))" office:value-type="string" office:string-value="Ezequiel Ramos Vertiz" calcext:value-type="string">
              <text:p>Ezequiel Ramos Vertiz</text:p>
            </table:table-cell>
            <table:table-cell table:style-name="ce15" office:value-type="string" calcext:value-type="string">
              <text:p>Is a loading dock available?</text:p>
            </table:table-cell>
            <table:table-cell table:style-name="ce18" table:number-matrix-columns-spanned="1" table:number-matrix-rows-spanned="1" table:formula="of:=IFERROR(INDEX([$'Logistics Database'.E$1:.E$1048576];MATCH(#REF!;[$'Logistics Database'.C$1:.C$1048576];0));INDEX([$'Logistics Database'.E$1:.E$1048576];MATCH([.B2];[$'Logistics Database'.A$1:.A$1048576];0)))" office:value-type="string" office:string-value="Yes" calcext:value-type="string">
              <text:p>Yes</text:p>
            </table:table-cell>
            <table:table-cell table:style-name="ce23" office:value-type="string" calcext:value-type="string">
              <text:p>Are delivery appointments required?</text:p>
            </table:table-cell>
            <table:table-cell table:style-name="ce26" table:number-matrix-columns-spanned="1" table:number-matrix-rows-spanned="1" table:formula="of:=IFERROR(INDEX([$'Logistics Database'.K$1:.K$1048576];MATCH(#REF!;[$'Logistics Database'.C$1:.C$1048576];0));INDEX([$'Logistics Database'.K$1:.K$1048576];MATCH([.B2];[$'Logistics Database'.A$1:.A$1048576];0)))" office:value-type="string" office:string-value="Yes" calcext:value-type="string">
              <text:p>Yes</text:p>
            </table:table-cell>
            <table:table-cell table:style-name="ce29" office:value-type="string" calcext:value-type="string">
              <text:p>Are security clearances / badges required for entry?</text:p>
            </table:table-cell>
            <table:table-cell table:style-name="ce30" table:number-matrix-columns-spanned="1" table:number-matrix-rows-spanned="1" table:formula="of:=IFERROR(INDEX([$'Logistics Database'.L$1:.L$1048576];MATCH(#REF!;[$'Logistics Database'.C$1:.C$1048576];0));INDEX([$'Logistics Database'.L$1:.L$1048576];MATCH([.B2];[$'Logistics Database'.A$1:.A$1048576];0)))" office:value-type="string" office:string-value="Yes" calcext:value-type="string">
              <text:p>Yes</text:p>
            </table:table-cell>
            <table:table-cell table:style-name="ce34" office:value-type="string" calcext:value-type="string">
              <text:p>Is forklift access available at the site?</text:p>
            </table:table-cell>
            <table:table-cell table:style-name="ce36" table:number-matrix-columns-spanned="1" table:number-matrix-rows-spanned="1" table:formula="of:=IFERROR(INDEX([$'Logistics Database'.R$1:.R$1048576];MATCH(#REF!;[$'Logistics Database'.C$1:.C$1048576];0));INDEX([$'Logistics Database'.R$1:.R$1048576];MATCH([.B2];[$'Logistics Database'.A$1:.A$1048576];0)))" office:value-type="string" office:string-value="No" calcext:value-type="string">
              <text:p>No</text:p>
            </table:table-cell>
            <table:table-cell table:style-name="ce38" office:value-type="string" calcext:value-type="string">
              <text:p>Is onsite storage available for early / late shipments?</text:p>
            </table:table-cell>
            <table:table-cell table:style-name="ce39" table:number-matrix-columns-spanned="1" table:number-matrix-rows-spanned="1" table:formula="of:=IFERROR(INDEX([$'Logistics Database'.W$1:.W$1048576];MATCH(#REF!;[$'Logistics Database'.C$1:.C$1048576];0));INDEX([$'Logistics Database'.W$1:.W$1048576];MATCH([.B2];[$'Logistics Database'.A$1:.A$1048576];0)))" office:value-type="string" office:string-value="No" calcext:value-type="string">
              <text:p>No</text:p>
            </table:table-cell>
            <table:table-cell table:style-name="ce40" office:value-type="string" calcext:value-type="string">
              <text:p>Is delivery integrated with an IT project team on-site?</text:p>
            </table:table-cell>
            <table:table-cell table:style-name="ce42" table:number-matrix-columns-spanned="1" table:number-matrix-rows-spanned="1" table:formula="of:=IFERROR(INDEX([$'Logistics Database'.X$1:.X$1048576];MATCH(#REF!;[$'Logistics Database'.C$1:.C$1048576];0));INDEX([$'Logistics Database'.X$1:.X$1048576];MATCH([.B2];[$'Logistics Database'.A$1:.A$1048576];0)))" office:value-type="string" office:string-value="No" calcext:value-type="string">
              <text:p>No</text:p>
            </table:table-cell>
            <table:table-cell table:number-columns-repeated="1010"/>
          </table:table-row>
          <table:table-row table:style-name="ro2">
            <table:table-cell table:style-name="ce5" office:value-type="string" calcext:value-type="string">
              <text:p>ICS Phone #</text:p>
            </table:table-cell>
            <table:table-cell table:style-name="ce11" table:number-matrix-columns-spanned="1" table:number-matrix-rows-spanned="1" table:formula="of:=IFERROR(INDEX([$'Logistics Database'.Z$1:.Z$1048576];MATCH(#REF!;[$'Logistics Database'.C$1:.C$1048576];0));INDEX([$'Logistics Database'.Z$1:.Z$1048576];MATCH([.B2];[$'Logistics Database'.A$1:.A$1048576];0)))" office:value-type="string" office:string-value="+34 611846343" calcext:value-type="string">
              <text:p>+34 611846343</text:p>
            </table:table-cell>
            <table:table-cell table:style-name="ce2" office:value-type="string" calcext:value-type="string">
              <text:p><text:s/>⬆️ Is the dock level standard height or ground level?</text:p>
            </table:table-cell>
            <table:table-cell table:style-name="ce18" table:number-matrix-columns-spanned="1" table:number-matrix-rows-spanned="1" table:formula="of:=IFERROR(INDEX([$'Logistics Database'.F$1:.F$1048576];MATCH(#REF!;[$'Logistics Database'.C$1:.C$1048576];0));INDEX([$'Logistics Database'.F$1:.F$1048576];MATCH([.B2];[$'Logistics Database'.A$1:.A$1048576];0)))" office:value-type="string" office:string-value="Standard Height" calcext:value-type="string">
              <text:p>Standard Height</text:p>
            </table:table-cell>
            <table:table-cell table:style-name="ce23" office:value-type="string" calcext:value-type="string">
              <text:p>⬆️ What is the required lead time?</text:p>
            </table:table-cell>
            <table:table-cell table:style-name="ce26" table:number-matrix-columns-spanned="1" table:number-matrix-rows-spanned="1" table:formula="of:=IFERROR(INDEX([$'Logistics Database'.AB$1:.AB$1048576];MATCH(#REF!;[$'Logistics Database'.C$1:.C$1048576];0));INDEX([$'Logistics Database'.AB$1:.AB$1048576];MATCH([.B2];[$'Logistics Database'.A$1:.A$1048576];0)))" office:value-type="string" office:string-value="24hr" calcext:value-type="string">
              <text:p>24hr</text:p>
            </table:table-cell>
            <table:table-cell table:style-name="ce29" office:value-type="string" calcext:value-type="string">
              <text:p>⬆️ Explain process.</text:p>
            </table:table-cell>
            <table:table-cell table:style-name="ce30" table:number-matrix-columns-spanned="1" table:number-matrix-rows-spanned="1" table:formula="of:=IFERROR(INDEX([$'Logistics Database'.M$1:.M$1048576];MATCH(#REF!;[$'Logistics Database'.C$1:.C$1048576];0));INDEX([$'Logistics Database'.M$1:.M$1048576];MATCH([.B2];[$'Logistics Database'.A$1:.A$1048576];0)))" office:value-type="string" office:string-value="Access requests must be submitted through the site’s portal. The required information includes ID number, entry and exit times, and the specific areas for which access is needed." calcext:value-type="string">
              <text:p>Access requests must be submitted through the site’s portal. The required information includes ID number, entry and exit times, and the specific areas for which access is needed.</text:p>
            </table:table-cell>
            <table:table-cell table:style-name="ce34" office:value-type="string" calcext:value-type="string">
              <text:p>Is a pallet jack available at the site?</text:p>
            </table:table-cell>
            <table:table-cell table:style-name="ce36" table:number-matrix-columns-spanned="1" table:number-matrix-rows-spanned="1" table:formula="of:=IFERROR(INDEX([$'Logistics Database'.S$1:.S$1048576];MATCH(#REF!;[$'Logistics Database'.C$1:.C$1048576];0));INDEX([$'Logistics Database'.S$1:.S$1048576];MATCH([.B2];[$'Logistics Database'.A$1:.A$1048576];0)))" office:value-type="string" office:string-value="Yes" calcext:value-type="string">
              <text:p>Yes</text:p>
            </table:table-cell>
            <table:table-cell table:style-name="ce38" office:value-type="string" calcext:value-type="string">
              <text:p>⬆️ Specify duration / conditions.</text:p>
            </table:table-cell>
            <table:table-cell table:style-name="ce39" table:number-matrix-columns-spanned="1" table:number-matrix-rows-spanned="1" table:formula="of:=IFERROR(INDEX([$'Logistics Database'.AQ$1:.AQ$1048576];MATCH(#REF!;[$'Logistics Database'.C$1:.C$1048576];0));INDEX([$'Logistics Database'.AQ$1:.AQ$1048576];MATCH([.B2];[$'Logistics Database'.A$1:.A$1048576];0)))" office:value-type="float" office:value="0" calcext:value-type="float">
              <text:p>0</text:p>
            </table:table-cell>
            <table:table-cell table:style-name="ce40" office:value-type="string" calcext:value-type="string">
              <text:p>⬆️ Provide the lead contact.</text:p>
            </table:table-cell>
            <table:table-cell table:style-name="ce42" table:number-matrix-columns-spanned="1" table:number-matrix-rows-spanned="1" table:formula="of:=IFERROR(INDEX([$'Logistics Database'.AY$1:.AY$1048576];MATCH(#REF!;[$'Logistics Database'.C$1:.C$1048576];0));INDEX([$'Logistics Database'.AY$1:.AY$1048576];MATCH([.B2];[$'Logistics Database'.A$1:.A$1048576];0)))" office:value-type="float" office:value="0" calcext:value-type="float">
              <text:p>0</text:p>
            </table:table-cell>
            <table:table-cell table:number-columns-repeated="1010"/>
          </table:table-row>
          <table:table-row table:style-name="ro2">
            <table:table-cell table:style-name="ce5" office:value-type="string" calcext:value-type="string">
              <text:p>Site LOCODE</text:p>
            </table:table-cell>
            <table:table-cell table:style-name="ce11" table:number-matrix-columns-spanned="1" table:number-matrix-rows-spanned="1" table:formula="of:=IFERROR(INDEX([$'Logistics Database'.A$1:.A$1048576];MATCH(#REF!;[$'Logistics Database'.C$1:.C$1048576];0));INDEX([$'Logistics Database'.A$1:.A$1048576];MATCH([.B2];[$'Logistics Database'.A$1:.A$1048576];0)))" office:value-type="string" office:string-value="ES-BCN01" calcext:value-type="string">
              <text:p>ES-BCN01</text:p>
            </table:table-cell>
            <table:table-cell table:style-name="ce15" office:value-type="string" calcext:value-type="string">
              <text:p>⬆️ Are dock doors wide enough for large pallets (e.g., 48” x 48”)?</text:p>
            </table:table-cell>
            <table:table-cell table:style-name="ce18" table:number-matrix-columns-spanned="1" table:number-matrix-rows-spanned="1" table:formula="of:=IFERROR(INDEX([$'Logistics Database'.G$1:.G$1048576];MATCH(#REF!;[$'Logistics Database'.C$1:.C$1048576];0));INDEX([$'Logistics Database'.G$1:.G$1048576];MATCH([.B2];[$'Logistics Database'.A$1:.A$1048576];0)))" office:value-type="string" office:string-value="Yes" calcext:value-type="string">
              <text:p>Yes</text:p>
            </table:table-cell>
            <table:table-cell table:style-name="ce23" office:value-type="string" calcext:value-type="string">
              <text:p>Are there specific delivery time windows or blackout periods?</text:p>
            </table:table-cell>
            <table:table-cell table:style-name="ce26" table:number-matrix-columns-spanned="1" table:number-matrix-rows-spanned="1" table:formula="of:=IFERROR(INDEX([$'Logistics Database'.AC$1:.AC$1048576];MATCH(#REF!;[$'Logistics Database'.C$1:.C$1048576];0));INDEX([$'Logistics Database'.AC$1:.AC$1048576];MATCH([.B2];[$'Logistics Database'.A$1:.A$1048576];0)))" office:value-type="string" office:string-value="Yes" calcext:value-type="string">
              <text:p>Yes</text:p>
            </table:table-cell>
            <table:table-cell table:style-name="ce29" office:value-type="string" calcext:value-type="string">
              <text:p>Will a security escort be needed for the delivery crew?</text:p>
            </table:table-cell>
            <table:table-cell table:style-name="ce30" table:number-matrix-columns-spanned="1" table:number-matrix-rows-spanned="1" table:formula="of:=IFERROR(INDEX([$'Logistics Database'.N$1:.N$1048576];MATCH(#REF!;[$'Logistics Database'.C$1:.C$1048576];0));INDEX([$'Logistics Database'.N$1:.N$1048576];MATCH([.B2];[$'Logistics Database'.A$1:.A$1048576];0)))" office:value-type="string" office:string-value="No" calcext:value-type="string">
              <text:p>No</text:p>
            </table:table-cell>
            <table:table-cell table:style-name="ce34" office:value-type="string" calcext:value-type="string">
              <text:p>Is a freight elevator available for basement / upper floor deliveries?</text:p>
            </table:table-cell>
            <table:table-cell table:style-name="ce36" table:number-matrix-columns-spanned="1" table:number-matrix-rows-spanned="1" table:formula="of:=IFERROR(INDEX([$'Logistics Database'.T$1:.T$1048576];MATCH(#REF!;[$'Logistics Database'.C$1:.C$1048576];0));INDEX([$'Logistics Database'.T$1:.T$1048576];MATCH([.B2];[$'Logistics Database'.A$1:.A$1048576];0)))" office:value-type="string" office:string-value="Yes" calcext:value-type="string">
              <text:p>Yes</text:p>
            </table:table-cell>
            <table:table-cell table:style-name="ce38" office:value-type="string" calcext:value-type="string">
              <text:p>Is disposal service for packaging waste provided onsite?</text:p>
            </table:table-cell>
            <table:table-cell table:style-name="ce39" table:number-matrix-columns-spanned="1" table:number-matrix-rows-spanned="1" table:formula="of:=IFERROR(INDEX([$'Logistics Database'.AR$1:.AR$1048576];MATCH(#REF!;[$'Logistics Database'.C$1:.C$1048576];0));INDEX([$'Logistics Database'.AR$1:.AR$1048576];MATCH([.B2];[$'Logistics Database'.A$1:.A$1048576];0)))" office:value-type="string" office:string-value="Yes" calcext:value-type="string">
              <text:p>Yes</text:p>
            </table:table-cell>
            <table:table-cell table:style-name="ce40" office:value-type="string" calcext:value-type="string">
              <text:p>Is an onsite inspection / sign-off required before the delivery crew's departure?</text:p>
            </table:table-cell>
            <table:table-cell table:style-name="ce42" table:number-matrix-columns-spanned="1" table:number-matrix-rows-spanned="1" table:formula="of:=IFERROR(INDEX([$'Logistics Database'.Y$1:.Y$1048576];MATCH(#REF!;[$'Logistics Database'.C$1:.C$1048576];0));INDEX([$'Logistics Database'.Y$1:.Y$1048576];MATCH([.B2];[$'Logistics Database'.A$1:.A$1048576];0)))" office:value-type="string" office:string-value="No" calcext:value-type="string">
              <text:p>No</text:p>
            </table:table-cell>
            <table:table-cell table:number-columns-repeated="1010"/>
          </table:table-row>
          <table:table-row table:style-name="ro2">
            <table:table-cell table:style-name="ce5" office:value-type="string" calcext:value-type="string">
              <text:p><text:s/>Site Address</text:p>
            </table:table-cell>
            <table:table-cell table:style-name="ce11" table:number-matrix-columns-spanned="1" table:number-matrix-rows-spanned="1" table:formula="of:=IFERROR(INDEX([$'Logistics Database'.D$1:.D$1048576];MATCH(#REF!;[$'Logistics Database'.C$1:.C$1048576];0));INDEX([$'Logistics Database'.D$1:.D$1048576];MATCH([.B2];[$'Logistics Database'.A$1:.A$1048576];0)))" office:value-type="string" office:string-value="Carretera de la Santa Creu de Calafell, 99 08830 Sant Boi de Llobregat, España" calcext:value-type="string">
              <text:p>Carretera de la Santa Creu de Calafell, 99 08830 Sant Boi de Llobregat, España</text:p>
            </table:table-cell>
            <table:table-cell table:style-name="ce2" office:value-type="string" calcext:value-type="string">
              <text:p>Are there any vehicle height restrictions at the dock / entrance?</text:p>
            </table:table-cell>
            <table:table-cell table:style-name="ce18" table:number-matrix-columns-spanned="1" table:number-matrix-rows-spanned="1" table:formula="of:=IFERROR(INDEX([$'Logistics Database'.I$1:.I$1048576];MATCH(#REF!;[$'Logistics Database'.C$1:.C$1048576];0));INDEX([$'Logistics Database'.I$1:.I$1048576];MATCH([.B2];[$'Logistics Database'.A$1:.A$1048576];0)))" office:value-type="string" office:string-value="No" calcext:value-type="string">
              <text:p>No</text:p>
            </table:table-cell>
            <table:table-cell table:style-name="ce23" office:value-type="string" calcext:value-type="string">
              <text:p>⬆️ Specify times / dates.</text:p>
            </table:table-cell>
            <table:table-cell table:style-name="ce26" table:number-matrix-columns-spanned="1" table:number-matrix-rows-spanned="1" table:formula="of:=IFERROR(INDEX([$'Logistics Database'.AD$1:.AD$1048576];MATCH(#REF!;[$'Logistics Database'.C$1:.C$1048576];0));INDEX([$'Logistics Database'.AD$1:.AD$1048576];MATCH([.B2];[$'Logistics Database'.A$1:.A$1048576];0)))" office:value-type="string" office:string-value="Delivery reception from 6am to 8pm." calcext:value-type="string">
              <text:p>Delivery reception from 6am to 8pm.</text:p>
            </table:table-cell>
            <table:table-cell table:style-name="ce29" office:value-type="string" calcext:value-type="string">
              <text:p>Is ID required for all delivery personnel?</text:p>
            </table:table-cell>
            <table:table-cell table:style-name="ce30" table:number-matrix-columns-spanned="1" table:number-matrix-rows-spanned="1" table:formula="of:=IFERROR(INDEX([$'Logistics Database'.O$1:.O$1048576];MATCH(#REF!;[$'Logistics Database'.C$1:.C$1048576];0));INDEX([$'Logistics Database'.O$1:.O$1048576];MATCH([.B2];[$'Logistics Database'.A$1:.A$1048576];0)))" office:value-type="string" office:string-value="No" calcext:value-type="string">
              <text:p>No</text:p>
            </table:table-cell>
            <table:table-cell table:style-name="ce34" office:value-type="string" calcext:value-type="string">
              <text:p>⬆️ Specify dimensions / capacity if known.</text:p>
            </table:table-cell>
            <table:table-cell table:style-name="ce36" table:number-matrix-columns-spanned="1" table:number-matrix-rows-spanned="1" table:formula="of:=IFERROR(INDEX([$'Logistics Database'.AJ$1:.AJ$1048576];MATCH(#REF!;[$'Logistics Database'.C$1:.C$1048576];0));INDEX([$'Logistics Database'.AJ$1:.AJ$1048576];MATCH([.B2];[$'Logistics Database'.A$1:.A$1048576];0)))" office:value-type="string" office:string-value="2,50m x 2,50m" calcext:value-type="string">
              <text:p>2,50m x 2,50m</text:p>
            </table:table-cell>
            <table:table-cell table:style-name="ce38" office:value-type="string" calcext:value-type="string">
              <text:p>Are there any hazardous material restrictions?</text:p>
            </table:table-cell>
            <table:table-cell table:style-name="ce39" table:number-matrix-columns-spanned="1" table:number-matrix-rows-spanned="1" table:formula="of:=IFERROR(INDEX([$'Logistics Database'.AS$1:.AS$1048576];MATCH(#REF!;[$'Logistics Database'.C$1:.C$1048576];0));INDEX([$'Logistics Database'.AS$1:.AS$1048576];MATCH([.B2];[$'Logistics Database'.A$1:.A$1048576];0)))" office:value-type="string" office:string-value="No" calcext:value-type="string">
              <text:p>No</text:p>
            </table:table-cell>
            <table:table-cell table:style-name="ce40"/>
            <table:table-cell table:style-name="ce42"/>
            <table:table-cell table:number-columns-repeated="1010"/>
          </table:table-row>
          <table:table-row table:style-name="ro2">
            <table:table-cell table:style-name="ce5" office:value-type="string" calcext:value-type="string">
              <text:p>ICS Email</text:p>
            </table:table-cell>
            <table:table-cell table:style-name="ce11" table:number-matrix-columns-spanned="1" table:number-matrix-rows-spanned="1" table:formula="of:=IFERROR(INDEX([$'Logistics Database'.AA$1:.AA$1048576];MATCH(#REF!;[$'Logistics Database'.C$1:.C$1048576];0));INDEX([$'Logistics Database'.AA$1:.AA$1048576];MATCH([.B2];[$'Logistics Database'.A$1:.A$1048576];0)))" office:value-type="string" office:string-value="eramosvertiz@coreweave.com" calcext:value-type="string">
              <text:p>eramosvertiz@coreweave.com</text:p>
            </table:table-cell>
            <table:table-cell table:style-name="ce15" office:value-type="string" calcext:value-type="string">
              <text:p>⬆️ Specify the maximum clearance.</text:p>
            </table:table-cell>
            <table:table-cell table:style-name="ce18" table:number-matrix-columns-spanned="1" table:number-matrix-rows-spanned="1" table:formula="of:=IFERROR(INDEX([$'Logistics Database'.J$1:.J$1048576];MATCH(#REF!;[$'Logistics Database'.C$1:.C$1048576];0));INDEX([$'Logistics Database'.J$1:.J$1048576];MATCH([.B2];[$'Logistics Database'.A$1:.A$1048576];0)))" office:value-type="float" office:value="0" calcext:value-type="float">
              <text:p>0</text:p>
            </table:table-cell>
            <table:table-cell table:style-name="ce23" office:value-type="string" calcext:value-type="string">
              <text:p>Is overnight or after-hours receiving permitted?</text:p>
            </table:table-cell>
            <table:table-cell table:style-name="ce26" table:number-matrix-columns-spanned="1" table:number-matrix-rows-spanned="1" table:formula="of:=IFERROR(INDEX([$'Logistics Database'.AE$1:.AE$1048576];MATCH(#REF!;[$'Logistics Database'.C$1:.C$1048576];0));INDEX([$'Logistics Database'.AE$1:.AE$1048576];MATCH([.B2];[$'Logistics Database'.A$1:.A$1048576];0)))" office:value-type="string" office:string-value="No" calcext:value-type="string">
              <text:p>No</text:p>
            </table:table-cell>
            <table:table-cell table:style-name="ce29" office:value-type="string" calcext:value-type="string">
              <text:p>Is indoor PPE (Personal Protective Equipment) required?</text:p>
            </table:table-cell>
            <table:table-cell table:style-name="ce30" table:number-matrix-columns-spanned="1" table:number-matrix-rows-spanned="1" table:formula="of:=IFERROR(INDEX([$'Logistics Database'.P$1:.P$1048576];MATCH(#REF!;[$'Logistics Database'.C$1:.C$1048576];0));INDEX([$'Logistics Database'.P$1:.P$1048576];MATCH([.B2];[$'Logistics Database'.A$1:.A$1048576];0)))" office:value-type="string" office:string-value="Yes" calcext:value-type="string">
              <text:p>Yes</text:p>
            </table:table-cell>
            <table:table-cell table:style-name="ce34" office:value-type="string" calcext:value-type="string">
              <text:p>Are special material handling services needed (e.g., crane, liftgate)?</text:p>
            </table:table-cell>
            <table:table-cell table:style-name="ce36" table:number-matrix-columns-spanned="1" table:number-matrix-rows-spanned="1" table:formula="of:=IFERROR(INDEX([$'Logistics Database'.U$1:.U$1048576];MATCH(#REF!;[$'Logistics Database'.C$1:.C$1048576];0));INDEX([$'Logistics Database'.U$1:.U$1048576];MATCH([.B2];[$'Logistics Database'.A$1:.A$1048576];0)))" office:value-type="string" office:string-value="No" calcext:value-type="string">
              <text:p>No</text:p>
            </table:table-cell>
            <table:table-cell table:style-name="ce38" office:value-type="string" calcext:value-type="string">
              <text:p>⬆️ Describe.</text:p>
            </table:table-cell>
            <table:table-cell table:style-name="ce39" table:number-matrix-columns-spanned="1" table:number-matrix-rows-spanned="1" table:formula="of:=IFERROR(INDEX([$'Logistics Database'.AT$1:.AT$1048576];MATCH(#REF!;[$'Logistics Database'.C$1:.C$1048576];0));INDEX([$'Logistics Database'.AT$1:.AT$1048576];MATCH([.B2];[$'Logistics Database'.A$1:.A$1048576];0)))" office:value-type="float" office:value="0" calcext:value-type="float">
              <text:p>0</text:p>
            </table:table-cell>
            <table:table-cell table:style-name="ce40"/>
            <table:table-cell table:style-name="ce42"/>
            <table:table-cell table:number-columns-repeated="1010"/>
          </table:table-row>
          <table:table-row table:style-name="ro2">
            <table:table-cell table:style-name="ce5" office:value-type="string" calcext:value-type="string">
              <text:p>Regional ICM</text:p>
            </table:table-cell>
            <table:table-cell table:style-name="ce12" table:number-matrix-columns-spanned="1" table:number-matrix-rows-spanned="1" table:formula="of:=IFERROR(INDEX([$'Logistics Database'.B$1:.B$1048576];MATCH(#REF!;[$'Logistics Database'.C$1:.C$1048576];0));INDEX([$'Logistics Database'.B$1:.B$1048576];MATCH([.B2];[$'Logistics Database'.A$1:.A$1048576];0)))" office:value-type="string" office:string-value="Rhys Lopez-Lloyd" calcext:value-type="string">
              <text:p>Rhys Lopez-Lloyd</text:p>
            </table:table-cell>
            <table:table-cell table:style-name="ce2" office:value-type="string" calcext:value-type="string">
              <text:p>Is parking available for trailers / trucks?</text:p>
            </table:table-cell>
            <table:table-cell table:style-name="ce18" table:number-matrix-columns-spanned="1" table:number-matrix-rows-spanned="1" table:formula="of:=IFERROR(INDEX([$'Logistics Database'.H$1:.H$1048576];MATCH(#REF!;[$'Logistics Database'.C$1:.C$1048576];0));INDEX([$'Logistics Database'.H$1:.H$1048576];MATCH([.B2];[$'Logistics Database'.A$1:.A$1048576];0)))" office:value-type="string" office:string-value="No" calcext:value-type="string">
              <text:p>No</text:p>
            </table:table-cell>
            <table:table-cell table:style-name="ce23" office:value-type="string" calcext:value-type="string">
              <text:p>Is emergency / after-hours delivery service required or permitted?</text:p>
            </table:table-cell>
            <table:table-cell table:style-name="ce26" table:number-matrix-columns-spanned="1" table:number-matrix-rows-spanned="1" table:formula="of:=IFERROR(INDEX([$'Logistics Database'.AF$1:.AF$1048576];MATCH(#REF!;[$'Logistics Database'.C$1:.C$1048576];0));INDEX([$'Logistics Database'.AF$1:.AF$1048576];MATCH([.B2];[$'Logistics Database'.A$1:.A$1048576];0)))" office:value-type="string" office:string-value="No" calcext:value-type="string">
              <text:p>No</text:p>
            </table:table-cell>
            <table:table-cell table:style-name="ce29" office:value-type="string" calcext:value-type="string">
              <text:p>⬆️ Specify required items (e.g., hard hat, safety vest).</text:p>
            </table:table-cell>
            <table:table-cell table:style-name="ce30" table:number-matrix-columns-spanned="1" table:number-matrix-rows-spanned="1" table:formula="of:=IFERROR(INDEX([$'Logistics Database'.Q$1:.Q$1048576];MATCH(#REF!;[$'Logistics Database'.C$1:.C$1048576];0));INDEX([$'Logistics Database'.Q$1:.Q$1048576];MATCH([.B2];[$'Logistics Database'.A$1:.A$1048576];0)))" office:value-type="string" office:string-value="Safety vest, safety shoes" calcext:value-type="string">
              <text:p>Safety vest, safety shoes</text:p>
            </table:table-cell>
            <table:table-cell table:style-name="ce34" office:value-type="string" calcext:value-type="string">
              <text:p>⬆️ Specify service.</text:p>
            </table:table-cell>
            <table:table-cell table:style-name="ce36" table:number-matrix-columns-spanned="1" table:number-matrix-rows-spanned="1" table:formula="of:=IFERROR(INDEX([$'Logistics Database'.AK$1:.AK$1048576];MATCH(#REF!;[$'Logistics Database'.C$1:.C$1048576];0));INDEX([$'Logistics Database'.AK$1:.AK$1048576];MATCH([.B2];[$'Logistics Database'.A$1:.A$1048576];0)))" office:value-type="float" office:value="0" calcext:value-type="float">
              <text:p>0</text:p>
            </table:table-cell>
            <table:table-cell table:style-name="ce38" office:value-type="string" calcext:value-type="string">
              <text:p>Is documentation (e.g., commercial invoice, customs paperwork) required on arrival?</text:p>
            </table:table-cell>
            <table:table-cell table:style-name="ce39" table:number-matrix-columns-spanned="1" table:number-matrix-rows-spanned="1" table:formula="of:=IFERROR(INDEX([$'Logistics Database'.AU$1:.AU$1048576];MATCH(#REF!;[$'Logistics Database'.C$1:.C$1048576];0));INDEX([$'Logistics Database'.AU$1:.AU$1048576];MATCH([.B2];[$'Logistics Database'.A$1:.A$1048576];0)))" office:value-type="string" office:string-value="No" calcext:value-type="string">
              <text:p>No</text:p>
            </table:table-cell>
            <table:table-cell table:style-name="ce40"/>
            <table:table-cell table:style-name="ce42"/>
            <table:table-cell table:number-columns-repeated="1010"/>
          </table:table-row>
          <table:table-row table:style-name="ro2">
            <table:table-cell table:style-name="ce5"/>
            <table:table-cell table:style-name="ce11"/>
            <table:table-cell table:style-name="ce2"/>
            <table:table-cell table:style-name="ce18"/>
            <table:table-cell table:style-name="ce23" office:value-type="string" calcext:value-type="string">
              <text:p>⬆️ Provide instructions.</text:p>
            </table:table-cell>
            <table:table-cell table:style-name="ce26" table:number-matrix-columns-spanned="1" table:number-matrix-rows-spanned="1" table:formula="of:=IFERROR(INDEX([$'Logistics Database'.AG$1:.AG$1048576];MATCH(#REF!;[$'Logistics Database'.C$1:.C$1048576];0));INDEX([$'Logistics Database'.AG$1:.AG$1048576];MATCH([.B2];[$'Logistics Database'.A$1:.A$1048576];0)))" office:value-type="float" office:value="0" calcext:value-type="float">
              <text:p>0</text:p>
            </table:table-cell>
            <table:table-cell table:style-name="ce29"/>
            <table:table-cell table:style-name="ce30"/>
            <table:table-cell table:style-name="ce34" office:value-type="string" calcext:value-type="string">
              <text:p>Is the delivery path free of obstructions (e.g., narrow hallways, tight turns)?</text:p>
            </table:table-cell>
            <table:table-cell table:style-name="ce36" table:number-matrix-columns-spanned="1" table:number-matrix-rows-spanned="1" table:formula="of:=IFERROR(INDEX([$'Logistics Database'.V$1:.V$1048576];MATCH(#REF!;[$'Logistics Database'.C$1:.C$1048576];0));INDEX([$'Logistics Database'.V$1:.V$1048576];MATCH([.B2];[$'Logistics Database'.A$1:.A$1048576];0)))" office:value-type="string" office:string-value="Yes" calcext:value-type="string">
              <text:p>Yes</text:p>
            </table:table-cell>
            <table:table-cell table:style-name="ce38" office:value-type="string" calcext:value-type="string">
              <text:p>Is prior customs clearance mandatory before delivery?</text:p>
            </table:table-cell>
            <table:table-cell table:style-name="ce39" table:number-matrix-columns-spanned="1" table:number-matrix-rows-spanned="1" table:formula="of:=IFERROR(INDEX([$'Logistics Database'.AV$1:.AV$1048576];MATCH(#REF!;[$'Logistics Database'.C$1:.C$1048576];0));INDEX([$'Logistics Database'.AV$1:.AV$1048576];MATCH([.B2];[$'Logistics Database'.A$1:.A$1048576];0)))" office:value-type="string" office:string-value="Yes" calcext:value-type="string">
              <text:p>Yes</text:p>
            </table:table-cell>
            <table:table-cell table:style-name="ce40"/>
            <table:table-cell table:style-name="ce42"/>
            <table:table-cell table:number-columns-repeated="1010"/>
          </table:table-row>
          <table:table-row table:style-name="ro2">
            <table:table-cell table:style-name="ce5"/>
            <table:table-cell table:style-name="ce11"/>
            <table:table-cell table:style-name="ce2"/>
            <table:table-cell table:style-name="ce18"/>
            <table:table-cell table:style-name="ce23" office:value-type="string" calcext:value-type="string">
              <text:p>Is an emergency contact available for delivery exceptions?</text:p>
            </table:table-cell>
            <table:table-cell table:style-name="ce26" table:number-matrix-columns-spanned="1" table:number-matrix-rows-spanned="1" table:formula="of:=IFERROR(INDEX([$'Logistics Database'.AH$1:.AH$1048576];MATCH(#REF!;[$'Logistics Database'.C$1:.C$1048576];0));INDEX([$'Logistics Database'.AH$1:.AH$1048576];MATCH([.B2];[$'Logistics Database'.A$1:.A$1048576];0)))" office:value-type="string" office:string-value="No" calcext:value-type="string">
              <text:p>No</text:p>
            </table:table-cell>
            <table:table-cell table:style-name="ce29"/>
            <table:table-cell table:style-name="ce30"/>
            <table:table-cell table:style-name="ce34" office:value-type="string" calcext:value-type="string">
              <text:p>⬆️ Specify obstacles.</text:p>
            </table:table-cell>
            <table:table-cell table:style-name="ce36" table:number-matrix-columns-spanned="1" table:number-matrix-rows-spanned="1" table:formula="of:=IFERROR(INDEX([$'Logistics Database'.AL$1:.AL$1048576];MATCH(#REF!;[$'Logistics Database'.C$1:.C$1048576];0));INDEX([$'Logistics Database'.AL$1:.AL$1048576];MATCH([.B2];[$'Logistics Database'.A$1:.A$1048576];0)))" office:value-type="float" office:value="0" calcext:value-type="float">
              <text:p>0</text:p>
            </table:table-cell>
            <table:table-cell table:style-name="ce38" office:value-type="string" calcext:value-type="string">
              <text:p>Are there any embargoed or restricted items at this site?</text:p>
            </table:table-cell>
            <table:table-cell table:style-name="ce39" table:number-matrix-columns-spanned="1" table:number-matrix-rows-spanned="1" table:formula="of:=IFERROR(INDEX([$'Logistics Database'.AW$1:.AW$1048576];MATCH(#REF!;[$'Logistics Database'.C$1:.C$1048576];0));INDEX([$'Logistics Database'.AW$1:.AW$1048576];MATCH([.B2];[$'Logistics Database'.A$1:.A$1048576];0)))" office:value-type="string" office:string-value="No" calcext:value-type="string">
              <text:p>No</text:p>
            </table:table-cell>
            <table:table-cell table:style-name="ce40"/>
            <table:table-cell table:style-name="ce42"/>
            <table:table-cell table:number-columns-repeated="1010"/>
          </table:table-row>
          <table:table-row table:style-name="ro2">
            <table:table-cell table:style-name="ce5"/>
            <table:table-cell table:style-name="ce11"/>
            <table:table-cell table:style-name="ce2"/>
            <table:table-cell table:style-name="ce18"/>
            <table:table-cell table:style-name="ce23" office:value-type="string" calcext:value-type="string">
              <text:p>⬆️ Provide name and 24/7 phone number.</text:p>
            </table:table-cell>
            <table:table-cell table:style-name="ce26" table:number-matrix-columns-spanned="1" table:number-matrix-rows-spanned="1" table:formula="of:=IFERROR(INDEX([$'Logistics Database'.AI$1:.AI$1048576];MATCH(#REF!;[$'Logistics Database'.C$1:.C$1048576];0));INDEX([$'Logistics Database'.AI$1:.AI$1048576];MATCH([.B2];[$'Logistics Database'.A$1:.A$1048576];0)))" office:value-type="float" office:value="0" calcext:value-type="float">
              <text:p>0</text:p>
            </table:table-cell>
            <table:table-cell table:style-name="ce29"/>
            <table:table-cell table:style-name="ce30"/>
            <table:table-cell table:style-name="ce34" office:value-type="string" calcext:value-type="string">
              <text:p>Are there stairs or ramps en route to the equipment room?</text:p>
            </table:table-cell>
            <table:table-cell table:style-name="ce36" table:number-matrix-columns-spanned="1" table:number-matrix-rows-spanned="1" table:formula="of:=IFERROR(INDEX([$'Logistics Database'.AM$1:.AM$1048576];MATCH(#REF!;[$'Logistics Database'.C$1:.C$1048576];0));INDEX([$'Logistics Database'.AM$1:.AM$1048576];MATCH([.B2];[$'Logistics Database'.A$1:.A$1048576];0)))" office:value-type="string" office:string-value="No" calcext:value-type="string">
              <text:p>No</text:p>
            </table:table-cell>
            <table:table-cell table:style-name="ce38" office:value-type="string" calcext:value-type="string">
              <text:p>⬆️ List items.</text:p>
            </table:table-cell>
            <table:table-cell table:style-name="ce39" table:number-matrix-columns-spanned="1" table:number-matrix-rows-spanned="1" table:formula="of:=IFERROR(INDEX([$'Logistics Database'.AX$1:.AX$1048576];MATCH(#REF!;[$'Logistics Database'.C$1:.C$1048576];0));INDEX([$'Logistics Database'.AX$1:.AX$1048576];MATCH([.B2];[$'Logistics Database'.A$1:.A$1048576];0)))" office:value-type="float" office:value="0" calcext:value-type="float">
              <text:p>0</text:p>
            </table:table-cell>
            <table:table-cell table:style-name="ce40"/>
            <table:table-cell table:style-name="ce42"/>
            <table:table-cell table:number-columns-repeated="1010"/>
          </table:table-row>
          <table:table-row table:style-name="ro2">
            <table:table-cell table:style-name="ce5"/>
            <table:table-cell table:style-name="ce11"/>
            <table:table-cell table:style-name="ce2"/>
            <table:table-cell table:style-name="ce18"/>
            <table:table-cell table:style-name="ce23"/>
            <table:table-cell table:style-name="ce26"/>
            <table:table-cell table:style-name="ce29"/>
            <table:table-cell table:style-name="ce30"/>
            <table:table-cell table:style-name="ce34" office:value-type="string" calcext:value-type="string">
              <text:p>Is the receiving area indoors or outdoors?</text:p>
            </table:table-cell>
            <table:table-cell table:style-name="ce36" table:number-matrix-columns-spanned="1" table:number-matrix-rows-spanned="1" table:formula="of:=IFERROR(INDEX([$'Logistics Database'.AN$1:.AN$1048576];MATCH(#REF!;[$'Logistics Database'.C$1:.C$1048576];0));INDEX([$'Logistics Database'.AN$1:.AN$1048576];MATCH([.B2];[$'Logistics Database'.A$1:.A$1048576];0)))" office:value-type="string" office:string-value="Outdoors" calcext:value-type="string">
              <text:p>Outdoors</text:p>
            </table:table-cell>
            <table:table-cell table:style-name="ce38"/>
            <table:table-cell table:style-name="ce39"/>
            <table:table-cell table:style-name="ce40"/>
            <table:table-cell table:style-name="ce42"/>
            <table:table-cell table:number-columns-repeated="1010"/>
          </table:table-row>
          <table:table-row table:style-name="ro2">
            <table:table-cell table:style-name="ce5"/>
            <table:table-cell table:style-name="ce11"/>
            <table:table-cell table:style-name="ce2"/>
            <table:table-cell table:style-name="ce18"/>
            <table:table-cell table:style-name="ce23"/>
            <table:table-cell table:style-name="ce26"/>
            <table:table-cell table:style-name="ce29"/>
            <table:table-cell table:style-name="ce30"/>
            <table:table-cell table:style-name="ce34" office:value-type="string" calcext:value-type="string">
              <text:p>Is protective floor covering required for rolling equipment?</text:p>
            </table:table-cell>
            <table:table-cell table:style-name="ce36" table:number-matrix-columns-spanned="1" table:number-matrix-rows-spanned="1" table:formula="of:=IFERROR(INDEX([$'Logistics Database'.AO$1:.AO$1048576];MATCH(#REF!;[$'Logistics Database'.C$1:.C$1048576];0));INDEX([$'Logistics Database'.AO$1:.AO$1048576];MATCH([.B2];[$'Logistics Database'.A$1:.A$1048576];0)))" office:value-type="string" office:string-value="No" calcext:value-type="string">
              <text:p>No</text:p>
            </table:table-cell>
            <table:table-cell table:style-name="ce38"/>
            <table:table-cell table:style-name="ce39"/>
            <table:table-cell table:style-name="ce40"/>
            <table:table-cell table:style-name="ce42"/>
            <table:table-cell table:number-columns-repeated="1010"/>
          </table:table-row>
          <table:table-row table:style-name="ro2">
            <table:table-cell table:style-name="ce5"/>
            <table:table-cell table:style-name="ce11"/>
            <table:table-cell table:style-name="ce2"/>
            <table:table-cell table:style-name="ce18"/>
            <table:table-cell table:style-name="ce23"/>
            <table:table-cell table:style-name="ce26"/>
            <table:table-cell table:style-name="ce29"/>
            <table:table-cell table:style-name="ce30"/>
            <table:table-cell table:style-name="ce34" office:value-type="string" calcext:value-type="string">
              <text:p>Is there a designated area for unpacking / pallet breakdown?</text:p>
            </table:table-cell>
            <table:table-cell table:style-name="ce36" table:number-matrix-columns-spanned="1" table:number-matrix-rows-spanned="1" table:formula="of:=IFERROR(INDEX([$'Logistics Database'.AP$1:.AP$1048576];MATCH(#REF!;[$'Logistics Database'.C$1:.C$1048576];0));INDEX([$'Logistics Database'.AP$1:.AP$1048576];MATCH([.B2];[$'Logistics Database'.A$1:.A$1048576];0)))" office:value-type="string" office:string-value="No" calcext:value-type="string">
              <text:p>No</text:p>
            </table:table-cell>
            <table:table-cell table:style-name="ce38"/>
            <table:table-cell table:style-name="ce39"/>
            <table:table-cell table:style-name="ce40"/>
            <table:table-cell table:style-name="ce42"/>
            <table:table-cell table:number-columns-repeated="1010"/>
          </table:table-row>
        </table:table-row-group>
        <table:table-row table:style-name="ro3">
          <table:table-cell table:style-name="ce6" table:number-columns-spanned="14" table:number-rows-spanned="1"/>
          <table:covered-table-cell table:number-columns-repeated="12" table:style-name="ce7"/>
          <table:covered-table-cell table:style-name="ce10"/>
          <table:table-cell table:number-columns-repeated="1010"/>
        </table:table-row>
        <table:table-row table:style-name="ro1">
          <table:table-cell table:style-name="ce4" office:value-type="string" calcext:value-type="string" table:number-columns-spanned="14" table:number-rows-spanned="1">
            <text:p>General Site Information</text:p>
          </table:table-cell>
          <table:covered-table-cell table:number-columns-repeated="12" table:style-name="ce7"/>
          <table:covered-table-cell table:style-name="ce10"/>
          <table:table-cell table:number-columns-repeated="1010"/>
        </table:table-row>
        <table:table-row-group>
          <table:table-row table:style-name="ro1">
            <table:table-cell table:style-name="ce5" office:value-type="string" calcext:value-type="string" table:number-columns-spanned="2" table:number-rows-spanned="1">
              <text:p>Staffing</text:p>
            </table:table-cell>
            <table:covered-table-cell table:style-name="ce10"/>
            <table:table-cell table:style-name="ce14" office:value-type="string" calcext:value-type="string" table:number-columns-spanned="2" table:number-rows-spanned="1">
              <text:p>Data Center Information</text:p>
            </table:table-cell>
            <table:covered-table-cell table:style-name="ce10"/>
            <table:table-cell table:style-name="ce23" office:value-type="string" calcext:value-type="string" table:number-columns-spanned="2" table:number-rows-spanned="1">
              <text:p>Network Information</text:p>
            </table:table-cell>
            <table:covered-table-cell table:style-name="ce10"/>
            <table:table-cell table:style-name="ce29" table:number-columns-spanned="2" table:number-rows-spanned="1"/>
            <table:covered-table-cell table:style-name="ce10"/>
            <table:table-cell table:style-name="ce34" table:number-columns-spanned="2" table:number-rows-spanned="1"/>
            <table:covered-table-cell table:style-name="ce10"/>
            <table:table-cell table:style-name="ce38" table:number-columns-spanned="2" table:number-rows-spanned="1"/>
            <table:covered-table-cell table:style-name="ce10"/>
            <table:table-cell table:style-name="ce40" table:number-columns-spanned="2" table:number-rows-spanned="1"/>
            <table:covered-table-cell table:style-name="ce10"/>
            <table:table-cell table:number-columns-repeated="1010"/>
          </table:table-row>
          <table:table-row table:style-name="ro2">
            <table:table-cell table:style-name="ce5" office:value-type="string" calcext:value-type="string">
              <text:p>DC Site Manager</text:p>
            </table:table-cell>
            <table:table-cell table:style-name="ce12" table:number-matrix-columns-spanned="1" table:number-matrix-rows-spanned="1" table:formula="of:=IFERROR(INDEX([$'DC Operations Database'.G$1:.G$1048576];MATCH(#REF!;[$'DC Operations Database'.O$1:.O$1048576];0));INDEX([$'DC Operations Database'.G$1:.G$1048576];MATCH([.B2];[$'DC Operations Database'.A$1:.A$1048576];0)))" office:value-type="string" office:string-value="Yoann Herembourg" calcext:value-type="string">
              <text:p>Yoann Herembourg</text:p>
            </table:table-cell>
            <table:table-cell table:style-name="ce15" office:value-type="string" calcext:value-type="string">
              <text:p># of Active Racks</text:p>
            </table:table-cell>
            <table:table-cell table:style-name="ce19" table:number-matrix-columns-spanned="1" table:number-matrix-rows-spanned="1" table:formula="of:=IFERROR(INDEX([$'DC Operations Database'.D$1:.D$1048576];MATCH(#REF!;[$'DC Operations Database'.O$1:.O$1048576];0));INDEX([$'DC Operations Database'.D$1:.D$1048576];MATCH([.B2];[$'DC Operations Database'.A$1:.A$1048576];0)))" office:value-type="float" office:value="442" calcext:value-type="float">
              <text:p>442</text:p>
            </table:table-cell>
            <table:table-cell table:style-name="ce23" office:value-type="string" calcext:value-type="string">
              <text:p>Netbox ID</text:p>
            </table:table-cell>
            <table:table-cell table:style-name="ce27" table:number-matrix-columns-spanned="1" table:number-matrix-rows-spanned="1" table:formula="of:=IFERROR(INDEX([$'DC Operations Database'.B$1:.B$1048576];MATCH(#REF!;[$'DC Operations Database'.O$1:.O$1048576];0));INDEX([$'DC Operations Database'.B$1:.B$1048576];MATCH([.B2];[$'DC Operations Database'.A$1:.A$1048576];0)))" office:value-type="string" office:string-value="US-SOUTH-01" calcext:value-type="string">
              <text:p>US-SOUTH-01</text:p>
            </table:table-cell>
            <table:table-cell table:style-name="ce29"/>
            <table:table-cell table:style-name="ce31"/>
            <table:table-cell table:style-name="ce34"/>
            <table:table-cell table:style-name="ce37"/>
            <table:table-cell table:style-name="ce38"/>
            <table:table-cell table:style-name="ce39"/>
            <table:table-cell table:style-name="ce41"/>
            <table:table-cell table:style-name="ce42"/>
            <table:table-cell table:number-columns-repeated="1010"/>
          </table:table-row>
          <table:table-row table:style-name="ro2">
            <table:table-cell table:style-name="ce5" office:value-type="string" calcext:value-type="string">
              <text:p>DC Area Manager</text:p>
            </table:table-cell>
            <table:table-cell table:style-name="ce12" table:number-matrix-columns-spanned="1" table:number-matrix-rows-spanned="1" table:formula="of:=IFERROR(INDEX([$'DC Operations Database'.H$1:.H$1048576];MATCH(#REF!;[$'DC Operations Database'.O$1:.O$1048576];0));INDEX([$'DC Operations Database'.H$1:.H$1048576];MATCH([.B2];[$'DC Operations Database'.A$1:.A$1048576];0)))" office:value-type="string" office:string-value="Marcos Montoro Riestra" calcext:value-type="string">
              <text:p>Marcos Montoro Riestra</text:p>
            </table:table-cell>
            <table:table-cell table:style-name="ce2" office:value-type="string" calcext:value-type="string">
              <text:p># of Devices</text:p>
            </table:table-cell>
            <table:table-cell table:style-name="ce19" table:number-matrix-columns-spanned="1" table:number-matrix-rows-spanned="1" table:formula="of:=IFERROR(INDEX([$'DC Operations Database'.E$1:.E$1048576];MATCH(#REF!;[$'DC Operations Database'.O$1:.O$1048576];0));INDEX([$'DC Operations Database'.E$1:.E$1048576];MATCH([.B2];[$'DC Operations Database'.A$1:.A$1048576];0)))" office:value-type="float" office:value="1703" calcext:value-type="float">
              <text:p>1703</text:p>
            </table:table-cell>
            <table:table-cell table:style-name="ce23"/>
            <table:table-cell table:style-name="ce27"/>
            <table:table-cell table:style-name="ce29"/>
            <table:table-cell table:style-name="ce31"/>
            <table:table-cell table:style-name="ce34"/>
            <table:table-cell table:style-name="ce37"/>
            <table:table-cell table:style-name="ce38"/>
            <table:table-cell table:style-name="ce39"/>
            <table:table-cell table:style-name="ce41"/>
            <table:table-cell table:style-name="ce42"/>
            <table:table-cell table:number-columns-repeated="1010"/>
          </table:table-row>
          <table:table-row table:style-name="ro2">
            <table:table-cell table:style-name="ce5" office:value-type="string" calcext:value-type="string">
              <text:p>DC Regional Manager</text:p>
            </table:table-cell>
            <table:table-cell table:style-name="ce12" table:number-matrix-columns-spanned="1" table:number-matrix-rows-spanned="1" table:formula="of:=IFERROR(INDEX([$'DC Operations Database'.I$1:.I$1048576];MATCH(#REF!;[$'DC Operations Database'.O$1:.O$1048576];0));INDEX([$'DC Operations Database'.I$1:.I$1048576];MATCH([.B2];[$'DC Operations Database'.A$1:.A$1048576];0)))" office:value-type="string" office:string-value="N/A" calcext:value-type="string">
              <text:p>N/A</text:p>
            </table:table-cell>
            <table:table-cell table:style-name="ce15" office:value-type="string" calcext:value-type="string">
              <text:p># of Data Halls</text:p>
            </table:table-cell>
            <table:table-cell table:style-name="ce19" table:number-matrix-columns-spanned="1" table:number-matrix-rows-spanned="1" table:formula="of:=IFERROR(INDEX([$'DC Operations Database'.C$1:.C$1048576];MATCH(#REF!;[$'DC Operations Database'.O$1:.O$1048576];0));INDEX([$'DC Operations Database'.C$1:.C$1048576];MATCH([.B2];[$'DC Operations Database'.A$1:.A$1048576];0)))" office:value-type="float" office:value="2" calcext:value-type="float">
              <text:p>2</text:p>
            </table:table-cell>
            <table:table-cell table:style-name="ce23"/>
            <table:table-cell table:style-name="ce27"/>
            <table:table-cell table:style-name="ce29"/>
            <table:table-cell table:style-name="ce31"/>
            <table:table-cell table:style-name="ce34"/>
            <table:table-cell table:style-name="ce37"/>
            <table:table-cell table:style-name="ce38"/>
            <table:table-cell table:style-name="ce39"/>
            <table:table-cell table:style-name="ce41"/>
            <table:table-cell table:style-name="ce42"/>
            <table:table-cell table:number-columns-repeated="1010"/>
          </table:table-row>
          <table:table-row table:style-name="ro2">
            <table:table-cell table:style-name="ce5" office:value-type="string" calcext:value-type="string">
              <text:p>Facility Engineer</text:p>
            </table:table-cell>
            <table:table-cell table:style-name="ce12" table:number-matrix-columns-spanned="1" table:number-matrix-rows-spanned="1" table:formula="of:=IFERROR(INDEX([$'DC Operations Database'.J$1:.J$1048576];MATCH(#REF!;[$'DC Operations Database'.O$1:.O$1048576];0));INDEX([$'DC Operations Database'.J$1:.J$1048576];MATCH([.B2];[$'DC Operations Database'.A$1:.A$1048576];0)))" office:value-type="float" office:value="0" calcext:value-type="float">
              <text:p>0</text:p>
            </table:table-cell>
            <table:table-cell table:style-name="ce15" office:value-type="string" calcext:value-type="string">
              <text:p>Tenant</text:p>
            </table:table-cell>
            <table:table-cell table:style-name="ce19" table:number-matrix-columns-spanned="1" table:number-matrix-rows-spanned="1" table:formula="of:=IFERROR(INDEX([$'DC Operations Database'.F$1:.F$1048576];MATCH(#REF!;[$'DC Operations Database'.O$1:.O$1048576];0));INDEX([$'DC Operations Database'.F$1:.F$1048576];MATCH([.B2];[$'DC Operations Database'.A$1:.A$1048576];0)))" office:value-type="float" office:value="0" calcext:value-type="float">
              <text:p>0</text:p>
            </table:table-cell>
            <table:table-cell table:style-name="ce23"/>
            <table:table-cell table:style-name="ce27"/>
            <table:table-cell table:style-name="ce29"/>
            <table:table-cell table:style-name="ce31"/>
            <table:table-cell table:style-name="ce34"/>
            <table:table-cell table:style-name="ce37"/>
            <table:table-cell table:style-name="ce38"/>
            <table:table-cell table:style-name="ce39"/>
            <table:table-cell table:style-name="ce41"/>
            <table:table-cell table:style-name="ce42"/>
            <table:table-cell table:number-columns-repeated="1010"/>
          </table:table-row>
          <table:table-row table:style-name="ro2">
            <table:table-cell table:style-name="ce5"/>
            <table:table-cell table:style-name="ce12"/>
            <table:table-cell table:style-name="ce15" office:value-type="string" calcext:value-type="string">
              <text:p>Power Consumption</text:p>
            </table:table-cell>
            <table:table-cell table:style-name="ce19"/>
            <table:table-cell table:style-name="ce23"/>
            <table:table-cell table:style-name="ce27"/>
            <table:table-cell table:style-name="ce29"/>
            <table:table-cell table:style-name="ce31"/>
            <table:table-cell table:style-name="ce34"/>
            <table:table-cell table:style-name="ce37"/>
            <table:table-cell table:style-name="ce38"/>
            <table:table-cell table:style-name="ce39"/>
            <table:table-cell table:style-name="ce41"/>
            <table:table-cell table:style-name="ce42"/>
            <table:table-cell table:number-columns-repeated="1010"/>
          </table:table-row>
        </table:table-row-group>
        <table:table-row table:style-name="ro4" table:number-rows-repeated="1048550">
          <table:table-cell table:number-columns-repeated="1024"/>
        </table:table-row>
        <table:table-row table:style-name="ro4">
          <table:table-cell table:number-columns-repeated="1024"/>
        </table:table-row>
      </table:table>
      <table:table table:name="Logistics Databas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2" table:default-cell-style-name="Default"/>
        <table:table-column table:style-name="co14" table:default-cell-style-name="Default"/>
        <table:table-column table:style-name="co2" table:number-columns-repeated="38" table:default-cell-style-name="Default"/>
        <table:table-column table:style-name="co3" table:number-columns-repeated="973" table:default-cell-style-name="Default"/>
        <table:table-row table:style-name="ro5">
          <table:table-cell table:style-name="ce43" office:value-type="string" calcext:value-type="string">
            <text:p>LOCODE</text:p>
          </table:table-cell>
          <table:table-cell table:style-name="ce43" office:value-type="string" calcext:value-type="string">
            <text:p>Regional ICM</text:p>
          </table:table-cell>
          <table:table-cell table:style-name="ce43" office:value-type="string" calcext:value-type="string">
            <text:p>ICS</text:p>
          </table:table-cell>
          <table:table-cell table:style-name="ce43" office:value-type="string" calcext:value-type="string">
            <text:p>Address</text:p>
          </table:table-cell>
          <table:table-cell table:style-name="ce43" office:value-type="string" calcext:value-type="string">
            <text:p>Is a loading dock available?</text:p>
          </table:table-cell>
          <table:table-cell table:style-name="ce43" office:value-type="string" calcext:value-type="string">
            <text:p>(IF YES): </text:p>
            <text:p>Is the dock level (standard height) or ground level?</text:p>
          </table:table-cell>
          <table:table-cell table:style-name="ce43" office:value-type="string" calcext:value-type="string">
            <text:p>(IF YES):</text:p>
            <text:p>Are dock doors wide enough for large pallets (e.g., 48” x 48”)?</text:p>
          </table:table-cell>
          <table:table-cell table:style-name="ce43" office:value-type="string" calcext:value-type="string">
            <text:p>Is parking available for trailers/trucks?</text:p>
          </table:table-cell>
          <table:table-cell table:style-name="ce43" office:value-type="string" calcext:value-type="string">
            <text:p>Are there any vehicle height restrictions at the dock/entrance?</text:p>
          </table:table-cell>
          <table:table-cell table:style-name="ce43" office:value-type="string" calcext:value-type="string">
            <text:p>(IF YES):</text:p>
            <text:p>Specify the maximum clearance.</text:p>
          </table:table-cell>
          <table:table-cell table:style-name="ce43" office:value-type="string" calcext:value-type="string">
            <text:p>Are delivery appointments required?</text:p>
          </table:table-cell>
          <table:table-cell table:style-name="ce43" office:value-type="string" calcext:value-type="string">
            <text:p>Are security clearances/badges required for entry?</text:p>
          </table:table-cell>
          <table:table-cell table:style-name="ce43" office:value-type="string" calcext:value-type="string">
            <text:p>(IF YES):</text:p>
            <text:p>Explain process.</text:p>
          </table:table-cell>
          <table:table-cell table:style-name="ce43" office:value-type="string" calcext:value-type="string">
            <text:p>Will a security escort be needed for the delivery crew?</text:p>
          </table:table-cell>
          <table:table-cell table:style-name="ce43" office:value-type="string" calcext:value-type="string">
            <text:p>Is ID required for all delivery personnel?</text:p>
          </table:table-cell>
          <table:table-cell table:style-name="ce43" office:value-type="string" calcext:value-type="string">
            <text:p>Is indoor PPE (Personal Protective Equipment) required?</text:p>
          </table:table-cell>
          <table:table-cell table:style-name="ce43" office:value-type="string" calcext:value-type="string">
            <text:p>(IF YES):</text:p>
            <text:p>Specify required items (e.g., hard hat, safety vest).</text:p>
          </table:table-cell>
          <table:table-cell table:style-name="ce43" office:value-type="string" calcext:value-type="string">
            <text:p>Is forklift access available at the site?</text:p>
          </table:table-cell>
          <table:table-cell table:style-name="ce43" office:value-type="string" calcext:value-type="string">
            <text:p>Is a pallet jack available at the site?</text:p>
          </table:table-cell>
          <table:table-cell table:style-name="ce43" office:value-type="string" calcext:value-type="string">
            <text:p>Is a freight elevator available for basement/upper floor deliveries?</text:p>
          </table:table-cell>
          <table:table-cell table:style-name="ce43" office:value-type="string" calcext:value-type="string">
            <text:p>Are special material handling services needed (e.g., crane, liftgate)?</text:p>
          </table:table-cell>
          <table:table-cell table:style-name="ce43" office:value-type="string" calcext:value-type="string">
            <text:p>Is the delivery path free of obstructions (e.g., narrow hallways, tight turns)?</text:p>
          </table:table-cell>
          <table:table-cell table:style-name="ce43" office:value-type="string" calcext:value-type="string">
            <text:p>Is onsite storage available for early/late shipments?</text:p>
          </table:table-cell>
          <table:table-cell table:style-name="ce43" office:value-type="string" calcext:value-type="string">
            <text:p>Is delivery integrated with an IT project team on-site?</text:p>
          </table:table-cell>
          <table:table-cell table:style-name="ce43" office:value-type="string" calcext:value-type="string">
            <text:p>Is an onsite inspection/sign-off required before the delivery crew's departure?</text:p>
          </table:table-cell>
          <table:table-cell table:style-name="ce43" office:value-type="string" calcext:value-type="string">
            <text:p>What is your work phone number?</text:p>
          </table:table-cell>
          <table:table-cell table:style-name="ce43" office:value-type="string" calcext:value-type="string">
            <text:p>What is your work email?</text:p>
          </table:table-cell>
          <table:table-cell table:style-name="ce43" office:value-type="string" calcext:value-type="string">
            <text:p>(IF YES):</text:p>
            <text:p>What is the required lead time?</text:p>
          </table:table-cell>
          <table:table-cell table:style-name="ce43" office:value-type="string" calcext:value-type="string">
            <text:p>Are there specific delivery time windows or blackout periods?</text:p>
          </table:table-cell>
          <table:table-cell table:style-name="ce43" office:value-type="string" calcext:value-type="string">
            <text:p>(IF YES):</text:p>
            <text:p>Specify times/dates.</text:p>
          </table:table-cell>
          <table:table-cell table:style-name="ce43" office:value-type="string" calcext:value-type="string">
            <text:p>Is overnight or after-hours receiving permitted?</text:p>
          </table:table-cell>
          <table:table-cell table:style-name="ce43" office:value-type="string" calcext:value-type="string">
            <text:p>Is emergency/after-hours delivery service required or permitted?</text:p>
          </table:table-cell>
          <table:table-cell table:style-name="ce43" office:value-type="string" calcext:value-type="string">
            <text:p>(IF YES):</text:p>
            <text:p>Provide instructions.</text:p>
          </table:table-cell>
          <table:table-cell table:style-name="ce43" office:value-type="string" calcext:value-type="string">
            <text:p>Is an emergency contact available for delivery exceptions?</text:p>
          </table:table-cell>
          <table:table-cell table:style-name="ce43" office:value-type="string" calcext:value-type="string">
            <text:p>(IF YES):</text:p>
            <text:p>Provide name and 24/7 phone number.</text:p>
          </table:table-cell>
          <table:table-cell table:style-name="ce43" office:value-type="string" calcext:value-type="string">
            <text:p>(IF YES):</text:p>
            <text:p>Specify dimensions/capacity if known.</text:p>
          </table:table-cell>
          <table:table-cell table:style-name="ce43" office:value-type="string" calcext:value-type="string">
            <text:p>(IF YES):</text:p>
            <text:p>Specify service.</text:p>
          </table:table-cell>
          <table:table-cell table:style-name="ce43" office:value-type="string" calcext:value-type="string">
            <text:p>(IF NO):</text:p>
            <text:p>Specify obstacles.</text:p>
          </table:table-cell>
          <table:table-cell table:style-name="ce43" office:value-type="string" calcext:value-type="string">
            <text:p>Are there stairs or ramps en route to the equipment room?</text:p>
          </table:table-cell>
          <table:table-cell table:style-name="ce43" office:value-type="string" calcext:value-type="string">
            <text:p>Is the receiving area indoors or outdoors?</text:p>
          </table:table-cell>
          <table:table-cell table:style-name="ce43" office:value-type="string" calcext:value-type="string">
            <text:p>Is protective floor covering required for rolling equipment?</text:p>
          </table:table-cell>
          <table:table-cell table:style-name="ce43" office:value-type="string" calcext:value-type="string">
            <text:p>Is there a designated area for unpacking/pallet breakdown?</text:p>
          </table:table-cell>
          <table:table-cell table:style-name="ce43" office:value-type="string" calcext:value-type="string">
            <text:p>(IF YES):</text:p>
            <text:p>Specify duration/conditions.</text:p>
          </table:table-cell>
          <table:table-cell table:style-name="ce43" office:value-type="string" calcext:value-type="string">
            <text:p>Is disposal service for packaging waste provided onsite?</text:p>
          </table:table-cell>
          <table:table-cell table:style-name="ce43" office:value-type="string" calcext:value-type="string">
            <text:p>Are there any hazardous material restrictions?</text:p>
          </table:table-cell>
          <table:table-cell table:style-name="ce43" office:value-type="string" calcext:value-type="string">
            <text:p>(IF YES):</text:p>
            <text:p>Describe.</text:p>
          </table:table-cell>
          <table:table-cell table:style-name="ce43" office:value-type="string" calcext:value-type="string">
            <text:p>Is documentation (e.g., commercial invoice, customs paperwork) required on arrival?</text:p>
          </table:table-cell>
          <table:table-cell table:style-name="ce43" office:value-type="string" calcext:value-type="string">
            <text:p>Is prior customs clearance mandatory before delivery?</text:p>
          </table:table-cell>
          <table:table-cell table:style-name="ce43" office:value-type="string" calcext:value-type="string">
            <text:p>Are there any embargoed or restricted items at this site?</text:p>
          </table:table-cell>
          <table:table-cell table:style-name="ce43" office:value-type="string" calcext:value-type="string">
            <text:p>(IF YES):</text:p>
            <text:p>List items.</text:p>
          </table:table-cell>
          <table:table-cell table:style-name="ce43" office:value-type="string" calcext:value-type="string">
            <text:p>(IF YES):</text:p>
            <text:p>Provide the lead contact.</text:p>
          </table:table-cell>
          <table:table-cell table:number-columns-repeated="973"/>
        </table:table-row>
        <table:table-row table:style-name="ro1">
          <table:table-cell table:style-name="ce44" office:value-type="string" calcext:value-type="string">
            <text:p>CA-GAL01</text:p>
          </table:table-cell>
          <table:table-cell table:style-name="ce44" office:value-type="string" calcext:value-type="string">
            <text:p>Liam Jones</text:p>
          </table:table-cell>
          <table:table-cell table:style-name="ce44" table:content-validation-name="val2" office:value-type="string" calcext:value-type="string">
            <text:p>Ismailyn Bonilla</text:p>
          </table:table-cell>
          <table:table-cell table:style-name="ce44" office:value-type="string" calcext:value-type="string">
            <text:p>17 Vondrau Dr, Cambridge, ON N3E 1A6</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3" table:style-name="ce44" office:value-type="string" calcext:value-type="string">
            <text:p>Yes</text:p>
          </table:table-cell>
          <table:table-cell table:style-name="ce44" office:value-type="string" calcext:value-type="string">
            <text:p>safety vest, safety shoes, hard hat, and safety glasses</text:p>
          </table:table-cell>
          <table:table-cell table:style-name="ce44" office:value-type="string" calcext:value-type="string">
            <text:p>No</text:p>
          </table:table-cell>
          <table:table-cell table:style-name="ce44" office:value-type="string" calcext:value-type="string">
            <text:p>Yes</text:p>
          </table:table-cell>
          <table:table-cell table:number-columns-repeated="4" table:style-name="ce44" office:value-type="string" calcext:value-type="string">
            <text:p>No</text:p>
          </table:table-cell>
          <table:table-cell table:number-columns-repeated="2" table:style-name="ce44" office:value-type="string" calcext:value-type="string">
            <text:p>Yes</text:p>
          </table:table-cell>
          <table:table-cell table:style-name="ce44" office:value-type="float" office:value="4376612624" calcext:value-type="float">
            <text:p>4376612624</text:p>
          </table:table-cell>
          <table:table-cell table:style-name="ce44" office:value-type="string" calcext:value-type="string">
            <text:p>ibonilla@coreweave.com</text:p>
          </table:table-cell>
          <table:table-cell table:style-name="ce44"/>
          <table:table-cell table:style-name="ce44" office:value-type="string" calcext:value-type="string">
            <text:p>Yes</text:p>
          </table:table-cell>
          <table:table-cell table:style-name="ce44" office:value-type="string" calcext:value-type="string">
            <text:p>8:00AM- 4:00PM/Monday-Friday </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3"/>
          <table:table-cell table:style-name="ce44" office:value-type="string" calcext:value-type="string">
            <text:p>We are currently under construction, and there are people and heavy equipment working on-site. Building personnel must guide the driver for parking</text:p>
          </table:table-cell>
          <table:table-cell table:style-name="ce44" office:value-type="string" calcext:value-type="string">
            <text:p>No</text:p>
          </table:table-cell>
          <table:table-cell table:style-name="ce44" office:value-type="string" calcext:value-type="string">
            <text:p>Indoor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float" office:value="2262180745" calcext:value-type="float">
            <text:p>2262180745</text:p>
          </table:table-cell>
          <table:table-cell table:number-columns-repeated="973"/>
        </table:table-row>
        <table:table-row table:style-name="ro1">
          <table:table-cell table:style-name="ce45" office:value-type="string" calcext:value-type="string">
            <text:p>ES-BCN01</text:p>
          </table:table-cell>
          <table:table-cell table:style-name="ce45" office:value-type="string" calcext:value-type="string">
            <text:p>Rhys Lopez-Lloyd</text:p>
          </table:table-cell>
          <table:table-cell table:style-name="ce45" table:content-validation-name="val2" office:value-type="string" calcext:value-type="string">
            <text:p>Ezequiel Ramos Vertiz</text:p>
          </table:table-cell>
          <table:table-cell table:style-name="ce45" office:value-type="string" calcext:value-type="string">
            <text:p>Carretera de la Santa Creu de Calafell, 99 08830 Sant Boi de Llobregat, España</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Access requests must be submitted through the site’s portal. The required information includes ID number, entry and exit times, and the specific areas for which access is needed.</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Safety vest, safety shoes</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number-columns-repeated="3" table:style-name="ce45" office:value-type="string" calcext:value-type="string">
            <text:p>No</text:p>
          </table:table-cell>
          <table:table-cell table:style-name="ce45" office:value-type="string" calcext:value-type="string">
            <text:p>+34 611846343</text:p>
          </table:table-cell>
          <table:table-cell table:style-name="ce45" office:value-type="string" calcext:value-type="string">
            <text:p>eramosvertiz@coreweave.com</text:p>
          </table:table-cell>
          <table:table-cell table:style-name="ce45" office:value-type="string" calcext:value-type="string">
            <text:p>24hr</text:p>
          </table:table-cell>
          <table:table-cell table:style-name="ce45" office:value-type="string" calcext:value-type="string">
            <text:p>Yes</text:p>
          </table:table-cell>
          <table:table-cell table:style-name="ce45" office:value-type="string" calcext:value-type="string">
            <text:p>Delivery reception from 6am to 8pm.</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table-cell table:style-name="ce45" office:value-type="string" calcext:value-type="string">
            <text:p>2,50m x 2,50m</text:p>
          </table:table-cell>
          <table:table-cell table:style-name="ce45" table:number-columns-repeated="2"/>
          <table:table-cell table:style-name="ce45" office:value-type="string" calcext:value-type="string">
            <text:p>No</text:p>
          </table:table-cell>
          <table:table-cell table:style-name="ce45" office:value-type="string" calcext:value-type="string">
            <text:p>Outdoors</text:p>
          </table:table-cell>
          <table:table-cell table:number-columns-repeated="2" table:style-name="ce45" office:value-type="string" calcext:value-type="string">
            <text:p>No</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ES-BCN03</text:p>
          </table:table-cell>
          <table:table-cell table:style-name="ce44" office:value-type="string" calcext:value-type="string">
            <text:p>Rhys Lopez-Lloyd</text:p>
          </table:table-cell>
          <table:table-cell table:style-name="ce44" table:content-validation-name="val2" office:value-type="string" calcext:value-type="string">
            <text:p>Ezequiel Ramos Vertiz</text:p>
          </table:table-cell>
          <table:table-cell table:style-name="ce44" office:value-type="string" calcext:value-type="string">
            <text:p>Calle 25, nº6, Parc Logístic de la Zona Franca - 08040 - Barcelona - Spain</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Access must be requested through the site’s portal. The following information must be provided: ID number, entry and exit times, and the areas that require access.</text:p>
          </table:table-cell>
          <table:table-cell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safety shoes, safety vest. </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34 611846343</text:p>
          </table:table-cell>
          <table:table-cell table:style-name="ce44" office:value-type="string" calcext:value-type="string">
            <text:p>eramosvertiz@coreweave.com</text:p>
          </table:table-cell>
          <table:table-cell table:style-name="ce44" office:value-type="string" calcext:value-type="string">
            <text:p>24 hours</text:p>
          </table:table-cell>
          <table:table-cell table:style-name="ce44" office:value-type="string" calcext:value-type="string">
            <text:p>Yes</text:p>
          </table:table-cell>
          <table:table-cell table:style-name="ce44" office:value-type="string" calcext:value-type="string">
            <text:p>The site is open to receive deliveries 24/7; however, CW personnel are available on-site from 6 am to 8 pm</text:p>
          </table:table-cell>
          <table:table-cell table:number-columns-repeated="2" table:style-name="ce44" office:value-type="string" calcext:value-type="string">
            <text:p>Yes</text:p>
          </table:table-cell>
          <table:table-cell table:style-name="ce44"/>
          <table:table-cell table:style-name="ce44" office:value-type="string" calcext:value-type="string">
            <text:p>No</text:p>
          </table:table-cell>
          <table:table-cell table:style-name="ce44" office:value-type="string" calcext:value-type="string">
            <text:p>Inbound deliveries must be scheduled by creating a ticket in the site’s platform.</text:p>
          </table:table-cell>
          <table:table-cell table:style-name="ce44" office:value-type="string" calcext:value-type="string">
            <text:p>3m x 2,5m</text:p>
          </table:table-cell>
          <table:table-cell table:style-name="ce44" table:number-columns-repeated="2"/>
          <table:table-cell table:style-name="ce44" office:value-type="string" calcext:value-type="string">
            <text:p>No</text:p>
          </table:table-cell>
          <table:table-cell table:style-name="ce44" office:value-type="string" calcext:value-type="string">
            <text:p>Indoors</text:p>
          </table:table-cell>
          <table:table-cell table:number-columns-repeated="2" table:style-name="ce44" office:value-type="string" calcext:value-type="string">
            <text:p>No</text:p>
          </table:table-cell>
          <table:table-cell table:style-name="ce44" office:value-type="string" calcext:value-type="string">
            <text:p>until next business day </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GB-CWY01</text:p>
          </table:table-cell>
          <table:table-cell table:style-name="ce45" office:value-type="string" calcext:value-type="string">
            <text:p>Rhys Lopez-Lloyd</text:p>
          </table:table-cell>
          <table:table-cell table:style-name="ce45" table:content-validation-name="val2" office:value-type="string" calcext:value-type="string">
            <text:p>Diego Monroy</text:p>
          </table:table-cell>
          <table:table-cell table:style-name="ce45" office:value-type="string" calcext:value-type="string">
            <text:p>Digital Realty, Unit 2, Connect Way, Crawley, RH10 9BD</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This is a yes, ONLY if for whatever reason the delivery team needs enter into the main building. If they are delivering to the loading bay and staying in the loading bay, there is no security badge/clearance needed.</text:p>
          </table:table-cell>
          <table:table-cell table:number-columns-repeated="3"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style-name="ce45" table:formula="of:=447512250887" office:value-type="float" office:value="447512250887" calcext:value-type="float">
            <text:p>447512250887</text:p>
          </table:table-cell>
          <table:table-cell table:style-name="ce45" office:value-type="string" calcext:value-type="string">
            <text:p>dmonroy@coreweave.com</text:p>
          </table:table-cell>
          <table:table-cell table:style-name="ce45" office:value-type="string" calcext:value-type="string">
            <text:p>24 hours</text:p>
          </table:table-cell>
          <table:table-cell table:style-name="ce45" office:value-type="string" calcext:value-type="string">
            <text:p>Yes</text:p>
          </table:table-cell>
          <table:table-cell table:style-name="ce45" office:value-type="string" calcext:value-type="string">
            <text:p>09:00 - 18:00</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2"/>
          <table:table-cell table:style-name="ce45" office:value-type="string" calcext:value-type="string">
            <text:p>As no forklift, all delivery vehicles require a tail lift, if not an artic lorry that can pull up to the loading bay fold out ramp.</text:p>
          </table:table-cell>
          <table:table-cell table:style-name="ce45"/>
          <table:table-cell table:style-name="ce45" office:value-type="string" calcext:value-type="string">
            <text:p>No</text:p>
          </table:table-cell>
          <table:table-cell table:style-name="ce45" office:value-type="string" calcext:value-type="string">
            <text:p>Indoor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number-columns-repeated="3"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GB-PPL01</text:p>
          </table:table-cell>
          <table:table-cell table:style-name="ce44" office:value-type="string" calcext:value-type="string">
            <text:p>Rhys Lopez-Lloyd</text:p>
          </table:table-cell>
          <table:table-cell table:style-name="ce44" table:content-validation-name="val2" office:value-type="string" calcext:value-type="string">
            <text:p>Scott Hall</text:p>
          </table:table-cell>
          <table:table-cell table:style-name="ce44" office:value-type="string" calcext:value-type="string">
            <text:p>3 Nutmeg Lane, London, E14 2AX</text:p>
          </table:table-cell>
          <table:table-cell table:style-name="ce44" office:value-type="string" calcext:value-type="string">
            <text:p>No</text:p>
          </table:table-cell>
          <table:table-cell table:style-name="ce44" table:number-columns-repeated="2"/>
          <table:table-cell table:number-columns-repeated="2" table:style-name="ce44" office:value-type="string" calcext:value-type="string">
            <text:p>No</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table-cell table:style-name="ce44" office:value-type="string" calcext:value-type="string">
            <text:p>No</text:p>
          </table:table-cell>
          <table:table-cell table:number-columns-repeated="5"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07504956434</text:p>
          </table:table-cell>
          <table:table-cell table:style-name="ce44" office:value-type="string" calcext:value-type="string">
            <text:p>shall@coreweave.com</text:p>
          </table:table-cell>
          <table:table-cell table:style-name="ce44" office:value-type="string" calcext:value-type="string">
            <text:p>3 days. </text:p>
          </table:table-cell>
          <table:table-cell table:style-name="ce44" office:value-type="string" calcext:value-type="string">
            <text:p>Yes</text:p>
          </table:table-cell>
          <table:table-cell table:style-name="ce44" office:value-type="string" calcext:value-type="string">
            <text:p>08:00 - 17:00</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2"/>
          <table:table-cell table:style-name="ce44" office:value-type="string" calcext:value-type="string">
            <text:p>Tail lift on the lorry.</text:p>
          </table:table-cell>
          <table:table-cell table:style-name="ce44"/>
          <table:table-cell table:style-name="ce44" office:value-type="string" calcext:value-type="string">
            <text:p>No</text:p>
          </table:table-cell>
          <table:table-cell table:style-name="ce44" office:value-type="string" calcext:value-type="string">
            <text:p>Both</text:p>
          </table:table-cell>
          <table:table-cell table:number-columns-repeated="2" table:style-name="ce44" office:value-type="string" calcext:value-type="string">
            <text:p>No</text:p>
          </table:table-cell>
          <table:table-cell table:style-name="ce44" office:value-type="string" calcext:value-type="string">
            <text:p>This depends on how much material is already down there, if the loading bay is full then the answer is no. I need to ask in advance and reserve, this is only for a small amount and they cannot store more than a few pallets. </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NO-OVO01</text:p>
          </table:table-cell>
          <table:table-cell table:style-name="ce45" office:value-type="string" calcext:value-type="string">
            <text:p>Rhys Lopez-Lloyd</text:p>
          </table:table-cell>
          <table:table-cell table:style-name="ce45" table:content-validation-name="val2" office:value-type="string" calcext:value-type="string">
            <text:p>George Agbo</text:p>
          </table:table-cell>
          <table:table-cell table:style-name="ce45" office:value-type="string" calcext:value-type="string">
            <text:p>Stølevegen 39, 4715 Øvrebø, Norway </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3" table:style-name="ce45" office:value-type="string" calcext:value-type="string">
            <text:p>Yes</text:p>
          </table:table-cell>
          <table:table-cell table:style-name="ce45" office:value-type="string" calcext:value-type="string">
            <text:p>Small vehicles and busses are not well fitted <text:s/></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3" table:style-name="ce45" office:value-type="string" calcext:value-type="string">
            <text:p>No</text:p>
          </table:table-cell>
          <table:table-cell table:style-name="ce45"/>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4747472941</text:p>
          </table:table-cell>
          <table:table-cell table:style-name="ce45" office:value-type="string" calcext:value-type="string">
            <text:p>gagbo@coreweave.com</text:p>
          </table:table-cell>
          <table:table-cell table:style-name="ce45" office:value-type="string" calcext:value-type="string">
            <text:p>24 hours</text:p>
          </table:table-cell>
          <table:table-cell table:style-name="ce45" office:value-type="string" calcext:value-type="string">
            <text:p>Yes</text:p>
          </table:table-cell>
          <table:table-cell table:style-name="ce45" office:value-type="string" calcext:value-type="string">
            <text:p>08:00 - 17:00 CET</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Yes</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Schertz TX - 3PL</text:p>
          </table:table-cell>
          <table:table-cell table:style-name="ce44" office:value-type="string" calcext:value-type="string">
            <text:p>Jesus Robles</text:p>
          </table:table-cell>
          <table:table-cell table:style-name="ce44" table:content-validation-name="val2" office:value-type="string" calcext:value-type="string">
            <text:p>Jesse Flores</text:p>
          </table:table-cell>
          <table:table-cell table:style-name="ce44" office:value-type="string" calcext:value-type="string">
            <text:p>17745 Lookout Rd Bldg 5 Ste 540 Schertz, TX 78154</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Badges required for front door entrance, background checks for driver's required to be sent to Expeditor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Hard hat, safety vests</text:p>
          </table:table-cell>
          <table:table-cell table:number-columns-repeated="2"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float" office:value="9734876940" calcext:value-type="float">
            <text:p>9734876940</text:p>
          </table:table-cell>
          <table:table-cell table:style-name="ce44" office:value-type="string" calcext:value-type="string">
            <text:p>jflores@coreweave.com</text:p>
          </table:table-cell>
          <table:table-cell table:style-name="ce44" office:value-type="string" calcext:value-type="string">
            <text:p>24 Hour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Contact Chris DeMont about emergencies or after hour shipments.</text:p>
          </table:table-cell>
          <table:table-cell table:style-name="ce44" office:value-type="string" calcext:value-type="string">
            <text:p>Yes</text:p>
          </table:table-cell>
          <table:table-cell table:style-name="ce44" office:value-type="string" calcext:value-type="string">
            <text:p>Chris DeMont (210-315-6862)</text:p>
          </table:table-cell>
          <table:table-cell table:style-name="ce44" table:number-columns-repeated="3"/>
          <table:table-cell table:style-name="ce44" office:value-type="string" calcext:value-type="string">
            <text:p>No</text:p>
          </table:table-cell>
          <table:table-cell table:style-name="ce44" office:value-type="string" calcext:value-type="string">
            <text:p>Both</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Space laied out on the receiving area.</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Yes</text:p>
          </table:table-cell>
          <table:table-cell table:style-name="ce44" office:value-type="string" calcext:value-type="string">
            <text:p>Items strictly for certain sites and/or internal transfers.</text:p>
          </table:table-cell>
          <table:table-cell table:style-name="ce44"/>
          <table:table-cell table:number-columns-repeated="973"/>
        </table:table-row>
        <table:table-row table:style-name="ro1">
          <table:table-cell table:style-name="ce45" office:value-type="string" calcext:value-type="string">
            <text:p>US-AAI01</text:p>
          </table:table-cell>
          <table:table-cell table:style-name="ce45" office:value-type="string" calcext:value-type="string">
            <text:p>Matt Whittle</text:p>
          </table:table-cell>
          <table:table-cell table:style-name="ce45" table:content-validation-name="val2" office:value-type="string" calcext:value-type="string">
            <text:p>Amanda Desir</text:p>
          </table:table-cell>
          <table:table-cell table:style-name="ce45" office:value-type="string" calcext:value-type="string">
            <text:p>4905 N Point Pkwy, Alpharetta, GA 30022</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There's a gate out front, in order to gain access security has to let you through. If you need badge access security will provide it at the front desk.</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470-201-9525</text:p>
          </table:table-cell>
          <table:table-cell table:style-name="ce45" office:value-type="string" calcext:value-type="string">
            <text:p>adesir@coreweave.com</text:p>
          </table:table-cell>
          <table:table-cell table:style-name="ce45"/>
          <table:table-cell table:style-name="ce45" office:value-type="string" calcext:value-type="string">
            <text:p>Yes</text:p>
          </table:table-cell>
          <table:table-cell table:style-name="ce45" office:value-type="string" calcext:value-type="string">
            <text:p>Monday-Friday 8am-7pm</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t will have to be arranged so someone can be onsite, we aren't a 24/7 facility.</text:p>
          </table:table-cell>
          <table:table-cell table:style-name="ce45" office:value-type="string" calcext:value-type="string">
            <text:p>Yes</text:p>
          </table:table-cell>
          <table:table-cell table:style-name="ce45" office:value-type="string" calcext:value-type="string">
            <text:p>Amanda Desir 862-505-3059/Kendall Lee 862-485-9395</text:p>
          </table:table-cell>
          <table:table-cell table:style-name="ce45" table:number-columns-repeated="3"/>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We have a secure storage area on the dock as well as in the building.</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ARQ01</text:p>
          </table:table-cell>
          <table:table-cell table:style-name="ce44" office:value-type="string" calcext:value-type="string">
            <text:p>Matt Whittle</text:p>
          </table:table-cell>
          <table:table-cell table:style-name="ce44" table:content-validation-name="val2" office:value-type="string" calcext:value-type="string">
            <text:p>Lane Gibson, Andrew Barnhart</text:p>
          </table:table-cell>
          <table:table-cell table:style-name="ce44" office:value-type="string" calcext:value-type="string">
            <text:p>155 Palmer Ln Marble NC 28905</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You must check in at the gate.</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hard hat, safety vest glasses </text:p>
          </table:table-cell>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float" office:value="7708831746" calcext:value-type="float">
            <text:p>7708831746</text:p>
          </table:table-cell>
          <table:table-cell table:style-name="ce44" office:value-type="string" calcext:value-type="string">
            <text:p>LGIBSON@COREWEAVE.COM</text:p>
          </table:table-cell>
          <table:table-cell table:style-name="ce44"/>
          <table:table-cell table:style-name="ce44" office:value-type="string" calcext:value-type="string">
            <text:p>Yes</text:p>
          </table:table-cell>
          <table:table-cell table:style-name="ce44" office:value-type="string" calcext:value-type="string">
            <text:p>Deliveries from 8-4 EST MON-FRI.</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4"/>
          <table:table-cell table:style-name="ce44" office:value-type="string" calcext:value-type="string">
            <text:p>Yes</text:p>
          </table:table-cell>
          <table:table-cell table:style-name="ce44" office:value-type="string" calcext:value-type="string">
            <text:p>Indoors</text:p>
          </table:table-cell>
          <table:table-cell table:number-columns-repeated="2" table:style-name="ce44" office:value-type="string" calcext:value-type="string">
            <text:p>No</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AUS01</text:p>
          </table:table-cell>
          <table:table-cell table:style-name="ce45" office:value-type="string" calcext:value-type="string">
            <text:p>Jesus Robles</text:p>
          </table:table-cell>
          <table:table-cell table:style-name="ce45" table:content-validation-name="val2" office:value-type="string" calcext:value-type="string">
            <text:p>Brady Bonario</text:p>
          </table:table-cell>
          <table:table-cell table:style-name="ce45" office:value-type="string" calcext:value-type="string">
            <text:p>3301 Hibbetts Rd <text:s/>Austin, TX 78725</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 Coreweave employees ) Must get approval before coming on site from either Coreweave security team or DCM through submitted ticket on jira</text:p>
          </table:table-cell>
          <table:table-cell table:number-columns-repeated="3"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832-605-5234</text:p>
          </table:table-cell>
          <table:table-cell table:style-name="ce45" office:value-type="string" calcext:value-type="string">
            <text:p>bbonario@coreweave.com</text:p>
          </table:table-cell>
          <table:table-cell table:style-name="ce45" office:value-type="string" calcext:value-type="string">
            <text:p>7:30am - 3:30pm</text:p>
          </table:table-cell>
          <table:table-cell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number-columns-repeated="2" table:style-name="ce45" office:value-type="string" calcext:value-type="string">
            <text:p>Yes</text:p>
          </table:table-cell>
          <table:table-cell table:style-name="ce45" office:value-type="string" calcext:value-type="string">
            <text:p>In either storage area on site.</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6">
          <table:table-cell table:style-name="ce44" office:value-type="string" calcext:value-type="string">
            <text:p>US-BVI01</text:p>
          </table:table-cell>
          <table:table-cell table:style-name="ce44" office:value-type="string" calcext:value-type="string">
            <text:p>Liam Jones</text:p>
          </table:table-cell>
          <table:table-cell table:style-name="ce44" table:content-validation-name="val2" office:value-type="string" calcext:value-type="string">
            <text:p>Jonathan Clemente</text:p>
          </table:table-cell>
          <table:table-cell table:style-name="ce44" office:value-type="string" calcext:value-type="string">
            <text:p>9999 Hamilton Blvd, TekPark Bld #4 Breinigsville, PA 18031</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DCM needs to put in a ticket before anyone can be on site that is new. </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Y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862-485-8887</text:p>
          </table:table-cell>
          <table:table-cell table:style-name="ce44" office:value-type="string" calcext:value-type="string">
            <text:p>jclemente@coreweave.com</text:p>
          </table:table-cell>
          <table:table-cell table:style-name="ce44"/>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One would need to contact the building beforehand/while on route to make sure the back dock has an employee to receive it. The other option would be to pull up and then use the call button/station on the side of the building. It would also be recommended that the ON-CALL DCT be contacted to come in and provide assistance. </text:p>
            <text:p>Contact information for building - TierPoint On Call # (610) 691-8811; (610) 691-3240</text:p>
          </table:table-cell>
          <table:table-cell table:style-name="ce44" office:value-type="string" calcext:value-type="string">
            <text:p>Yes</text:p>
          </table:table-cell>
          <table:table-cell table:style-name="ce44" office:value-type="string" calcext:value-type="string">
            <text:p>TierPoint On Call # (610) 691-8811; (610) 691-3240 </text:p>
          </table:table-cell>
          <table:table-cell table:style-name="ce44" office:value-type="string" calcext:value-type="string">
            <text:p>6 feet wide - just under 9 feet Long</text:p>
          </table:table-cell>
          <table:table-cell table:style-name="ce44" table:number-columns-repeated="2"/>
          <table:table-cell table:style-name="ce44" office:value-type="string" calcext:value-type="string">
            <text:p>Yes</text:p>
          </table:table-cell>
          <table:table-cell table:style-name="ce44" office:value-type="string" calcext:value-type="string">
            <text:p>Indoors</text:p>
          </table:table-cell>
          <table:table-cell table:number-columns-repeated="2" table:style-name="ce44" office:value-type="string" calcext:value-type="string">
            <text:p>No</text:p>
          </table:table-cell>
          <table:table-cell table:style-name="ce44" office:value-type="string" calcext:value-type="string">
            <text:p>Varies on how many pallets and other clients in the building - reach out to DCM for better specifics </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CDZ01</text:p>
          </table:table-cell>
          <table:table-cell table:style-name="ce45" office:value-type="string" calcext:value-type="string">
            <text:p>Liam Jones</text:p>
          </table:table-cell>
          <table:table-cell table:style-name="ce45" table:content-validation-name="val2" office:value-type="string" calcext:value-type="string">
            <text:p>Jabbar Mendez</text:p>
          </table:table-cell>
          <table:table-cell table:style-name="ce45" office:value-type="string" calcext:value-type="string">
            <text:p>6100 E. Paris Ave SE Caledonia,MI 49316</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Safety shoes and some areas you will need hard and vest</text:p>
          </table:table-cell>
          <table:table-cell table:number-columns-repeated="2" table:style-name="ce45" office:value-type="string" calcext:value-type="string">
            <text:p>Yes</text:p>
          </table:table-cell>
          <table:table-cell table:number-columns-repeated="3"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float" office:value="9734419464" calcext:value-type="float">
            <text:p>9734419464</text:p>
          </table:table-cell>
          <table:table-cell table:style-name="ce45" office:value-type="string" calcext:value-type="string">
            <text:p>Jmendez@coreweave.com</text:p>
          </table:table-cell>
          <table:table-cell table:style-name="ce45"/>
          <table:table-cell table:style-name="ce45" office:value-type="string" calcext:value-type="string">
            <text:p>Yes</text:p>
          </table:table-cell>
          <table:table-cell table:style-name="ce45" office:value-type="string" calcext:value-type="string">
            <text:p>M-F 8:00am-2:30pm</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number-columns-repeated="2" table:style-name="ce45" office:value-type="string" calcext:value-type="string">
            <text:p>Yes</text:p>
          </table:table-cell>
          <table:table-cell table:style-name="ce45" office:value-type="string" calcext:value-type="string">
            <text:p>We will be charged a fee per pallet</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CMH01</text:p>
          </table:table-cell>
          <table:table-cell table:style-name="ce44" office:value-type="string" calcext:value-type="string">
            <text:p>Liam Jones</text:p>
          </table:table-cell>
          <table:table-cell table:style-name="ce44" table:content-validation-name="val2" office:value-type="string" calcext:value-type="string">
            <text:p>Jared Varkonda</text:p>
          </table:table-cell>
          <table:table-cell table:style-name="ce44" office:value-type="string" calcext:value-type="string">
            <text:p>7500 Alta View Blvd Columbus OH 43085</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614-330-1710</text:p>
          </table:table-cell>
          <table:table-cell table:style-name="ce44" office:value-type="string" calcext:value-type="string">
            <text:p>JVarkonda@CoreWeave.com</text:p>
          </table:table-cell>
          <table:table-cell table:style-name="ce44"/>
          <table:table-cell table:style-name="ce44" office:value-type="string" calcext:value-type="string">
            <text:p>No</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4"/>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CSZ01</text:p>
          </table:table-cell>
          <table:table-cell table:style-name="ce45" office:value-type="string" calcext:value-type="string">
            <text:p>Matt Whittle</text:p>
          </table:table-cell>
          <table:table-cell table:style-name="ce45" table:content-validation-name="val2" office:value-type="string" calcext:value-type="string">
            <text:p>Angel Rosado</text:p>
          </table:table-cell>
          <table:table-cell table:style-name="ce45" office:value-type="string" calcext:value-type="string">
            <text:p>1401 Meadowville Tech pkwy chester, 23836, VA, United States</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4" table:style-name="ce45" office:value-type="string" calcext:value-type="string">
            <text:p>Yes</text:p>
          </table:table-cell>
          <table:table-cell table:style-name="ce45" office:value-type="float" office:value="8139431104" calcext:value-type="float">
            <text:p>8139431104</text:p>
          </table:table-cell>
          <table:table-cell table:style-name="ce45" office:value-type="string" calcext:value-type="string">
            <text:p>arosado@coreweave.com</text:p>
          </table:table-cell>
          <table:table-cell table:style-name="ce45"/>
          <table:table-cell table:style-name="ce45" office:value-type="string" calcext:value-type="string">
            <text:p>Yes</text:p>
          </table:table-cell>
          <table:table-cell table:style-name="ce45" office:value-type="string" calcext:value-type="string">
            <text:p>8pm-8am</text:p>
          </table:table-cell>
          <table:table-cell table:number-columns-repeated="2" table:style-name="ce45" office:value-type="string" calcext:value-type="string">
            <text:p>No</text:p>
          </table:table-cell>
          <table:table-cell table:style-name="ce45"/>
          <table:table-cell table:style-name="ce45" office:value-type="string" calcext:value-type="string">
            <text:p>Yes</text:p>
          </table:table-cell>
          <table:table-cell table:style-name="ce45" office:value-type="string" calcext:value-type="string">
            <text:p>Angel Rosado 813-943-1104</text:p>
          </table:table-cell>
          <table:table-cell table:style-name="ce45" table:number-columns-repeated="3"/>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Ernesto Padilla</text:p>
          </table:table-cell>
          <table:table-cell table:number-columns-repeated="973"/>
        </table:table-row>
        <table:table-row table:style-name="ro1">
          <table:table-cell table:style-name="ce44" office:value-type="string" calcext:value-type="string">
            <text:p>US-CVG01</text:p>
          </table:table-cell>
          <table:table-cell table:style-name="ce44" office:value-type="string" calcext:value-type="string">
            <text:p>Liam Jones</text:p>
          </table:table-cell>
          <table:table-cell table:style-name="ce44" table:content-validation-name="val2" office:value-type="string" calcext:value-type="string">
            <text:p>Alissah Wiles</text:p>
          </table:table-cell>
          <table:table-cell table:style-name="ce44" office:value-type="string" calcext:value-type="string">
            <text:p>401 Kingsview Dr, Lebanon, Ohio 45036</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3" table:style-name="ce44" office:value-type="string" calcext:value-type="string">
            <text:p>Yes</text:p>
          </table:table-cell>
          <table:table-cell table:style-name="ce44" office:value-type="string" calcext:value-type="string">
            <text:p>Regular restrictions</text:p>
          </table:table-cell>
          <table:table-cell table:number-columns-repeated="2" table:style-name="ce44" office:value-type="string" calcext:value-type="string">
            <text:p>Yes</text:p>
          </table:table-cell>
          <table:table-cell table:style-name="ce44" office:value-type="string" calcext:value-type="string">
            <text:p>Manager must put in a ticket with security.</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Yes</text:p>
          </table:table-cell>
          <table:table-cell table:style-name="ce44" office:value-type="string" calcext:value-type="string">
            <text:p>No</text:p>
          </table:table-cell>
          <table:table-cell table:number-columns-repeated="4" table:style-name="ce44" office:value-type="string" calcext:value-type="string">
            <text:p>Yes</text:p>
          </table:table-cell>
          <table:table-cell table:style-name="ce44" office:value-type="float" office:value="8627461479" calcext:value-type="float">
            <text:p>8627461479</text:p>
          </table:table-cell>
          <table:table-cell table:style-name="ce44" office:value-type="string" calcext:value-type="string">
            <text:p>awiles@coreweave.com</text:p>
          </table:table-cell>
          <table:table-cell table:style-name="ce44" office:value-type="string" calcext:value-type="string">
            <text:p>7am-5pm Monday- Friday</text:p>
          </table:table-cell>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style-name="ce44" office:value-type="string" calcext:value-type="string">
            <text:p>Yes</text:p>
          </table:table-cell>
          <table:table-cell table:style-name="ce44" office:value-type="string" calcext:value-type="string">
            <text:p>18662978766 - Cyrus 1</text:p>
          </table:table-cell>
          <table:table-cell table:style-name="ce44" table:number-columns-repeated="3"/>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24/7</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Alfred Nyamusa, Alissah Wiles, Vayan Adams</text:p>
          </table:table-cell>
          <table:table-cell table:number-columns-repeated="973"/>
        </table:table-row>
        <table:table-row table:style-name="ro1">
          <table:table-cell table:style-name="ce45" office:value-type="string" calcext:value-type="string">
            <text:p>US-CVY01</text:p>
          </table:table-cell>
          <table:table-cell table:style-name="ce45" office:value-type="string" calcext:value-type="string">
            <text:p>Matt Whittle</text:p>
          </table:table-cell>
          <table:table-cell table:style-name="ce45" table:content-validation-name="val2" office:value-type="string" calcext:value-type="string">
            <text:p>Shantanell Robinson</text:p>
          </table:table-cell>
          <table:table-cell table:style-name="ce45" office:value-type="string" calcext:value-type="string">
            <text:p>250 Burlington Drive, Clarksville VA</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office:value-type="string" calcext:value-type="string">
            <text:p>No, Unless delivery drivers need to access inside the building. Standard security procedures would then need to be followed.</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number-columns-repeated="5" table:style-name="ce45" office:value-type="string" calcext:value-type="string">
            <text:p>No</text:p>
          </table:table-cell>
          <table:table-cell table:style-name="ce45" office:value-type="string" calcext:value-type="string">
            <text:p>Yes</text:p>
          </table:table-cell>
          <table:table-cell table:style-name="ce45" office:value-type="float" office:value="8623251404" calcext:value-type="float">
            <text:p>8623251404</text:p>
          </table:table-cell>
          <table:table-cell table:style-name="ce45" office:value-type="string" calcext:value-type="string">
            <text:p>srobinson@coreweave.com</text:p>
          </table:table-cell>
          <table:table-cell table:style-name="ce45"/>
          <table:table-cell table:style-name="ce45" office:value-type="string" calcext:value-type="string">
            <text:p>Yes</text:p>
          </table:table-cell>
          <table:table-cell table:style-name="ce45" office:value-type="string" calcext:value-type="string">
            <text:p>8am-4pm</text:p>
          </table:table-cell>
          <table:table-cell table:number-columns-repeated="2" table:style-name="ce45" office:value-type="string" calcext:value-type="string">
            <text:p>No</text:p>
          </table:table-cell>
          <table:table-cell table:style-name="ce45"/>
          <table:table-cell table:style-name="ce45" office:value-type="string" calcext:value-type="string">
            <text:p>Yes</text:p>
          </table:table-cell>
          <table:table-cell table:style-name="ce45" office:value-type="string" calcext:value-type="string">
            <text:p> 434-374-7091</text:p>
            <text:p>Onsite Security</text:p>
          </table:table-cell>
          <table:table-cell table:style-name="ce45" table:number-columns-repeated="2"/>
          <table:table-cell table:style-name="ce45" office:value-type="string" calcext:value-type="string">
            <text:p>Our dock delivery could be considered narrow for some.</text:p>
          </table:table-cell>
          <table:table-cell table:style-name="ce45" office:value-type="string" calcext:value-type="string">
            <text:p>No</text:p>
          </table:table-cell>
          <table:table-cell table:style-name="ce45" office:value-type="string" calcext:value-type="string">
            <text:p>Both</text:p>
          </table:table-cell>
          <table:table-cell table:number-columns-repeated="2" table:style-name="ce45" office:value-type="string" calcext:value-type="string">
            <text:p>Yes</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CYL01</text:p>
          </table:table-cell>
          <table:table-cell table:style-name="ce44" office:value-type="string" calcext:value-type="string">
            <text:p>Matt Whittle</text:p>
          </table:table-cell>
          <table:table-cell table:style-name="ce44" table:content-validation-name="val2" office:value-type="string" calcext:value-type="string">
            <text:p>Devin Felix</text:p>
          </table:table-cell>
          <table:table-cell table:style-name="ce44" office:value-type="string" calcext:value-type="string">
            <text:p>4030 Lafayette Center Drive Chantilly VA 20151</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number-columns-repeated="6" table:style-name="ce44" office:value-type="string" calcext:value-type="string">
            <text:p>No</text:p>
          </table:table-cell>
          <table:table-cell table:style-name="ce44" office:value-type="float" office:value="9733082559" calcext:value-type="float">
            <text:p>9733082559</text:p>
          </table:table-cell>
          <table:table-cell table:style-name="ce44" office:value-type="string" calcext:value-type="string">
            <text:p>dfelix@coreweave.com</text:p>
          </table:table-cell>
          <table:table-cell table:style-name="ce44"/>
          <table:table-cell table:style-name="ce44" office:value-type="string" calcext:value-type="string">
            <text:p>Yes</text:p>
          </table:table-cell>
          <table:table-cell table:style-name="ce44" office:value-type="string" calcext:value-type="string">
            <text:p>8AM-4PM</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3"/>
          <table:table-cell table:style-name="ce44" office:value-type="string" calcext:value-type="string">
            <text:p>Small doorways, tight corners. carpeted flooring, ramp into data hall.</text:p>
          </table:table-cell>
          <table:table-cell table:style-name="ce44" office:value-type="string" calcext:value-type="string">
            <text:p>Yes</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number-columns-repeated="2"/>
          <table:table-cell table:number-columns-repeated="973"/>
        </table:table-row>
        <table:table-row table:style-name="ro6">
          <table:table-cell table:style-name="ce45" office:value-type="string" calcext:value-type="string">
            <text:p>US-DGV01</text:p>
          </table:table-cell>
          <table:table-cell table:style-name="ce45" office:value-type="string" calcext:value-type="string">
            <text:p>Matt Whittle</text:p>
          </table:table-cell>
          <table:table-cell table:style-name="ce45" table:content-validation-name="val2" office:value-type="string" calcext:value-type="string">
            <text:p>Nehemiah Johnson</text:p>
          </table:table-cell>
          <table:table-cell table:style-name="ce45" office:value-type="string" calcext:value-type="string">
            <text:p>1700 North River road 30122 Lithia Springs</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eed an ID badge some require fingerprint scan and drivers licence to verify identity. Once a badge is obtained you must keep the badge in view at all times while within the building. </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float" office:value="9733082049" calcext:value-type="float">
            <text:p>9733082049</text:p>
          </table:table-cell>
          <table:table-cell table:style-name="ce45" office:value-type="string" calcext:value-type="string">
            <text:p>njohnsnon@coreweave.com</text:p>
          </table:table-cell>
          <table:table-cell table:style-name="ce45" office:value-type="string" calcext:value-type="string">
            <text:p>7:AM - 6:00PM</text:p>
          </table:table-cell>
          <table:table-cell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Customers must provide Flexential with advance notice of all equipment deliveries.</text:p>
            <text:p>▪ All shipping charges must be pre-paid by the customer.</text:p>
            <text:p>▪ If any equipment is delivered for a customer by a third party, Flexential will receive the equipment on behalf of the customer provided that the customer has pre-scheduled the delivery with Flexential. The customer must arrange for shipping crate or pallet removal.</text:p>
            <text:p>o The following information must be included with all equipment delivered to the facility. Failure to follow these instructions may result in delays locating stored packages: Flexential ticket number; customer's name and/or customer billing ID, if possible; and number of pieces shipped.</text:p>
            <text:p>o Upon receipt of any equipment delivered by a third party on a customer's behalf, Flexential will notify the customer of receipt and store the equipment</text:p>
            <text:p>▪ Customers must claim their equipment within 7 calendar days of notification of receipt by Flexential or storage charges will be charged to the customer at the then-current rates.</text:p>
            <text:p>▪ All equipment left in storage for more than 30 calendar days may be shipped back to the customer at the customer's expense.</text:p>
            <text:p>▪ Flexential is not responsible for loss or damage to customer equipment stored in the common areas of a Flexential facility or in transit or packaged and shipped by Flexential at Customer's request.</text:p>
            <text:p>▪ Flexential cannot guarantee storage space availability and will provide this service on a "reasonable efforts" basis.</text:p>
            <text:p>▪ Flexential package acceptance services do not include verifying the contents of a box or boxes. Centersquare (US-LHS01) has similar conditions.</text:p>
          </table:table-cell>
          <table:table-cell table:number-columns-repeated="2" table:style-name="ce45" office:value-type="string" calcext:value-type="string">
            <text:p>Yes</text:p>
          </table:table-cell>
          <table:table-cell table:style-name="ce45" office:value-type="string" calcext:value-type="string">
            <text:p>No cardboard or any material that can create dust are permitted in the data hall.</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DNN02</text:p>
          </table:table-cell>
          <table:table-cell table:style-name="ce44" office:value-type="string" calcext:value-type="string">
            <text:p>Matt Whittle</text:p>
          </table:table-cell>
          <table:table-cell table:style-name="ce44" table:content-validation-name="val2" office:value-type="string" calcext:value-type="string">
            <text:p>Reanna Moore, Ben Callahan, Otis Tate, Grady Martin</text:p>
          </table:table-cell>
          <table:table-cell table:style-name="ce44" office:value-type="string" calcext:value-type="string">
            <text:p>3351 Box Drive, Dalton, GA 30720</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office:value-type="string" calcext:value-type="string">
            <text:p>This will be in the future, not set up yet</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Safety vest, safety glasses , hearing protection</text:p>
          </table:table-cell>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style-name="ce44" office:value-type="float" office:value="8624852740" calcext:value-type="float">
            <text:p>8624852740</text:p>
          </table:table-cell>
          <table:table-cell table:style-name="ce44" office:value-type="string" calcext:value-type="string">
            <text:p>rmoore@coreweave.com</text:p>
          </table:table-cell>
          <table:table-cell table:style-name="ce44"/>
          <table:table-cell table:style-name="ce44" office:value-type="string" calcext:value-type="string">
            <text:p>Yes</text:p>
          </table:table-cell>
          <table:table-cell table:style-name="ce44" office:value-type="string" calcext:value-type="string">
            <text:p>8am - 4pm Mon - Fri</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4"/>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DTN01</text:p>
          </table:table-cell>
          <table:table-cell table:style-name="ce45" office:value-type="string" calcext:value-type="string">
            <text:p>Jesus Robles</text:p>
          </table:table-cell>
          <table:table-cell table:style-name="ce45" table:content-validation-name="val2" office:value-type="string" calcext:value-type="string">
            <text:p>Terry Simien, Arthur Tran, Jason Turek, Alyson McElroy, Jaylon Heller, Justin Czubas, Randall Gomez, My Bui</text:p>
          </table:table-cell>
          <table:table-cell table:style-name="ce45" office:value-type="string" calcext:value-type="string">
            <text:p>161 I-35E STE 131 DENTON, TX 76205</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Will need to scan your badge when accesing the building and any entry point to the warehouse</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if dealing with pallets or any material gloves are required</text:p>
          </table:table-cell>
          <table:table-cell table:number-columns-repeated="3" table:style-name="ce45" office:value-type="string" calcext:value-type="string">
            <text:p>Yes</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862-222-8672</text:p>
          </table:table-cell>
          <table:table-cell table:style-name="ce45" office:value-type="string" calcext:value-type="string">
            <text:p>dentonics@coreweave.com</text:p>
          </table:table-cell>
          <table:table-cell table:style-name="ce45"/>
          <table:table-cell table:style-name="ce45" office:value-type="string" calcext:value-type="string">
            <text:p>Yes</text:p>
          </table:table-cell>
          <table:table-cell table:style-name="ce45" office:value-type="string" calcext:value-type="string">
            <text:p>7pm/sun thru saturday</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Will need clearance from Manager for after hour delivery or emergency delivery</text:p>
          </table:table-cell>
          <table:table-cell table:style-name="ce45" office:value-type="string" calcext:value-type="string">
            <text:p>No</text:p>
          </table:table-cell>
          <table:table-cell table:style-name="ce45"/>
          <table:table-cell table:style-name="ce45" office:value-type="string" calcext:value-type="string">
            <text:p>n/a</text:p>
          </table:table-cell>
          <table:table-cell table:style-name="ce45" table:number-columns-repeated="2"/>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EVI01</text:p>
          </table:table-cell>
          <table:table-cell table:style-name="ce44"/>
          <table:table-cell table:style-name="ce44" table:content-validation-name="val2" office:value-type="string" calcext:value-type="string">
            <text:p>Brian McClure</text:p>
          </table:table-cell>
          <table:table-cell table:style-name="ce44" office:value-type="string" calcext:value-type="string">
            <text:p>Elk Grove Village</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number-columns-repeated="3" table:style-name="ce44" office:value-type="string" calcext:value-type="string">
            <text:p>No</text:p>
          </table:table-cell>
          <table:table-cell table:style-name="ce44" office:value-type="string" calcext:value-type="string">
            <text:p>862 451-0531</text:p>
          </table:table-cell>
          <table:table-cell table:style-name="ce44" office:value-type="string" calcext:value-type="string">
            <text:p>bmcclure@coreweave.com</text:p>
          </table:table-cell>
          <table:table-cell table:style-name="ce44"/>
          <table:table-cell table:style-name="ce44" office:value-type="string" calcext:value-type="string">
            <text:p>Yes</text:p>
          </table:table-cell>
          <table:table-cell table:style-name="ce44" office:value-type="string" calcext:value-type="string">
            <text:p>Monday - Friday 8am-2pm</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3"/>
          <table:table-cell table:style-name="ce44" office:value-type="string" calcext:value-type="string">
            <text:p>Still on-going construction</text:p>
          </table:table-cell>
          <table:table-cell table:style-name="ce44" office:value-type="string" calcext:value-type="string">
            <text:p>No</text:p>
          </table:table-cell>
          <table:table-cell table:style-name="ce44" office:value-type="string" calcext:value-type="string">
            <text:p>Outdoor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Liquid Cool liquid once the B200 cabs are up and running</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EWS01</text:p>
          </table:table-cell>
          <table:table-cell table:style-name="ce45" office:value-type="string" calcext:value-type="string">
            <text:p>Liam Jones</text:p>
          </table:table-cell>
          <table:table-cell table:style-name="ce45" table:content-validation-name="val2" office:value-type="string" calcext:value-type="string">
            <text:p>Pat McDermott</text:p>
          </table:table-cell>
          <table:table-cell table:style-name="ce47" office:value-type="string" calcext:value-type="string">
            <text:p>159 Princeton Hightstown Road, East Windsor, NJ 08520</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Badge and digital fingerprint scanner</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201-978-4297</text:p>
          </table:table-cell>
          <table:table-cell table:style-name="ce45" office:value-type="string" calcext:value-type="string">
            <text:p>pmcdermott@coreweave.com</text:p>
          </table:table-cell>
          <table:table-cell table:style-name="ce45"/>
          <table:table-cell table:style-name="ce45" office:value-type="string" calcext:value-type="string">
            <text:p>No</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Outdoors</text:p>
          </table:table-cell>
          <table:table-cell table:number-columns-repeated="2" table:style-name="ce45" office:value-type="string" calcext:value-type="string">
            <text:p>Yes</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HIO01</text:p>
          </table:table-cell>
          <table:table-cell table:style-name="ce44" office:value-type="string" calcext:value-type="string">
            <text:p>Juan Martinez</text:p>
          </table:table-cell>
          <table:table-cell table:style-name="ce44" table:content-validation-name="val2" office:value-type="string" calcext:value-type="string">
            <text:p>Jesse Brackenbury</text:p>
          </table:table-cell>
          <table:table-cell table:style-name="ce48" office:value-type="string" calcext:value-type="string">
            <text:p>4735 NE Starr BLVD Hillsboro, OR 97124</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862-746-1663</text:p>
          </table:table-cell>
          <table:table-cell table:style-name="ce44" office:value-type="string" calcext:value-type="string">
            <text:p>JBRACKENBURY@COREWEAVE.COM</text:p>
          </table:table-cell>
          <table:table-cell table:style-name="ce44"/>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table:table-cell table:style-name="ce44" office:value-type="string" calcext:value-type="string">
            <text:p>No</text:p>
          </table:table-cell>
          <table:table-cell table:style-name="ce44" table:number-columns-repeated="4"/>
          <table:table-cell table:style-name="ce44" office:value-type="string" calcext:value-type="string">
            <text:p>No</text:p>
          </table:table-cell>
          <table:table-cell table:style-name="ce44" office:value-type="string" calcext:value-type="string">
            <text:p>Indoors</text:p>
          </table:table-cell>
          <table:table-cell table:number-columns-repeated="2" table:style-name="ce44" office:value-type="string" calcext:value-type="string">
            <text:p>No</text:p>
          </table:table-cell>
          <table:table-cell table:style-name="ce44" office:value-type="string" calcext:value-type="string">
            <text:p>In the Warehouse</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HIO02</text:p>
          </table:table-cell>
          <table:table-cell table:style-name="ce45" office:value-type="string" calcext:value-type="string">
            <text:p>Juan Martinez</text:p>
          </table:table-cell>
          <table:table-cell table:style-name="ce45" table:content-validation-name="val2" office:value-type="string" calcext:value-type="string">
            <text:p>Jesse Brackenbury</text:p>
          </table:table-cell>
          <table:table-cell table:style-name="ce47" office:value-type="string" calcext:value-type="string">
            <text:p>4715 NE Starr BLVD</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862-746-1663</text:p>
          </table:table-cell>
          <table:table-cell table:style-name="ce45" office:value-type="string" calcext:value-type="string">
            <text:p>JBRACKENBURY@COREWEAVE.COM</text:p>
          </table:table-cell>
          <table:table-cell table:style-name="ce45"/>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number-columns-repeated="2" table:style-name="ce45" office:value-type="string" calcext:value-type="string">
            <text:p>No</text:p>
          </table:table-cell>
          <table:table-cell table:style-name="ce45" office:value-type="string" calcext:value-type="string">
            <text:p>Warehouse</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HIO03</text:p>
          </table:table-cell>
          <table:table-cell table:style-name="ce44" office:value-type="string" calcext:value-type="string">
            <text:p>Juan Martinez</text:p>
          </table:table-cell>
          <table:table-cell table:style-name="ce44" table:content-validation-name="val2" office:value-type="string" calcext:value-type="string">
            <text:p>Francis Cabangcalan</text:p>
          </table:table-cell>
          <table:table-cell table:style-name="ce44" office:value-type="string" calcext:value-type="string">
            <text:p>5870 NE Schaaf Street Hillsboro, OR 97124</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For standard deliveries, they do not need a badge to unload at loading dock. Security will open gates for them. If white glove service is needed, they will need to be escorted to the front desk in order to get a temporary badge to enter the building beyond the loading dock.</text:p>
          </table:table-cell>
          <table:table-cell table:number-columns-repeated="3" table:style-name="ce44" office:value-type="string" calcext:value-type="string">
            <text:p>Yes</text:p>
          </table:table-cell>
          <table:table-cell table:style-name="ce44" office:value-type="string" calcext:value-type="string">
            <text:p>Gloves, composite or steel-toe boot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1 (862) 485-0912</text:p>
          </table:table-cell>
          <table:table-cell table:style-name="ce44" office:value-type="string" calcext:value-type="string">
            <text:p>fcabangcalan@coreweave.com</text:p>
          </table:table-cell>
          <table:table-cell table:style-name="ce44"/>
          <table:table-cell table:style-name="ce44" office:value-type="string" calcext:value-type="string">
            <text:p>Yes</text:p>
          </table:table-cell>
          <table:table-cell table:style-name="ce44" office:value-type="string" calcext:value-type="string">
            <text:p>8AM - 4PM</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table-cell table:style-name="ce44" office:value-type="string" calcext:value-type="string">
            <text:p>9' X 10' 12000lbs Capacity</text:p>
          </table:table-cell>
          <table:table-cell table:style-name="ce44" table:number-columns-repeated="2"/>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Regular Packages up to a month. Pallets up to a week.</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HMN01</text:p>
          </table:table-cell>
          <table:table-cell table:style-name="ce45" office:value-type="string" calcext:value-type="string">
            <text:p>Liam Jones</text:p>
          </table:table-cell>
          <table:table-cell table:style-name="ce45" table:content-validation-name="val2" office:value-type="string" calcext:value-type="string">
            <text:p>Kenneth Taylor</text:p>
          </table:table-cell>
          <table:table-cell table:style-name="ce45" office:value-type="string" calcext:value-type="string">
            <text:p>100 Digital Crossroads Dr. Hammond, Indiana 46320</text:p>
          </table:table-cell>
          <table:table-cell table:style-name="ce45" office:value-type="string" calcext:value-type="string">
            <text:p>Yes</text:p>
          </table:table-cell>
          <table:table-cell table:style-name="ce45" office:value-type="string" calcext:value-type="string">
            <text:p>Ground Level</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20ft</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The DataCenter manager office must be contacted prior delivery and a ticket is required.</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number-columns-repeated="3" table:style-name="ce45" office:value-type="string" calcext:value-type="string">
            <text:p>No</text:p>
          </table:table-cell>
          <table:table-cell table:style-name="ce45" office:value-type="string" calcext:value-type="string">
            <text:p>(862) 485-8744</text:p>
          </table:table-cell>
          <table:table-cell table:style-name="ce45" office:value-type="string" calcext:value-type="string">
            <text:p>ktaylor@coreweave.com</text:p>
          </table:table-cell>
          <table:table-cell table:style-name="ce45"/>
          <table:table-cell table:style-name="ce45" office:value-type="string" calcext:value-type="string">
            <text:p>Yes</text:p>
          </table:table-cell>
          <table:table-cell table:style-name="ce45" office:value-type="string" calcext:value-type="string">
            <text:p>Delivery times are between 8AM and 6PM</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LAS01</text:p>
          </table:table-cell>
          <table:table-cell table:style-name="ce44" office:value-type="string" calcext:value-type="string">
            <text:p>Juan Martinez</text:p>
          </table:table-cell>
          <table:table-cell table:style-name="ce44" table:content-validation-name="val2" office:value-type="string" calcext:value-type="string">
            <text:p>Robert White, Rafael Perez</text:p>
          </table:table-cell>
          <table:table-cell table:style-name="ce44" office:value-type="string" calcext:value-type="string">
            <text:p>7135 S Decatur Blvd Las Vegas NV 89118</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number-columns-repeated="3"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862-245-0706, 973-618-7394</text:p>
          </table:table-cell>
          <table:table-cell table:style-name="ce44" office:value-type="string" calcext:value-type="string">
            <text:p>rwhite@coreweave.com &amp; rperez@coreweave.com</text:p>
          </table:table-cell>
          <table:table-cell table:style-name="ce44"/>
          <table:table-cell table:style-name="ce44" office:value-type="string" calcext:value-type="string">
            <text:p>Yes</text:p>
          </table:table-cell>
          <table:table-cell table:style-name="ce44" office:value-type="string" calcext:value-type="string">
            <text:p>8am to 4pm, anything outside of these times has a fee assessed</text:p>
          </table:table-cell>
          <table:table-cell table:number-columns-repeated="2" table:style-name="ce44" office:value-type="string" calcext:value-type="string">
            <text:p>Yes</text:p>
          </table:table-cell>
          <table:table-cell table:style-name="ce44" office:value-type="string" calcext:value-type="string">
            <text:p>Approved by SPOC, Notify facility of the delivery prior, ensure that BOLs are given for any delivery. 48 hour notice preferred</text:p>
          </table:table-cell>
          <table:table-cell table:style-name="ce44" office:value-type="string" calcext:value-type="string">
            <text:p>Yes</text:p>
          </table:table-cell>
          <table:table-cell table:style-name="ce44" office:value-type="string" calcext:value-type="string">
            <text:p>Sean Anderson +1 862-451-0537 &amp; Juan Vega Martinez +1 862-704-1113</text:p>
          </table:table-cell>
          <table:table-cell table:style-name="ce44" table:number-columns-repeated="2"/>
          <table:table-cell table:style-name="ce44" office:value-type="string" calcext:value-type="string">
            <text:p>Tight Turns, narrow hallways in data hall</text:p>
          </table:table-cell>
          <table:table-cell table:style-name="ce44" office:value-type="string" calcext:value-type="string">
            <text:p>No</text:p>
          </table:table-cell>
          <table:table-cell table:style-name="ce44" office:value-type="string" calcext:value-type="string">
            <text:p>Indoors</text:p>
          </table:table-cell>
          <table:table-cell table:number-columns-repeated="2" table:style-name="ce44" office:value-type="string" calcext:value-type="string">
            <text:p>Yes</text:p>
          </table:table-cell>
          <table:table-cell table:style-name="ce44" office:value-type="string" calcext:value-type="string">
            <text:p>Shipping and receiving room, indoors will remain until the next shipping and receiving officer is on site</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LAS02</text:p>
          </table:table-cell>
          <table:table-cell table:style-name="ce45" office:value-type="string" calcext:value-type="string">
            <text:p>Juan Martinez</text:p>
          </table:table-cell>
          <table:table-cell table:style-name="ce45" table:content-validation-name="val2" office:value-type="string" calcext:value-type="string">
            <text:p>Robert White, Rafael Perez</text:p>
          </table:table-cell>
          <table:table-cell table:style-name="ce45" office:value-type="string" calcext:value-type="string">
            <text:p>5325 W. Capovilla Ave</text:p>
          </table:table-cell>
          <table:table-cell table:style-name="ce45" office:value-type="string" calcext:value-type="string">
            <text:p>Yes</text:p>
          </table:table-cell>
          <table:table-cell table:style-name="ce45" office:value-type="string" calcext:value-type="string">
            <text:p>Ground Level</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862-245-0706 &amp; 973-618-7394</text:p>
          </table:table-cell>
          <table:table-cell table:style-name="ce45" office:value-type="string" calcext:value-type="string">
            <text:p>rwhite@coreweave.com &amp; rperez@coreweave.com</text:p>
          </table:table-cell>
          <table:table-cell table:style-name="ce45"/>
          <table:table-cell table:style-name="ce45" office:value-type="string" calcext:value-type="string">
            <text:p>Yes</text:p>
          </table:table-cell>
          <table:table-cell table:style-name="ce45" office:value-type="string" calcext:value-type="string">
            <text:p>8am - 4pm, any outside deliveries require approval and have fees</text:p>
          </table:table-cell>
          <table:table-cell table:number-columns-repeated="2" table:style-name="ce45" office:value-type="string" calcext:value-type="string">
            <text:p>Yes</text:p>
          </table:table-cell>
          <table:table-cell table:style-name="ce45" office:value-type="string" calcext:value-type="string">
            <text:p>Approval of SPOC, notice given to facility regarding delivery, 48 hour notice</text:p>
          </table:table-cell>
          <table:table-cell table:style-name="ce45" office:value-type="string" calcext:value-type="string">
            <text:p>Yes</text:p>
          </table:table-cell>
          <table:table-cell table:style-name="ce45" office:value-type="string" calcext:value-type="string">
            <text:p>Sean Anderson +1 862-451-0537 &amp; Juan Vega Martinez +1 862-704-1113</text:p>
          </table:table-cell>
          <table:table-cell table:style-name="ce45"/>
          <table:table-cell table:style-name="ce45" office:value-type="string" calcext:value-type="string">
            <text:p>Liftgate</text:p>
          </table:table-cell>
          <table:table-cell table:style-name="ce45" office:value-type="string" calcext:value-type="string">
            <text:p>Space for delivery at dock is narrow</text:p>
          </table:table-cell>
          <table:table-cell table:style-name="ce45" office:value-type="string" calcext:value-type="string">
            <text:p>No</text:p>
          </table:table-cell>
          <table:table-cell table:style-name="ce45" office:value-type="string" calcext:value-type="string">
            <text:p>Both</text:p>
          </table:table-cell>
          <table:table-cell table:number-columns-repeated="2" table:style-name="ce45" office:value-type="string" calcext:value-type="string">
            <text:p>Yes</text:p>
          </table:table-cell>
          <table:table-cell table:style-name="ce45" office:value-type="string" calcext:value-type="string">
            <text:p>Shipping dock room inside, same as storage area.</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LAS03</text:p>
          </table:table-cell>
          <table:table-cell table:style-name="ce44" office:value-type="string" calcext:value-type="string">
            <text:p>Juan Martinez</text:p>
          </table:table-cell>
          <table:table-cell table:style-name="ce44" table:content-validation-name="val2" office:value-type="string" calcext:value-type="string">
            <text:p>Robert White, Rafael Perez</text:p>
          </table:table-cell>
          <table:table-cell table:style-name="ce44" office:value-type="string" calcext:value-type="string">
            <text:p>5660 W. Badura Ave. Las Vegas NV 89118</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Closed toe shoes.</text:p>
          </table:table-cell>
          <table:table-cell table:number-columns-repeated="2"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973)618-7394, (862)245-0706</text:p>
          </table:table-cell>
          <table:table-cell table:style-name="ce44" office:value-type="string" calcext:value-type="string">
            <text:p>rperez@coreweave.com, rwhite@coreweave.com</text:p>
          </table:table-cell>
          <table:table-cell table:style-name="ce44"/>
          <table:table-cell table:style-name="ce44" office:value-type="string" calcext:value-type="string">
            <text:p>Yes</text:p>
          </table:table-cell>
          <table:table-cell table:style-name="ce44" office:value-type="string" calcext:value-type="string">
            <text:p>Monday - Friday / 0800-1600 hours PST</text:p>
          </table:table-cell>
          <table:table-cell table:number-columns-repeated="2" table:style-name="ce44" office:value-type="string" calcext:value-type="string">
            <text:p>Yes</text:p>
          </table:table-cell>
          <table:table-cell table:style-name="ce44" office:value-type="string" calcext:value-type="string">
            <text:p>48 hours prior notification preferred.</text:p>
          </table:table-cell>
          <table:table-cell table:style-name="ce44" office:value-type="string" calcext:value-type="string">
            <text:p>Yes</text:p>
          </table:table-cell>
          <table:table-cell table:style-name="ce44" office:value-type="string" calcext:value-type="string">
            <text:p>Sean Anderson / (862) 451-0537 , Juan Martinez (862) 704-1113</text:p>
          </table:table-cell>
          <table:table-cell table:style-name="ce44" table:number-columns-repeated="3"/>
          <table:table-cell table:style-name="ce44" office:value-type="string" calcext:value-type="string">
            <text:p>No</text:p>
          </table:table-cell>
          <table:table-cell table:style-name="ce44" office:value-type="string" calcext:value-type="string">
            <text:p>Indoors</text:p>
          </table:table-cell>
          <table:table-cell table:number-columns-repeated="2" table:style-name="ce44" office:value-type="string" calcext:value-type="string">
            <text:p>Yes</text:p>
          </table:table-cell>
          <table:table-cell table:style-name="ce44" office:value-type="string" calcext:value-type="string">
            <text:p>Security secured storage until its retrieved.</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7">
          <table:table-cell table:style-name="ce45" office:value-type="string" calcext:value-type="string">
            <text:p>US-LHS01</text:p>
          </table:table-cell>
          <table:table-cell table:style-name="ce45" office:value-type="string" calcext:value-type="string">
            <text:p>Matt Whittle</text:p>
          </table:table-cell>
          <table:table-cell table:style-name="ce45" table:content-validation-name="val2" office:value-type="string" calcext:value-type="string">
            <text:p>Nehemiah Johnson</text:p>
          </table:table-cell>
          <table:table-cell table:style-name="ce45" office:value-type="string" calcext:value-type="string">
            <text:p>375 Riverside Parkway 30122 Lithia Springs</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eed an ID badge some require fingerprint scan and drivers licence to verify identity. Once a badge is obtained you must keep the badge in view at all times while within the building. </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float" office:value="9733082049" calcext:value-type="float">
            <text:p>9733082049</text:p>
          </table:table-cell>
          <table:table-cell table:style-name="ce45" office:value-type="string" calcext:value-type="string">
            <text:p>njohnsnon@coreweave.com</text:p>
          </table:table-cell>
          <table:table-cell table:style-name="ce45" office:value-type="string" calcext:value-type="string">
            <text:p>7:AM - 6:00PM</text:p>
          </table:table-cell>
          <table:table-cell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Customers must provide Flexential with advance notice of all equipment deliveries.</text:p>
            <text:p>▪ All shipping charges must be pre-paid by the customer.</text:p>
            <text:p>▪ If any equipment is delivered for a customer by a third party, Flexential will receive the equipment on behalf of the customer provided that the customer has pre-scheduled the delivery with Flexential. The customer must arrange for shipping crate or pallet removal.</text:p>
            <text:p>o The following information must be included with all equipment delivered to the facility. Failure to follow these instructions may result in delays locating stored packages: Flexential ticket number; customer's name and/or customer billing ID, if possible; and number of pieces shipped.</text:p>
            <text:p>o Upon receipt of any equipment delivered by a third party on a customer's behalf, Flexential will notify the customer of receipt and store the equipment</text:p>
            <text:p>▪ Customers must claim their equipment within 7 calendar days of notification of receipt by Flexential or storage charges will be charged to the customer at the then-current rates.</text:p>
            <text:p>▪ All equipment left in storage for more than 30 calendar days may be shipped back to the customer at the customer's expense.</text:p>
            <text:p>▪ Flexential is not responsible for loss or damage to customer equipment stored in the common areas of a Flexential facility or in transit or packaged and shipped by Flexential at Customer's request.</text:p>
            <text:p>▪ Flexential cannot guarantee storage space availability and will provide this service on a "reasonable efforts" basis.</text:p>
            <text:p>▪ Flexential package acceptance services do not include verifying the contents of a box or boxes. Centersquare (US-LHS01) has similar conditions.</text:p>
          </table:table-cell>
          <table:table-cell table:number-columns-repeated="2" table:style-name="ce45" office:value-type="string" calcext:value-type="string">
            <text:p>Yes</text:p>
          </table:table-cell>
          <table:table-cell table:style-name="ce45" office:value-type="string" calcext:value-type="string">
            <text:p>No cardboard or any material that can create dust are permitted in the data hall.</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LNB01</text:p>
          </table:table-cell>
          <table:table-cell table:style-name="ce44" office:value-type="string" calcext:value-type="string">
            <text:p>Liam Jones</text:p>
          </table:table-cell>
          <table:table-cell table:style-name="ce44" table:content-validation-name="val2" office:value-type="string" calcext:value-type="string">
            <text:p>Alissah Wiles</text:p>
          </table:table-cell>
          <table:table-cell table:style-name="ce44" office:value-type="string" calcext:value-type="string">
            <text:p>229 W 7th st, Cincinnati, Ohio 45202</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3" table:style-name="ce44" office:value-type="string" calcext:value-type="string">
            <text:p>Yes</text:p>
          </table:table-cell>
          <table:table-cell table:style-name="ce44" office:value-type="string" calcext:value-type="string">
            <text:p>Regular restrictions</text:p>
          </table:table-cell>
          <table:table-cell table:number-columns-repeated="2" table:style-name="ce44" office:value-type="string" calcext:value-type="string">
            <text:p>Yes</text:p>
          </table:table-cell>
          <table:table-cell table:style-name="ce44" office:value-type="string" calcext:value-type="string">
            <text:p>Manager must put in a ticket with security.</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Yes</text:p>
          </table:table-cell>
          <table:table-cell table:style-name="ce44" office:value-type="string" calcext:value-type="string">
            <text:p>No</text:p>
          </table:table-cell>
          <table:table-cell table:number-columns-repeated="4" table:style-name="ce44" office:value-type="string" calcext:value-type="string">
            <text:p>Yes</text:p>
          </table:table-cell>
          <table:table-cell table:style-name="ce44" office:value-type="float" office:value="8627461479" calcext:value-type="float">
            <text:p>8627461479</text:p>
          </table:table-cell>
          <table:table-cell table:style-name="ce44" office:value-type="string" calcext:value-type="string">
            <text:p>awiles@coreweave.com</text:p>
          </table:table-cell>
          <table:table-cell table:style-name="ce44" office:value-type="string" calcext:value-type="string">
            <text:p>7am-5pm Monday- Friday</text:p>
          </table:table-cell>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style-name="ce44" office:value-type="string" calcext:value-type="string">
            <text:p>Yes</text:p>
          </table:table-cell>
          <table:table-cell table:style-name="ce44" office:value-type="string" calcext:value-type="string">
            <text:p>18662978766 - Cyrus 1</text:p>
          </table:table-cell>
          <table:table-cell table:style-name="ce44" table:number-columns-repeated="3"/>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24/7</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Alfred Nyamusa, Alissah Wiles, Vayan Adams</text:p>
          </table:table-cell>
          <table:table-cell table:number-columns-repeated="973"/>
        </table:table-row>
        <table:table-row table:style-name="ro1">
          <table:table-cell table:style-name="ce45" office:value-type="string" calcext:value-type="string">
            <text:p>US-LOE01</text:p>
          </table:table-cell>
          <table:table-cell table:style-name="ce45" office:value-type="string" calcext:value-type="string">
            <text:p>Liam Jones</text:p>
          </table:table-cell>
          <table:table-cell table:style-name="ce45" table:content-validation-name="val2" office:value-type="string" calcext:value-type="string">
            <text:p>Austin Lum</text:p>
          </table:table-cell>
          <table:table-cell table:style-name="ce45" office:value-type="string" calcext:value-type="string">
            <text:p>1 Markley Way, Lowell MA 01852</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eed badge for entry into building</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3"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float" office:value="9734769110" calcext:value-type="float">
            <text:p>9734769110</text:p>
          </table:table-cell>
          <table:table-cell table:style-name="ce45" office:value-type="string" calcext:value-type="string">
            <text:p>alum@coreweave.com</text:p>
          </table:table-cell>
          <table:table-cell table:style-name="ce45"/>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24/7 security will escort after 8 pm</text:p>
          </table:table-cell>
          <table:table-cell table:style-name="ce45" office:value-type="string" calcext:value-type="string">
            <text:p>Yes</text:p>
          </table:table-cell>
          <table:table-cell table:style-name="ce45" office:value-type="string" calcext:value-type="string">
            <text:p>24/7 security rotates but someone from security will always be available for delivery exceptions</text:p>
          </table:table-cell>
          <table:table-cell table:style-name="ce45" table:number-columns-repeated="2"/>
          <table:table-cell table:style-name="ce45" office:value-type="string" calcext:value-type="string">
            <text:p>Only 1 tight turn in hallway but the remainder of the hallway is wide </text:p>
          </table:table-cell>
          <table:table-cell table:style-name="ce45" office:value-type="string" calcext:value-type="string">
            <text:p>Yes</text:p>
          </table:table-cell>
          <table:table-cell table:style-name="ce45" office:value-type="string" calcext:value-type="string">
            <text:p>Indoors</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Security has access to mailroom 24/7 and can place shipments there anytime</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LYF01</text:p>
          </table:table-cell>
          <table:table-cell table:style-name="ce44" office:value-type="string" calcext:value-type="string">
            <text:p>Juan Martinez</text:p>
          </table:table-cell>
          <table:table-cell table:style-name="ce44" table:content-validation-name="val2" office:value-type="string" calcext:value-type="string">
            <text:p>Kaelin Lipscomb</text:p>
          </table:table-cell>
          <table:table-cell table:style-name="ce44" office:value-type="string" calcext:value-type="string">
            <text:p>4200 194th St SW Lynnwood WA 98036 United States</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14'6"</text:p>
          </table:table-cell>
          <table:table-cell table:number-columns-repeated="2" table:style-name="ce44" office:value-type="string" calcext:value-type="string">
            <text:p>No</text:p>
          </table:table-cell>
          <table:table-cell table:style-name="ce44" office:value-type="string" calcext:value-type="string">
            <text:p>If this is for a delivery, then no.</text:p>
          </table:table-cell>
          <table:table-cell table:number-columns-repeated="3" table:style-name="ce44" office:value-type="string" calcext:value-type="string">
            <text:p>No</text:p>
          </table:table-cell>
          <table:table-cell table:style-name="ce44"/>
          <table:table-cell table:style-name="ce44" office:value-type="string" calcext:value-type="string">
            <text:p>No</text:p>
          </table:table-cell>
          <table:table-cell table:number-columns-repeated="3" table:style-name="ce44" office:value-type="string" calcext:value-type="string">
            <text:p>Yes</text:p>
          </table:table-cell>
          <table:table-cell table:number-columns-repeated="4" table:style-name="ce44" office:value-type="string" calcext:value-type="string">
            <text:p>No</text:p>
          </table:table-cell>
          <table:table-cell table:style-name="ce44" office:value-type="string" calcext:value-type="string">
            <text:p>862-451-0655</text:p>
          </table:table-cell>
          <table:table-cell table:style-name="ce44" office:value-type="string" calcext:value-type="string">
            <text:p>klipscomb@coreweave.com</text:p>
          </table:table-cell>
          <table:table-cell table:style-name="ce44"/>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office:value-type="string" calcext:value-type="string">
            <text:p>Assuming this means servers/pallets or something, no</text:p>
          </table:table-cell>
          <table:table-cell table:style-name="ce44" office:value-type="string" calcext:value-type="string">
            <text:p>No</text:p>
          </table:table-cell>
          <table:table-cell table:style-name="ce44"/>
          <table:table-cell table:style-name="ce44" office:value-type="string" calcext:value-type="string">
            <text:p>Not known, barely a freight elevator.</text:p>
          </table:table-cell>
          <table:table-cell table:style-name="ce44" office:value-type="string" calcext:value-type="string">
            <text:p>Liftgate is required</text:p>
          </table:table-cell>
          <table:table-cell table:style-name="ce44" office:value-type="string" calcext:value-type="string">
            <text:p>narrow hallways and tight turns, particularly at elevator</text:p>
          </table:table-cell>
          <table:table-cell table:style-name="ce44" office:value-type="string" calcext:value-type="string">
            <text:p>No</text:p>
          </table:table-cell>
          <table:table-cell table:style-name="ce44" office:value-type="string" calcext:value-type="string">
            <text:p>Both</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MSC01</text:p>
          </table:table-cell>
          <table:table-cell table:style-name="ce45" office:value-type="string" calcext:value-type="string">
            <text:p>Juan Martinez</text:p>
          </table:table-cell>
          <table:table-cell table:style-name="ce45" table:content-validation-name="val2" office:value-type="string" calcext:value-type="string">
            <text:p>Tony Hendrix</text:p>
          </table:table-cell>
          <table:table-cell table:style-name="ce45" office:value-type="string" calcext:value-type="string">
            <text:p>130 W. University Dr</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Security badge must be processed ahead of arrival to the site.</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862-454-1922</text:p>
          </table:table-cell>
          <table:table-cell table:style-name="ce45" office:value-type="string" calcext:value-type="string">
            <text:p>thendrix@coreweave.com</text:p>
          </table:table-cell>
          <table:table-cell table:style-name="ce45" office:value-type="string" calcext:value-type="string">
            <text:p>one day</text:p>
          </table:table-cell>
          <table:table-cell table:style-name="ce45" office:value-type="string" calcext:value-type="string">
            <text:p>Yes</text:p>
          </table:table-cell>
          <table:table-cell table:style-name="ce45" office:value-type="string" calcext:value-type="string">
            <text:p>Monday-Friday 8am to 4pm</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Outdoor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One day in small storage area.</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OBG01</text:p>
          </table:table-cell>
          <table:table-cell table:style-name="ce44" office:value-type="string" calcext:value-type="string">
            <text:p>Liam Jones</text:p>
          </table:table-cell>
          <table:table-cell table:style-name="ce44" table:content-validation-name="val2" office:value-type="string" calcext:value-type="string">
            <text:p>Frank D'Arrigo</text:p>
          </table:table-cell>
          <table:table-cell table:style-name="ce44" office:value-type="string" calcext:value-type="string">
            <text:p>2000 Corporate Dr Orangeburg, NY 10962</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for drivers no for visitor yes</text:p>
          </table:table-cell>
          <table:table-cell table:number-columns-repeated="3" table:style-name="ce44" office:value-type="string" calcext:value-type="string">
            <text:p>No</text:p>
          </table:table-cell>
          <table:table-cell table:style-name="ce44"/>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number-columns-repeated="2" table:style-name="ce44" office:value-type="string" calcext:value-type="string">
            <text:p>No</text:p>
          </table:table-cell>
          <table:table-cell table:style-name="ce44" office:value-type="float" office:value="8625055095" calcext:value-type="float">
            <text:p>8625055095</text:p>
          </table:table-cell>
          <table:table-cell table:style-name="ce44" office:value-type="string" calcext:value-type="string">
            <text:p>fdarrigo@coreweave.com</text:p>
          </table:table-cell>
          <table:table-cell table:style-name="ce44"/>
          <table:table-cell table:style-name="ce44" office:value-type="string" calcext:value-type="string">
            <text:p>Yes</text:p>
          </table:table-cell>
          <table:table-cell table:style-name="ce44" office:value-type="string" calcext:value-type="string">
            <text:p>M-F 8am-8pm , </text:p>
          </table:table-cell>
          <table:table-cell table:number-columns-repeated="2" table:style-name="ce44" office:value-type="string" calcext:value-type="string">
            <text:p>Yes</text:p>
          </table:table-cell>
          <table:table-cell table:style-name="ce44" office:value-type="string" calcext:value-type="string">
            <text:p>emergency/after hours can be coordinated but are not the standard</text:p>
          </table:table-cell>
          <table:table-cell table:style-name="ce44" office:value-type="string" calcext:value-type="string">
            <text:p>Yes</text:p>
          </table:table-cell>
          <table:table-cell table:style-name="ce44" office:value-type="string" calcext:value-type="string">
            <text:p>212.405.6266</text:p>
          </table:table-cell>
          <table:table-cell table:style-name="ce44" office:value-type="string" calcext:value-type="string">
            <text:p>7'x7'</text:p>
          </table:table-cell>
          <table:table-cell table:style-name="ce44" table:number-columns-repeated="2"/>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databank gives us what we need within reason</text:p>
          </table:table-cell>
          <table:table-cell table:number-columns-repeated="2" table:style-name="ce44" office:value-type="string" calcext:value-type="string">
            <text:p>Yes</text:p>
          </table:table-cell>
          <table:table-cell table:style-name="ce44" office:value-type="string" calcext:value-type="string">
            <text:p>just need to properly store them in a cab</text:p>
          </table:table-cell>
          <table:table-cell table:number-columns-repeated="3"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PHX01</text:p>
          </table:table-cell>
          <table:table-cell table:style-name="ce45" office:value-type="string" calcext:value-type="string">
            <text:p>Juan Martinez</text:p>
          </table:table-cell>
          <table:table-cell table:style-name="ce45" table:content-validation-name="val2" office:value-type="string" calcext:value-type="string">
            <text:p>Rodrigo Espino</text:p>
          </table:table-cell>
          <table:table-cell table:style-name="ce45" office:value-type="string" calcext:value-type="string">
            <text:p>2500 W Union Hills Dr. Phoenix, Az 85027</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3"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Check in with security</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number-columns-repeated="3" table:style-name="ce45" office:value-type="string" calcext:value-type="string">
            <text:p>No</text:p>
          </table:table-cell>
          <table:table-cell table:style-name="ce45" office:value-type="string" calcext:value-type="string">
            <text:p>973-270-5581</text:p>
          </table:table-cell>
          <table:table-cell table:style-name="ce45" office:value-type="string" calcext:value-type="string">
            <text:p>respino@coreweave.com</text:p>
          </table:table-cell>
          <table:table-cell table:style-name="ce45" office:value-type="string" calcext:value-type="string">
            <text:p>8am to 4pm</text:p>
          </table:table-cell>
          <table:table-cell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number-columns-repeated="2" table:style-name="ce45" office:value-type="string" calcext:value-type="string">
            <text:p>No</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PLZ01</text:p>
          </table:table-cell>
          <table:table-cell table:style-name="ce44" office:value-type="string" calcext:value-type="string">
            <text:p>Jesus Robles</text:p>
          </table:table-cell>
          <table:table-cell table:style-name="ce44" table:content-validation-name="val2" office:value-type="string" calcext:value-type="string">
            <text:p>Esteban Sotelo, Anthony Navarrete</text:p>
          </table:table-cell>
          <table:table-cell table:style-name="ce44" office:value-type="string" calcext:value-type="string">
            <text:p>1000 Coit Rd Plano TX 75075</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Check in with security. Delivery drivers are allowed in dock with security escort. Drivers are not allowed inside the facility past the dock without site access request.</text:p>
          </table:table-cell>
          <table:table-cell table:number-columns-repeated="3" table:style-name="ce44" office:value-type="string" calcext:value-type="string">
            <text:p>Yes</text:p>
          </table:table-cell>
          <table:table-cell table:style-name="ce44" office:value-type="string" calcext:value-type="string">
            <text:p>Safety vest and closed toe shoes required for drivers/unloader.</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50" office:value-type="string" calcext:value-type="string">
            <text:p>1(945) 331-2856 and/or +1 (680) 323-2721</text:p>
          </table:table-cell>
          <table:table-cell table:style-name="ce44" office:value-type="string" calcext:value-type="string">
            <text:p>esotelo@coreweave.com anavarrete@coreweave.com</text:p>
          </table:table-cell>
          <table:table-cell table:style-name="ce44"/>
          <table:table-cell table:style-name="ce44" office:value-type="string" calcext:value-type="string">
            <text:p>Yes</text:p>
          </table:table-cell>
          <table:table-cell table:style-name="ce44" office:value-type="string" calcext:value-type="string">
            <text:p>Monday-Friday, 8am-7pm</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table:table-cell table:style-name="ce44" office:value-type="string" calcext:value-type="string">
            <text:p>Capacity for freight elevator 1 = 148x120x108inches &amp;14,000LBS maximum capacity. Elevator 2 dimension = 112x70x92inches &amp; 5,000LBS maximum capacity.</text:p>
          </table:table-cell>
          <table:table-cell table:style-name="ce44" table:number-columns-repeated="2"/>
          <table:table-cell table:style-name="ce44" office:value-type="string" calcext:value-type="string">
            <text:p>Yes</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Available until next business day.</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Yes</text:p>
          </table:table-cell>
          <table:table-cell table:style-name="ce44" office:value-type="string" calcext:value-type="string">
            <text:p>All items in spares and all items in spares CCAC II</text:p>
          </table:table-cell>
          <table:table-cell table:style-name="ce44"/>
          <table:table-cell table:number-columns-repeated="973"/>
        </table:table-row>
        <table:table-row table:style-name="ro8">
          <table:table-cell table:style-name="ce45" office:value-type="string" calcext:value-type="string">
            <text:p>US-PLZ02</text:p>
          </table:table-cell>
          <table:table-cell table:style-name="ce45" office:value-type="string" calcext:value-type="string">
            <text:p>Jesus Robles</text:p>
          </table:table-cell>
          <table:table-cell table:style-name="ce45" table:content-validation-name="val2" office:value-type="string" calcext:value-type="string">
            <text:p>Ben Pauling</text:p>
          </table:table-cell>
          <table:table-cell table:style-name="ce45" office:value-type="string" calcext:value-type="string">
            <text:p>3500 E Plano Parkway, Plano, TX 75074</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Flexential badges for building entry, coreweave badge and physical security permission required for entry into the data hall cag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3"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972-533-4251</text:p>
          </table:table-cell>
          <table:table-cell table:style-name="ce45" office:value-type="string" calcext:value-type="string">
            <text:p>bpauling@coreweave.com</text:p>
          </table:table-cell>
          <table:table-cell table:style-name="ce45"/>
          <table:table-cell table:style-name="ce45" office:value-type="string" calcext:value-type="string">
            <text:p>Yes</text:p>
          </table:table-cell>
          <table:table-cell table:style-name="ce45" office:value-type="string" calcext:value-type="string">
            <text:p>Monday - Friday 8am - 4pm</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Call Flexential.</text:p>
          </table:table-cell>
          <table:table-cell table:style-name="ce45" office:value-type="string" calcext:value-type="string">
            <text:p>Yes</text:p>
          </table:table-cell>
          <table:table-cell table:style-name="ce45" office:value-type="string" calcext:value-type="string">
            <text:p>469-925-9569</text:p>
          </table:table-cell>
          <table:table-cell table:style-name="ce45" table:number-columns-repeated="2"/>
          <table:table-cell table:style-name="ce45" office:value-type="string" calcext:value-type="string">
            <text:p>path from dock to storage area is through a slightly wider than standard single door hallway.</text:p>
          </table:table-cell>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Through Flexential's storage areas on their side.</text:p>
          </table:table-cell>
          <table:table-cell table:number-columns-repeated="2"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8">
          <table:table-cell table:style-name="ce44" office:value-type="string" calcext:value-type="string">
            <text:p>US-QNC01</text:p>
          </table:table-cell>
          <table:table-cell table:style-name="ce44" office:value-type="string" calcext:value-type="string">
            <text:p>Juan Martinez</text:p>
          </table:table-cell>
          <table:table-cell table:style-name="ce44" table:content-validation-name="val2" office:value-type="string" calcext:value-type="string">
            <text:p>Ashlie Munro</text:p>
          </table:table-cell>
          <table:table-cell table:style-name="ce44" office:value-type="string" calcext:value-type="string">
            <text:p>1711 M St NE Quincy, WA 98848</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office:value-type="string" calcext:value-type="string">
            <text:p>A delivery driver does not need ID for truck entry and drop-off. However, a team helping us unload or unbox "WG Service" does need an access ticket created for the facility, ID's and a badge while onsite.</text:p>
          </table:table-cell>
          <table:table-cell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During the build, all WG Service needs PPE. Hard hats, steel toe, safety goggles.</text:p>
          </table:table-cell>
          <table:table-cell table:number-columns-repeated="2"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509.293.3190</text:p>
          </table:table-cell>
          <table:table-cell table:style-name="ce44" office:value-type="string" calcext:value-type="string">
            <text:p>amunro@coreweave.com</text:p>
          </table:table-cell>
          <table:table-cell table:style-name="ce44"/>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Requires coordination with the ICS to create ticket for the facility and ensure availability.</text:p>
          </table:table-cell>
          <table:table-cell table:style-name="ce44" office:value-type="string" calcext:value-type="string">
            <text:p>Yes</text:p>
          </table:table-cell>
          <table:table-cell table:style-name="ce44" office:value-type="string" calcext:value-type="string">
            <text:p>Ashlie Munro 862-325-0987</text:p>
          </table:table-cell>
          <table:table-cell table:style-name="ce44" table:number-columns-repeated="3"/>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RIN01</text:p>
          </table:table-cell>
          <table:table-cell table:style-name="ce45" office:value-type="string" calcext:value-type="string">
            <text:p>Jesus Robles</text:p>
          </table:table-cell>
          <table:table-cell table:style-name="ce45" table:content-validation-name="val2" office:value-type="string" calcext:value-type="string">
            <text:p>Anthony Neis</text:p>
          </table:table-cell>
          <table:table-cell table:style-name="ce45" office:value-type="string" calcext:value-type="string">
            <text:p>1510 E Lookout Dr, Richardson, TX 75082</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number-columns-repeated="3"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1 973-803-1948</text:p>
          </table:table-cell>
          <table:table-cell table:style-name="ce45" office:value-type="string" calcext:value-type="string">
            <text:p>aneis@coreweave.com</text:p>
          </table:table-cell>
          <table:table-cell table:style-name="ce45"/>
          <table:table-cell table:style-name="ce45" office:value-type="string" calcext:value-type="string">
            <text:p>Yes</text:p>
          </table:table-cell>
          <table:table-cell table:style-name="ce45" office:value-type="string" calcext:value-type="string">
            <text:p>Monday through Friday 8am to 3pm</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SPK01</text:p>
          </table:table-cell>
          <table:table-cell table:style-name="ce44" office:value-type="string" calcext:value-type="string">
            <text:p>Juan Martinez</text:p>
          </table:table-cell>
          <table:table-cell table:style-name="ce44" table:content-validation-name="val2" office:value-type="string" calcext:value-type="string">
            <text:p>Justin Fillmore, Andres Cordova</text:p>
          </table:table-cell>
          <table:table-cell table:style-name="ce44" office:value-type="string" calcext:value-type="string">
            <text:p>1 Superloop Cir., Sparks, NV 89437, USA</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If entry to the building is required, ITSD ticket and Switch Security ticket must be made, visitors must be escorted. <text:s/>If entry to just deliver at the dock is required, nothing needs to be done</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862-505-4938</text:p>
          </table:table-cell>
          <table:table-cell table:style-name="ce44" office:value-type="string" calcext:value-type="string">
            <text:p>jfillmore@coreweave.com</text:p>
          </table:table-cell>
          <table:table-cell table:style-name="ce44"/>
          <table:table-cell table:style-name="ce44" office:value-type="string" calcext:value-type="string">
            <text:p>Yes</text:p>
          </table:table-cell>
          <table:table-cell table:style-name="ce44" office:value-type="string" calcext:value-type="string">
            <text:p>Monday - Friday 8am-4pm</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Contact Security, CW is charged an overtime fee for every pallet that is brought in after hours</text:p>
          </table:table-cell>
          <table:table-cell table:style-name="ce44" office:value-type="string" calcext:value-type="string">
            <text:p>No</text:p>
          </table:table-cell>
          <table:table-cell table:style-name="ce44"/>
          <table:table-cell table:style-name="ce44" office:value-type="string" calcext:value-type="string">
            <text:p>N/A</text:p>
          </table:table-cell>
          <table:table-cell table:style-name="ce44" table:number-columns-repeated="2"/>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SPK02</text:p>
          </table:table-cell>
          <table:table-cell table:style-name="ce45" office:value-type="string" calcext:value-type="string">
            <text:p>Juan Martinez</text:p>
          </table:table-cell>
          <table:table-cell table:style-name="ce45" table:content-validation-name="val2" office:value-type="string" calcext:value-type="string">
            <text:p>Justin Fillmore, Andres Cordova</text:p>
          </table:table-cell>
          <table:table-cell table:style-name="ce45" office:value-type="string" calcext:value-type="string">
            <text:p>2 Superloop Cir., Sparks, NV 89437, USA</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f interior building access is required, ITSD and Switch security tickets will need to be made. <text:s/>Visitors will have to be escorted</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862-505-4938</text:p>
          </table:table-cell>
          <table:table-cell table:style-name="ce45" office:value-type="string" calcext:value-type="string">
            <text:p>jfillmore@coreweave.com</text:p>
          </table:table-cell>
          <table:table-cell table:style-name="ce45"/>
          <table:table-cell table:style-name="ce45" office:value-type="string" calcext:value-type="string">
            <text:p>Yes</text:p>
          </table:table-cell>
          <table:table-cell table:style-name="ce45" office:value-type="string" calcext:value-type="string">
            <text:p>Monday-Friday 8am-4pm</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Contact Security, CW is charged an overtime fee per pallet for anything that is brought in outside of primary delivery window</text:p>
          </table:table-cell>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SPK03</text:p>
          </table:table-cell>
          <table:table-cell table:style-name="ce44" office:value-type="string" calcext:value-type="string">
            <text:p>Juan Martinez</text:p>
          </table:table-cell>
          <table:table-cell table:style-name="ce44" table:content-validation-name="val2" office:value-type="string" calcext:value-type="string">
            <text:p>Justin Fillmore, Andres Cordova</text:p>
          </table:table-cell>
          <table:table-cell table:style-name="ce44" office:value-type="string" calcext:value-type="string">
            <text:p>3 Superloop Cir., Sparks, NV 89437, USA</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If required to have interior building access, and ITSD and Switch Security ticket must be made and visitors must be escorted</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862-505-4938</text:p>
          </table:table-cell>
          <table:table-cell table:style-name="ce44" office:value-type="string" calcext:value-type="string">
            <text:p>jfillmore@coreweave.com</text:p>
          </table:table-cell>
          <table:table-cell table:style-name="ce44"/>
          <table:table-cell table:style-name="ce44" office:value-type="string" calcext:value-type="string">
            <text:p>Yes</text:p>
          </table:table-cell>
          <table:table-cell table:style-name="ce44" office:value-type="string" calcext:value-type="string">
            <text:p>Monday-Friday 8am-4pm</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Contact Security, CW is charged an overtime fee per pallet brought in outside of the normal delivery window</text:p>
          </table:table-cell>
          <table:table-cell table:style-name="ce44" office:value-type="string" calcext:value-type="string">
            <text:p>No</text:p>
          </table:table-cell>
          <table:table-cell table:style-name="ce44" table:number-columns-repeated="4"/>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SVG01</text:p>
          </table:table-cell>
          <table:table-cell table:style-name="ce45" office:value-type="string" calcext:value-type="string">
            <text:p>Matt Whittle</text:p>
          </table:table-cell>
          <table:table-cell table:style-name="ce45" table:content-validation-name="val2" office:value-type="string" calcext:value-type="string">
            <text:p>Joseph Styers</text:p>
          </table:table-cell>
          <table:table-cell table:style-name="ce45" office:value-type="string" calcext:value-type="string">
            <text:p>120 Satellite Blvd NW Suwanee, GA 30024</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If white glove crew, check in with security</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float" office:value="8624859833" calcext:value-type="float">
            <text:p>8624859833</text:p>
          </table:table-cell>
          <table:table-cell table:style-name="ce45" office:value-type="string" calcext:value-type="string">
            <text:p>jstyers@coreweave.com</text:p>
          </table:table-cell>
          <table:table-cell table:style-name="ce45" office:value-type="string" calcext:value-type="string">
            <text:p>1 hour, </text:p>
          </table:table-cell>
          <table:table-cell table:style-name="ce45" office:value-type="string" calcext:value-type="string">
            <text:p>Yes</text:p>
          </table:table-cell>
          <table:table-cell table:style-name="ce45" office:value-type="string" calcext:value-type="string">
            <text:p>M - F, 7 AM - 4 PM</text:p>
          </table:table-cell>
          <table:table-cell table:number-columns-repeated="2" table:style-name="ce45" office:value-type="string" calcext:value-type="string">
            <text:p>Yes</text:p>
          </table:table-cell>
          <table:table-cell table:style-name="ce45" office:value-type="string" calcext:value-type="string">
            <text:p>Only 1 person on site after hours, it’s not preferred but it’s possible</text:p>
          </table:table-cell>
          <table:table-cell table:style-name="ce45" office:value-type="string" calcext:value-type="string">
            <text:p>Yes</text:p>
          </table:table-cell>
          <table:table-cell table:style-name="ce45" office:value-type="string" calcext:value-type="string">
            <text:p>Call security and they can connect them with the on-call DCO</text:p>
          </table:table-cell>
          <table:table-cell table:style-name="ce45" table:number-columns-repeated="3"/>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1 week of storage, receiving area next to dock doors </text:p>
          </table:table-cell>
          <table:table-cell table:number-columns-repeated="2" table:style-name="ce45" office:value-type="string" calcext:value-type="string">
            <text:p>Yes</text:p>
          </table:table-cell>
          <table:table-cell table:style-name="ce45" office:value-type="string" calcext:value-type="string">
            <text:p>No hazardous material allowed. You must dispose of it yourself </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VO201</text:p>
          </table:table-cell>
          <table:table-cell table:style-name="ce44" office:value-type="string" calcext:value-type="string">
            <text:p>Liam Jones</text:p>
          </table:table-cell>
          <table:table-cell table:style-name="ce44" table:content-validation-name="val2" office:value-type="string" calcext:value-type="string">
            <text:p>Scott Middleton</text:p>
          </table:table-cell>
          <table:table-cell table:style-name="ce44" office:value-type="string" calcext:value-type="string">
            <text:p>300 S Fish Lake Rd. Volo Il. 60073 <text:s/></text:p>
          </table:table-cell>
          <table:table-cell table:style-name="ce44" office:value-type="string" calcext:value-type="string">
            <text:p>Yes</text:p>
          </table:table-cell>
          <table:table-cell table:style-name="ce44" office:value-type="string" calcext:value-type="string">
            <text:p>Standard Height</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request made through site DCM for building and DCAT access. </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hard toe shoes, hard hat, reflective vest. (only required if accessing the data hall during build out)</text:p>
          </table:table-cell>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number-columns-repeated="2"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862-325-6142</text:p>
          </table:table-cell>
          <table:table-cell table:style-name="ce44" office:value-type="string" calcext:value-type="string">
            <text:p>smiddleton@coreweave.com</text:p>
          </table:table-cell>
          <table:table-cell table:style-name="ce44"/>
          <table:table-cell table:style-name="ce44" office:value-type="string" calcext:value-type="string">
            <text:p>Yes</text:p>
          </table:table-cell>
          <table:table-cell table:style-name="ce44" office:value-type="string" calcext:value-type="string">
            <text:p>delivery times 8:30AM - 3:30PM CST. No weekends or holidays</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4"/>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space permitting in storeroom. Limit it to 2 weeks early.</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WCI01</text:p>
          </table:table-cell>
          <table:table-cell table:style-name="ce45" office:value-type="string" calcext:value-type="string">
            <text:p>Liam Jones</text:p>
          </table:table-cell>
          <table:table-cell table:style-name="ce45" table:content-validation-name="val2" office:value-type="string" calcext:value-type="string">
            <text:p>Scott Middleton</text:p>
          </table:table-cell>
          <table:table-cell table:style-name="ce45" office:value-type="string" calcext:value-type="string">
            <text:p>603 Discovery Dr. West Chicago, IL 60185 </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request made through site DCM for building and DCAT access. </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hard toe shoes, hard hat, reflective vest. (only required if accessing the data hall during build out)</text:p>
          </table:table-cell>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862-325-6142</text:p>
          </table:table-cell>
          <table:table-cell table:style-name="ce45" office:value-type="string" calcext:value-type="string">
            <text:p>smiddleton@coreweave.com</text:p>
          </table:table-cell>
          <table:table-cell table:style-name="ce45"/>
          <table:table-cell table:style-name="ce45" office:value-type="string" calcext:value-type="string">
            <text:p>Yes</text:p>
          </table:table-cell>
          <table:table-cell table:style-name="ce45" office:value-type="string" calcext:value-type="string">
            <text:p>delivery times 8:30AM - 3:30PM CST. No weekends or holidays</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space permitting in storeroom. Limit it to 2 weeks early.</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WJQ01</text:p>
          </table:table-cell>
          <table:table-cell table:style-name="ce44" office:value-type="string" calcext:value-type="string">
            <text:p>Liam Jones</text:p>
          </table:table-cell>
          <table:table-cell table:style-name="ce44" table:content-validation-name="val2" office:value-type="string" calcext:value-type="string">
            <text:p>Xavier Adams</text:p>
          </table:table-cell>
          <table:table-cell table:style-name="ce44" office:value-type="string" calcext:value-type="string">
            <text:p>1919 Park Ave, Weehawken, NJ 07086</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Not for deliveries </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float" office:value="9737150079" calcext:value-type="float">
            <text:p>9737150079</text:p>
          </table:table-cell>
          <table:table-cell table:style-name="ce44" office:value-type="string" calcext:value-type="string">
            <text:p>xadams@coreweave.com</text:p>
          </table:table-cell>
          <table:table-cell table:style-name="ce44" office:value-type="string" calcext:value-type="string">
            <text:p>24 hours</text:p>
          </table:table-cell>
          <table:table-cell table:style-name="ce44" office:value-type="string" calcext:value-type="string">
            <text:p>Yes</text:p>
          </table:table-cell>
          <table:table-cell table:style-name="ce44" office:value-type="string" calcext:value-type="string">
            <text:p>8am-4pm</text:p>
          </table:table-cell>
          <table:table-cell table:number-columns-repeated="2" table:style-name="ce44" office:value-type="string" calcext:value-type="string">
            <text:p>Yes</text:p>
          </table:table-cell>
          <table:table-cell table:style-name="ce44" office:value-type="string" calcext:value-type="string">
            <text:p>Yes but it needs specific etas to reach deadlines only for emergencies if not standard shipping only</text:p>
          </table:table-cell>
          <table:table-cell table:style-name="ce44" office:value-type="string" calcext:value-type="string">
            <text:p>Yes</text:p>
          </table:table-cell>
          <table:table-cell table:style-name="ce44" office:value-type="string" calcext:value-type="string">
            <text:p>Liam Jones. <text:s/>862-222-8257</text:p>
          </table:table-cell>
          <table:table-cell table:style-name="ce44" office:value-type="string" calcext:value-type="string">
            <text:p>TBD</text:p>
          </table:table-cell>
          <table:table-cell table:style-name="ce44" table:number-columns-repeated="2"/>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Small 10x10 secure storage space within shipping bay</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DK-SVL01</text:p>
          </table:table-cell>
          <table:table-cell table:style-name="ce45" office:value-type="string" calcext:value-type="string">
            <text:p>Rhys Lopez-Lloyd</text:p>
          </table:table-cell>
          <table:table-cell table:style-name="ce45" table:content-validation-name="val2"/>
          <table:table-cell table:style-name="ce45" office:value-type="string" calcext:value-type="string">
            <text:p>Tonsbakken 12, 2740 Skovlunde, Denmark</text:p>
          </table:table-cell>
          <table:table-cell table:style-name="ce45" table:number-columns-repeated="47"/>
          <table:table-cell table:number-columns-repeated="973"/>
        </table:table-row>
        <table:table-row table:style-name="ro1">
          <table:table-cell table:style-name="ce44" office:value-type="string" calcext:value-type="string">
            <text:p>ES-AVQ01</text:p>
          </table:table-cell>
          <table:table-cell table:style-name="ce44" office:value-type="string" calcext:value-type="string">
            <text:p>Rhys Lopez-Lloyd</text:p>
          </table:table-cell>
          <table:table-cell table:style-name="ce44" table:content-validation-name="val2" office:value-type="string" calcext:value-type="string">
            <text:p>Tamara Beisti</text:p>
          </table:table-cell>
          <table:table-cell table:style-name="ce44" office:value-type="string" calcext:value-type="string">
            <text:p>Plataforma Logístíca ARASUR, Avenida Ribera Baja 01213, Rivabellosa, Álava, Spain.</text:p>
          </table:table-cell>
          <table:table-cell table:style-name="ce44" office:value-type="string" calcext:value-type="string">
            <text:p>Yes</text:p>
          </table:table-cell>
          <table:table-cell table:style-name="ce44" office:value-type="string" calcext:value-type="string">
            <text:p>Ground Level</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they have to say they come for Coreweave.</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Helmet, vest, safety shoes and gloves</text:p>
          </table:table-cell>
          <table:table-cell table:number-columns-repeated="3"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style-name="ce51" office:value-type="string" calcext:value-type="string">
            <text:p>Don't have a work phone number, i use my personal one.</text:p>
          </table:table-cell>
          <table:table-cell table:style-name="ce44" office:value-type="string" calcext:value-type="string">
            <text:p>tbeisti@coreweave.com</text:p>
          </table:table-cell>
          <table:table-cell table:style-name="ce44" office:value-type="string" calcext:value-type="string">
            <text:p>2-3 days</text:p>
          </table:table-cell>
          <table:table-cell table:style-name="ce44" office:value-type="string" calcext:value-type="string">
            <text:p>Yes</text:p>
          </table:table-cell>
          <table:table-cell table:style-name="ce44" office:value-type="string" calcext:value-type="string">
            <text:p>From 9 to 13</text:p>
          </table:table-cell>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table-cell table:style-name="ce44" office:value-type="string" calcext:value-type="string">
            <text:p>capacity of 2 european pallets or 1, hardly 2 american pallets</text:p>
          </table:table-cell>
          <table:table-cell table:style-name="ce44" table:number-columns-repeated="2"/>
          <table:table-cell table:style-name="ce44" office:value-type="string" calcext:value-type="string">
            <text:p>No</text:p>
          </table:table-cell>
          <table:table-cell table:style-name="ce44" office:value-type="string" calcext:value-type="string">
            <text:p>Indoors</text:p>
          </table:table-cell>
          <table:table-cell table:number-columns-repeated="2" table:style-name="ce44" office:value-type="string" calcext:value-type="string">
            <text:p>No</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ES-BCN02</text:p>
          </table:table-cell>
          <table:table-cell table:style-name="ce45" office:value-type="string" calcext:value-type="string">
            <text:p>Rhys Lopez-Lloyd</text:p>
          </table:table-cell>
          <table:table-cell table:style-name="ce45" table:content-validation-name="val2"/>
          <table:table-cell table:style-name="ce45" office:value-type="string" calcext:value-type="string">
            <text:p>Carrer de l’Acer 30–32, Barcelona, 08038, Spain.</text:p>
          </table:table-cell>
          <table:table-cell table:style-name="ce45" table:number-columns-repeated="47"/>
          <table:table-cell table:number-columns-repeated="973"/>
        </table:table-row>
        <table:table-row table:style-name="ro1">
          <table:table-cell table:style-name="ce44" office:value-type="string" calcext:value-type="string">
            <text:p>SE-FAN01</text:p>
          </table:table-cell>
          <table:table-cell table:style-name="ce44" office:value-type="string" calcext:value-type="string">
            <text:p>Rhys Lopez-Lloyd</text:p>
          </table:table-cell>
          <table:table-cell table:style-name="ce44" table:content-validation-name="val2" office:value-type="string" calcext:value-type="string">
            <text:p>Zain Nasir</text:p>
          </table:table-cell>
          <table:table-cell table:style-name="ce44" office:value-type="string" calcext:value-type="string">
            <text:p>Slaggvarpsvägen 21, 791 77 Falun, Sweden.</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If it's only a delivery for example FedEx, UPS they do not need badges. But if the delivery is white gloves and they need to enter our dock area, we need to get badges for them from the security.</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Safety vest, safety shoes, gloves, safety glasses</text:p>
          </table:table-cell>
          <table:table-cell table:style-name="ce44" office:value-type="string" calcext:value-type="string">
            <text:p>No</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style-name="ce44" table:formula="of:=+46700364088 (not work)" office:value-type="string" office:string-value="" calcext:value-type="error">
            <text:p>Err:509</text:p>
          </table:table-cell>
          <table:table-cell table:style-name="ce44" office:value-type="string" calcext:value-type="string">
            <text:p>znasir@coreweave.com</text:p>
          </table:table-cell>
          <table:table-cell table:style-name="ce44" office:value-type="string" calcext:value-type="string">
            <text:p>1 day before</text:p>
          </table:table-cell>
          <table:table-cell table:style-name="ce44" office:value-type="string" calcext:value-type="string">
            <text:p>No</text:p>
          </table:table-cell>
          <table:table-cell table:style-name="ce44"/>
          <table:table-cell table:number-columns-repeated="2" table:style-name="ce44" office:value-type="string" calcext:value-type="string">
            <text:p>Yes</text:p>
          </table:table-cell>
          <table:table-cell table:style-name="ce44" office:value-type="string" calcext:value-type="string">
            <text:p>We need notify the landlord for any urgencies.</text:p>
          </table:table-cell>
          <table:table-cell table:style-name="ce44" office:value-type="string" calcext:value-type="string">
            <text:p>No</text:p>
          </table:table-cell>
          <table:table-cell table:style-name="ce44" table:number-columns-repeated="4"/>
          <table:table-cell table:style-name="ce44" office:value-type="string" calcext:value-type="string">
            <text:p>No</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number-columns-repeated="2" table:style-name="ce44" office:value-type="string" calcext:value-type="string">
            <text:p>Yes</text:p>
          </table:table-cell>
          <table:table-cell table:style-name="ce44" office:value-type="string" calcext:value-type="string">
            <text:p>Electronic waste needs to be sorted separately.</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SE-SKH01</text:p>
          </table:table-cell>
          <table:table-cell table:style-name="ce45" office:value-type="string" calcext:value-type="string">
            <text:p>Rhys Lopez-Lloyd</text:p>
          </table:table-cell>
          <table:table-cell table:style-name="ce45" table:content-validation-name="val2"/>
          <table:table-cell table:style-name="ce45" office:value-type="string" calcext:value-type="string">
            <text:p>Stensätravägen 6, 127 39 Skärholmen, Sweden</text:p>
          </table:table-cell>
          <table:table-cell table:style-name="ce45" table:number-columns-repeated="47"/>
          <table:table-cell table:number-columns-repeated="973"/>
        </table:table-row>
        <table:table-row table:style-name="ro1">
          <table:table-cell table:style-name="ce44" office:value-type="string" calcext:value-type="string">
            <text:p>US-KWO01</text:p>
          </table:table-cell>
          <table:table-cell table:style-name="ce44" office:value-type="string" calcext:value-type="string">
            <text:p>Liam Jones</text:p>
          </table:table-cell>
          <table:table-cell table:style-name="ce44" table:content-validation-name="val2"/>
          <table:table-cell table:style-name="ce44" office:value-type="string" calcext:value-type="string">
            <text:p>2000 Galloping Hill Rd, Kenilworth, NJ 07033</text:p>
          </table:table-cell>
          <table:table-cell table:style-name="ce44" table:number-columns-repeated="47"/>
          <table:table-cell table:number-columns-repeated="973"/>
        </table:table-row>
        <table:table-row table:style-name="ro1">
          <table:table-cell table:style-name="ce45" office:value-type="string" calcext:value-type="string">
            <text:p>US-LZL01</text:p>
          </table:table-cell>
          <table:table-cell table:style-name="ce45" office:value-type="string" calcext:value-type="string">
            <text:p>Juan Martinez</text:p>
          </table:table-cell>
          <table:table-cell table:style-name="ce45" table:content-validation-name="val2" office:value-type="string" calcext:value-type="string">
            <text:p>John Sauer</text:p>
          </table:table-cell>
          <table:table-cell table:style-name="ce45" office:value-type="string" calcext:value-type="string">
            <text:p>9663 87th Ave SE, Ellendale, ND 58436</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No</text:p>
          </table:table-cell>
          <table:table-cell table:style-name="ce49" office:value-type="string" calcext:value-type="string">
            <text:p>Yes</text:p>
          </table:table-cell>
          <table:table-cell table:style-name="ce49" office:value-type="string" calcext:value-type="string">
            <text:p>mantrap for vehicles to get on site, security badge and pin number to enter facility, security badge and biometric plus mantrap to enter beyond lobby</text:p>
          </table:table-cell>
          <table:table-cell table:number-columns-repeated="3" table:style-name="ce49" office:value-type="string" calcext:value-type="string">
            <text:p>Yes</text:p>
          </table:table-cell>
          <table:table-cell table:style-name="ce49" office:value-type="string" calcext:value-type="string">
            <text:p>high-vis vest, safety glasses, hard hat, steel or composite toe shoes all required, hearing protection is situational</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style-name="ce45" office:value-type="float" office:value="9734192505" calcext:value-type="float">
            <text:p>9734192505</text:p>
          </table:table-cell>
          <table:table-cell table:style-name="ce45" office:value-type="string" calcext:value-type="string">
            <text:p>jsauer@coreweave.com</text:p>
          </table:table-cell>
          <table:table-cell table:style-name="ce45"/>
          <table:table-cell table:style-name="ce45" office:value-type="string" calcext:value-type="string">
            <text:p>Yes</text:p>
          </table:table-cell>
          <table:table-cell table:style-name="ce45" office:value-type="string" calcext:value-type="string">
            <text:p>0800-1600, M-F</text:p>
          </table:table-cell>
          <table:table-cell table:number-columns-repeated="2" table:style-name="ce45" office:value-type="string" calcext:value-type="string">
            <text:p>No</text:p>
          </table:table-cell>
          <table:table-cell table:style-name="ce45"/>
          <table:table-cell table:style-name="ce45" office:value-type="string" calcext:value-type="string">
            <text:p>No</text:p>
          </table:table-cell>
          <table:table-cell table:style-name="ce45" table:number-columns-repeated="4"/>
          <table:table-cell table:style-name="ce45" office:value-type="string" calcext:value-type="string">
            <text:p>Yes</text:p>
          </table:table-cell>
          <table:table-cell table:style-name="ce45" office:value-type="string" calcext:value-type="string">
            <text:p>Indoors</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MKO01</text:p>
          </table:table-cell>
          <table:table-cell table:style-name="ce44"/>
          <table:table-cell table:style-name="ce44" table:content-validation-name="val2"/>
          <table:table-cell table:style-name="ce44" office:value-type="string" calcext:value-type="string">
            <text:p>4901 HaroldScoggins Dr, Muskogee, OK 74403</text:p>
          </table:table-cell>
          <table:table-cell table:style-name="ce44" table:number-columns-repeated="47"/>
          <table:table-cell table:number-columns-repeated="973"/>
        </table:table-row>
        <table:table-row table:style-name="ro1">
          <table:table-cell table:style-name="ce45" office:value-type="string" calcext:value-type="string">
            <text:p>US-NKQ01</text:p>
          </table:table-cell>
          <table:table-cell table:style-name="ce45" office:value-type="string" calcext:value-type="string">
            <text:p>Juan Martinez</text:p>
          </table:table-cell>
          <table:table-cell table:style-name="ce45" table:content-validation-name="val2" office:value-type="string" calcext:value-type="string">
            <text:p>Bryan Ennis</text:p>
          </table:table-cell>
          <table:table-cell table:style-name="ce45" office:value-type="string" calcext:value-type="string">
            <text:p>39800 Eureka Drive, Newark, CA 94560.</text:p>
          </table:table-cell>
          <table:table-cell table:style-name="ce45" office:value-type="string" calcext:value-type="string">
            <text:p>Yes</text:p>
          </table:table-cell>
          <table:table-cell table:style-name="ce45" office:value-type="string" calcext:value-type="string">
            <text:p>Standard Height</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style-name="ce45"/>
          <table:table-cell table:number-columns-repeated="2" table:style-name="ce45" office:value-type="string" calcext:value-type="string">
            <text:p>No</text:p>
          </table:table-cell>
          <table:table-cell table:style-name="ce45"/>
          <table:table-cell table:number-columns-repeated="3" table:style-name="ce45" office:value-type="string" calcext:value-type="string">
            <text:p>No</text:p>
          </table:table-cell>
          <table:table-cell table:style-name="ce45"/>
          <table:table-cell table:style-name="ce45" office:value-type="string" calcext:value-type="string">
            <text:p>No</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number-columns-repeated="2"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862-485-9857</text:p>
          </table:table-cell>
          <table:table-cell table:style-name="ce45" office:value-type="string" calcext:value-type="string">
            <text:p>bennis@coreweave.com</text:p>
          </table:table-cell>
          <table:table-cell table:style-name="ce45"/>
          <table:table-cell table:style-name="ce45" office:value-type="string" calcext:value-type="string">
            <text:p>Yes</text:p>
          </table:table-cell>
          <table:table-cell table:style-name="ce45" office:value-type="string" calcext:value-type="string">
            <text:p>&amp;:00AM-4:00PM Monday-Friday</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Please contact the DCM or myself</text:p>
          </table:table-cell>
          <table:table-cell table:style-name="ce45" office:value-type="string" calcext:value-type="string">
            <text:p>No</text:p>
          </table:table-cell>
          <table:table-cell table:style-name="ce45" table:number-columns-repeated="4"/>
          <table:table-cell table:style-name="ce45" office:value-type="string" calcext:value-type="string">
            <text:p>No</text:p>
          </table:table-cell>
          <table:table-cell table:style-name="ce45" office:value-type="string" calcext:value-type="string">
            <text:p>Indoor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Please see MFCP</text:p>
          </table:table-cell>
          <table:table-cell table:style-name="ce45" office:value-type="string" calcext:value-type="string">
            <text:p>Yes</text:p>
          </table:table-cell>
          <table:table-cell table:style-name="ce45" office:value-type="string" calcext:value-type="string">
            <text:p>No</text:p>
          </table:table-cell>
          <table:table-cell table:style-name="ce45"/>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NNN01</text:p>
          </table:table-cell>
          <table:table-cell table:style-name="ce44" office:value-type="string" calcext:value-type="string">
            <text:p>Juan Martinez</text:p>
          </table:table-cell>
          <table:table-cell table:style-name="ce44" table:content-validation-name="val2" office:value-type="string" calcext:value-type="string">
            <text:p>Michael Rayburn</text:p>
          </table:table-cell>
          <table:table-cell table:style-name="ce44" office:value-type="string" calcext:value-type="string">
            <text:p>6961 S Quentin St, Centennial, CO 80112.</text:p>
          </table:table-cell>
          <table:table-cell table:style-name="ce44" office:value-type="string" calcext:value-type="string">
            <text:p>Yes</text:p>
          </table:table-cell>
          <table:table-cell table:style-name="ce44" office:value-type="string" calcext:value-type="string">
            <text:p>Standard Height</text:p>
          </table:table-cell>
          <table:table-cell table:number-columns-repeated="2" table:style-name="ce44" office:value-type="string" calcext:value-type="string">
            <text:p>Yes</text:p>
          </table:table-cell>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table-cell table:style-name="ce44" office:value-type="string" calcext:value-type="string">
            <text:p>No</text:p>
          </table:table-cell>
          <table:table-cell table:style-name="ce44" office:value-type="string" calcext:value-type="string">
            <text:p>Yes</text:p>
          </table:table-cell>
          <table:table-cell table:number-columns-repeated="2" table:style-name="ce44" office:value-type="string" calcext:value-type="string">
            <text:p>No</text:p>
          </table:table-cell>
          <table:table-cell table:style-name="ce44" office:value-type="string" calcext:value-type="string">
            <text:p>Yes</text:p>
          </table:table-cell>
          <table:table-cell table:number-columns-repeated="3" table:style-name="ce44" office:value-type="string" calcext:value-type="string">
            <text:p>No</text:p>
          </table:table-cell>
          <table:table-cell table:style-name="ce44" office:value-type="float" office:value="9735189786" calcext:value-type="float">
            <text:p>9735189786</text:p>
          </table:table-cell>
          <table:table-cell table:style-name="ce44" office:value-type="string" calcext:value-type="string">
            <text:p>mrayburn@coreweave.com</text:p>
          </table:table-cell>
          <table:table-cell table:style-name="ce44"/>
          <table:table-cell table:style-name="ce44" office:value-type="string" calcext:value-type="string">
            <text:p>No</text:p>
          </table:table-cell>
          <table:table-cell table:style-name="ce44"/>
          <table:table-cell table:number-columns-repeated="2" table:style-name="ce44" office:value-type="string" calcext:value-type="string">
            <text:p>No</text:p>
          </table:table-cell>
          <table:table-cell table:style-name="ce44"/>
          <table:table-cell table:style-name="ce44" office:value-type="string" calcext:value-type="string">
            <text:p>No</text:p>
          </table:table-cell>
          <table:table-cell table:style-name="ce44" table:number-columns-repeated="4"/>
          <table:table-cell table:style-name="ce44" office:value-type="string" calcext:value-type="string">
            <text:p>Yes</text:p>
          </table:table-cell>
          <table:table-cell table:style-name="ce44" office:value-type="string" calcext:value-type="string">
            <text:p>Indoors</text:p>
          </table:table-cell>
          <table:table-cell table:style-name="ce44" office:value-type="string" calcext:value-type="string">
            <text:p>No</text:p>
          </table:table-cell>
          <table:table-cell table:style-name="ce44" office:value-type="string" calcext:value-type="string">
            <text:p>Yes</text:p>
          </table:table-cell>
          <table:table-cell table:style-name="ce44"/>
          <table:table-cell table:style-name="ce44" office:value-type="string" calcext:value-type="string">
            <text:p>Yes</text:p>
          </table:table-cell>
          <table:table-cell table:style-name="ce44" office:value-type="string" calcext:value-type="string">
            <text:p>No</text:p>
          </table:table-cell>
          <table:table-cell table:style-name="ce44"/>
          <table:table-cell table:number-columns-repeated="3" table:style-name="ce44" office:value-type="string" calcext:value-type="string">
            <text:p>No</text:p>
          </table:table-cell>
          <table:table-cell table:style-name="ce44" table:number-columns-repeated="2"/>
          <table:table-cell table:number-columns-repeated="973"/>
        </table:table-row>
        <table:table-row table:style-name="ro1">
          <table:table-cell table:style-name="ce45" office:value-type="string" calcext:value-type="string">
            <text:p>US-PPY01</text:p>
          </table:table-cell>
          <table:table-cell table:style-name="ce45" office:value-type="string" calcext:value-type="string">
            <text:p>Liam Jones</text:p>
          </table:table-cell>
          <table:table-cell table:style-name="ce46" table:content-validation-name="val2" office:value-type="string" calcext:value-type="string">
            <text:p>Raymond Fuller</text:p>
          </table:table-cell>
          <table:table-cell table:style-name="ce45" office:value-type="string" calcext:value-type="string">
            <text:p>200 Webro Rd, Parsippany, NJ 07054.</text:p>
          </table:table-cell>
          <table:table-cell table:style-name="ce45" office:value-type="string" calcext:value-type="string">
            <text:p>Yes</text:p>
          </table:table-cell>
          <table:table-cell table:style-name="ce45" office:value-type="string" calcext:value-type="string">
            <text:p>Standard Height</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table-cell table:number-columns-repeated="2" table:style-name="ce45" office:value-type="string" calcext:value-type="string">
            <text:p>Yes</text:p>
          </table:table-cell>
          <table:table-cell table:style-name="ce45" office:value-type="string" calcext:value-type="string">
            <text:p>Cologix requires ID if the visitor is not a permanent employee at the site and wants to come inside the DC. No ID required for deliveries.</text:p>
          </table:table-cell>
          <table:table-cell table:number-columns-repeated="2"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We are currently in a build and are still waiting for heavy equipment to arrive.</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style-name="ce45" office:value-type="string" calcext:value-type="string">
            <text:p>No</text:p>
          </table:table-cell>
          <table:table-cell table:number-columns-repeated="2" table:style-name="ce45" office:value-type="string" calcext:value-type="string">
            <text:p>Yes</text:p>
          </table:table-cell>
          <table:table-cell table:number-columns-repeated="2" table:style-name="ce45" office:value-type="string" calcext:value-type="string">
            <text:p>No</text:p>
          </table:table-cell>
          <table:table-cell table:style-name="ce45" office:value-type="string" calcext:value-type="string">
            <text:p>973-270-8250</text:p>
          </table:table-cell>
          <table:table-cell table:style-name="ce45" office:value-type="string" calcext:value-type="string">
            <text:p>Rfuller@gmail.com</text:p>
          </table:table-cell>
          <table:table-cell table:style-name="ce45" office:value-type="string" calcext:value-type="string">
            <text:p>The delivery schedule is from 8:00 AM - 6:00 PM</text:p>
          </table:table-cell>
          <table:table-cell table:style-name="ce45" office:value-type="string" calcext:value-type="string">
            <text:p>Yes</text:p>
          </table:table-cell>
          <table:table-cell table:style-name="ce45" office:value-type="string" calcext:value-type="string">
            <text:p>The delivery schedule is from 8:00 AM - 6:00 PM | Monday - Friday</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Cologix will receive pallets when we are not on site, however they do not have space for many pallets outside our temp and perm storage</text:p>
          </table:table-cell>
          <table:table-cell table:style-name="ce45" office:value-type="string" calcext:value-type="string">
            <text:p>Yes</text:p>
          </table:table-cell>
          <table:table-cell table:style-name="ce45" office:value-type="string" calcext:value-type="string">
            <text:p>Ray Fuller 973-270-8250. Matthew Forsyth 973-896-9567</text:p>
          </table:table-cell>
          <table:table-cell table:style-name="ce45" table:number-columns-repeated="3"/>
          <table:table-cell table:style-name="ce45" office:value-type="string" calcext:value-type="string">
            <text:p>Yes</text:p>
          </table:table-cell>
          <table:table-cell table:style-name="ce45" office:value-type="string" calcext:value-type="string">
            <text:p>Outdoors</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Cologix will receive pallets if we are not on site, but are limited in space outside our storage unit. Large deliveries outside CW work hours are not recommended.</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Not to my knowledge</text:p>
          </table:table-cell>
          <table:table-cell table:style-name="ce45" office:value-type="string" calcext:value-type="string">
            <text:p>Yes</text:p>
          </table:table-cell>
          <table:table-cell table:number-columns-repeated="2" table:style-name="ce45" office:value-type="string" calcext:value-type="string">
            <text:p>No</text:p>
          </table:table-cell>
          <table:table-cell table:style-name="ce45" table:number-columns-repeated="2"/>
          <table:table-cell table:number-columns-repeated="973"/>
        </table:table-row>
        <table:table-row table:style-name="ro1">
          <table:table-cell table:style-name="ce44" office:value-type="string" calcext:value-type="string">
            <text:p>US-SKY01</text:p>
          </table:table-cell>
          <table:table-cell table:style-name="ce44" office:value-type="string" calcext:value-type="string">
            <text:p>Liam Jones</text:p>
          </table:table-cell>
          <table:table-cell table:style-name="ce44" table:content-validation-name="val2"/>
          <table:table-cell table:style-name="ce44" office:value-type="string" calcext:value-type="string">
            <text:p>2509 Hayes Ave, Bldg No. 1, Sandusky, OH 44870</text:p>
          </table:table-cell>
          <table:table-cell table:style-name="ce44" table:number-columns-repeated="47"/>
          <table:table-cell table:number-columns-repeated="973"/>
        </table:table-row>
        <table:table-row table:style-name="ro1">
          <table:table-cell table:style-name="ce45" office:value-type="string" calcext:value-type="string">
            <text:p>US-RRX01</text:p>
          </table:table-cell>
          <table:table-cell table:style-name="ce45"/>
          <table:table-cell table:style-name="ce45" table:content-validation-name="val2"/>
          <table:table-cell table:style-name="ce45" office:value-type="string" calcext:value-type="string">
            <text:p>150 Dell Way Round Rock, TX 78664</text:p>
          </table:table-cell>
          <table:table-cell table:style-name="ce45" table:number-columns-repeated="47"/>
          <table:table-cell table:number-columns-repeated="973"/>
        </table:table-row>
        <table:table-row table:style-name="ro1">
          <table:table-cell table:style-name="ce44" office:value-type="string" calcext:value-type="string">
            <text:p>US-LBB01</text:p>
          </table:table-cell>
          <table:table-cell table:style-name="ce44"/>
          <table:table-cell table:style-name="ce44" table:content-validation-name="val2"/>
          <table:table-cell table:style-name="ce44" office:value-type="string" calcext:value-type="string">
            <text:p>984 Co. Road 112, Afton, Dickens County, TX 79220</text:p>
          </table:table-cell>
          <table:table-cell table:style-name="ce44" table:number-columns-repeated="47"/>
          <table:table-cell table:number-columns-repeated="973"/>
        </table:table-row>
        <table:table-row table:style-name="ro1">
          <table:table-cell table:style-name="ce45" office:value-type="string" calcext:value-type="string">
            <text:p>US-TUZ01</text:p>
          </table:table-cell>
          <table:table-cell table:style-name="ce45"/>
          <table:table-cell table:style-name="ce45" table:content-validation-name="val2"/>
          <table:table-cell table:style-name="ce45" table:number-columns-repeated="48"/>
          <table:table-cell table:number-columns-repeated="973"/>
        </table:table-row>
        <table:table-row table:style-name="ro1">
          <table:table-cell table:style-name="ce44" office:value-type="string" calcext:value-type="string">
            <text:p>US-DEN01</text:p>
          </table:table-cell>
          <table:table-cell table:style-name="ce44"/>
          <table:table-cell table:style-name="ce44" table:content-validation-name="val2"/>
          <table:table-cell table:style-name="ce44" office:value-type="string" calcext:value-type="string">
            <text:p>910 15th St, Denver, CO 80202, USA</text:p>
          </table:table-cell>
          <table:table-cell table:style-name="ce44" table:number-columns-repeated="47"/>
          <table:table-cell table:number-columns-repeated="973"/>
        </table:table-row>
        <table:table-row table:style-name="ro1">
          <table:table-cell table:style-name="ce45" office:value-type="string" calcext:value-type="string">
            <text:p>US-LAX01</text:p>
          </table:table-cell>
          <table:table-cell table:style-name="ce45"/>
          <table:table-cell table:style-name="ce45" table:content-validation-name="val2"/>
          <table:table-cell table:style-name="ce45" office:value-type="string" calcext:value-type="string">
            <text:p>624 S Grand Ave, Los Angeles, CA 90017, USA</text:p>
          </table:table-cell>
          <table:table-cell table:style-name="ce45" table:number-columns-repeated="47"/>
          <table:table-cell table:number-columns-repeated="973"/>
        </table:table-row>
        <table:table-row table:style-name="ro1">
          <table:table-cell table:style-name="ce44" office:value-type="string" calcext:value-type="string">
            <text:p>US-SEA01</text:p>
          </table:table-cell>
          <table:table-cell table:style-name="ce44"/>
          <table:table-cell table:style-name="ce44" table:content-validation-name="val2"/>
          <table:table-cell table:style-name="ce44" office:value-type="string" calcext:value-type="string">
            <text:p>2001 6th Ave #300, Seattle, WA 98121, USA</text:p>
          </table:table-cell>
          <table:table-cell table:style-name="ce44" table:number-columns-repeated="47"/>
          <table:table-cell table:number-columns-repeated="973"/>
        </table:table-row>
        <table:table-row table:style-name="ro1">
          <table:table-cell table:style-name="ce45" office:value-type="string" calcext:value-type="string">
            <text:p>US-QAS01</text:p>
          </table:table-cell>
          <table:table-cell table:style-name="ce45"/>
          <table:table-cell table:style-name="ce45" table:content-validation-name="val2"/>
          <table:table-cell table:style-name="ce45" office:value-type="string" calcext:value-type="string">
            <text:p>21715 Filigree Ct, Ashburn, VA 20147, USA</text:p>
          </table:table-cell>
          <table:table-cell table:style-name="ce45" table:number-columns-repeated="47"/>
          <table:table-cell table:number-columns-repeated="973"/>
        </table:table-row>
        <table:table-row table:style-name="ro1">
          <table:table-cell table:style-name="ce44" office:value-type="string" calcext:value-type="string">
            <text:p>US-ATL03</text:p>
          </table:table-cell>
          <table:table-cell table:style-name="ce44"/>
          <table:table-cell table:style-name="ce44" table:content-validation-name="val2"/>
          <table:table-cell table:style-name="ce44" office:value-type="string" calcext:value-type="string">
            <text:p>180 Peachtree St, Atlanta, GA 30303, USA</text:p>
          </table:table-cell>
          <table:table-cell table:style-name="ce44" table:number-columns-repeated="47"/>
          <table:table-cell table:number-columns-repeated="973"/>
        </table:table-row>
        <table:table-row table:style-name="ro1">
          <table:table-cell table:style-name="ce45" office:value-type="string" calcext:value-type="string">
            <text:p>US-CHI01</text:p>
          </table:table-cell>
          <table:table-cell table:style-name="ce45"/>
          <table:table-cell table:style-name="ce45" table:content-validation-name="val2"/>
          <table:table-cell table:style-name="ce45" office:value-type="string" calcext:value-type="string">
            <text:p>CoreWeave c/o Equinix, 350 E Cermak Rd, Chicago, IL 60616, USA</text:p>
          </table:table-cell>
          <table:table-cell table:style-name="ce45" table:number-columns-repeated="47"/>
          <table:table-cell table:number-columns-repeated="973"/>
        </table:table-row>
        <table:table-row table:style-name="ro1">
          <table:table-cell table:style-name="ce44" office:value-type="string" calcext:value-type="string">
            <text:p>US-PHL01</text:p>
          </table:table-cell>
          <table:table-cell table:style-name="ce44"/>
          <table:table-cell table:style-name="ce44" table:content-validation-name="val2"/>
          <table:table-cell table:style-name="ce44" office:value-type="string" calcext:value-type="string">
            <text:p>401 N Broad St, Philadelphia, PA 19108, USA</text:p>
          </table:table-cell>
          <table:table-cell table:style-name="ce44" table:number-columns-repeated="47"/>
          <table:table-cell table:number-columns-repeated="973"/>
        </table:table-row>
        <table:table-row table:style-name="ro1">
          <table:table-cell table:style-name="ce45" office:value-type="string" calcext:value-type="string">
            <text:p>US-QTS01</text:p>
          </table:table-cell>
          <table:table-cell table:style-name="ce45"/>
          <table:table-cell table:style-name="ce45" table:content-validation-name="val2"/>
          <table:table-cell table:style-name="ce45" office:value-type="string" calcext:value-type="string">
            <text:p>CoreWeave c/o QTS, 335 Inverness Dr S, Englewood, CO 80112, USA</text:p>
          </table:table-cell>
          <table:table-cell table:style-name="ce45" table:number-columns-repeated="47"/>
          <table:table-cell table:number-columns-repeated="973"/>
        </table:table-row>
        <table:table-row table:style-name="ro1">
          <table:table-cell table:style-name="ce44" office:value-type="string" calcext:value-type="string">
            <text:p>US-SEA02</text:p>
          </table:table-cell>
          <table:table-cell table:style-name="ce44"/>
          <table:table-cell table:style-name="ce44" table:content-validation-name="val2"/>
          <table:table-cell table:style-name="ce44" office:value-type="string" calcext:value-type="string">
            <text:p>2001 6th Ave #350, Seattle, WA 98121, USA</text:p>
          </table:table-cell>
          <table:table-cell table:style-name="ce44" table:number-columns-repeated="47"/>
          <table:table-cell table:number-columns-repeated="973"/>
        </table:table-row>
        <table:table-row table:style-name="ro1">
          <table:table-cell table:style-name="ce45" office:value-type="string" calcext:value-type="string">
            <text:p>US-SJC01</text:p>
          </table:table-cell>
          <table:table-cell table:style-name="ce45"/>
          <table:table-cell table:style-name="ce45" table:content-validation-name="val2"/>
          <table:table-cell table:style-name="ce45" office:value-type="string" calcext:value-type="string">
            <text:p>11 Great Oaks Blvd, San Jose, CA 95119, USA</text:p>
          </table:table-cell>
          <table:table-cell table:style-name="ce45" table:number-columns-repeated="47"/>
          <table:table-cell table:number-columns-repeated="973"/>
        </table:table-row>
        <table:table-row table:style-name="ro1">
          <table:table-cell table:style-name="ce44" office:value-type="string" calcext:value-type="string">
            <text:p>US-UYK01</text:p>
          </table:table-cell>
          <table:table-cell table:style-name="ce44"/>
          <table:table-cell table:style-name="ce44" table:content-validation-name="val2"/>
          <table:table-cell table:style-name="ce44" office:value-type="string" calcext:value-type="string">
            <text:p>105 Enterprise Ave S, Secaucus, NJ 07094, USA</text:p>
          </table:table-cell>
          <table:table-cell table:style-name="ce44" table:number-columns-repeated="47"/>
          <table:table-cell table:number-columns-repeated="973"/>
        </table:table-row>
        <table:table-row table:style-name="ro1">
          <table:table-cell table:style-name="ce45" office:value-type="string" calcext:value-type="string">
            <text:p>US-HIO04</text:p>
          </table:table-cell>
          <table:table-cell table:style-name="ce45"/>
          <table:table-cell table:style-name="ce45" table:content-validation-name="val2"/>
          <table:table-cell table:style-name="ce45" office:value-type="string" calcext:value-type="string">
            <text:p>8135 NE Evergreen Pkwy, Hillsboro, OR 97124, USA</text:p>
          </table:table-cell>
          <table:table-cell table:style-name="ce45" table:number-columns-repeated="47"/>
          <table:table-cell table:number-columns-repeated="973"/>
        </table:table-row>
        <table:table-row table:style-name="ro1">
          <table:table-cell table:style-name="ce44" office:value-type="string" calcext:value-type="string">
            <text:p>US-DAL01</text:p>
          </table:table-cell>
          <table:table-cell table:style-name="ce44"/>
          <table:table-cell table:style-name="ce44" table:content-validation-name="val2"/>
          <table:table-cell table:style-name="ce44" office:value-type="string" calcext:value-type="string">
            <text:p>1990 N Stemmons Fwy, Dallas, TX 75207, USA</text:p>
          </table:table-cell>
          <table:table-cell table:style-name="ce44" table:number-columns-repeated="47"/>
          <table:table-cell table:number-columns-repeated="973"/>
        </table:table-row>
        <table:table-row table:style-name="ro1">
          <table:table-cell table:style-name="ce45" office:value-type="string" calcext:value-type="string">
            <text:p>CA-TOR01</text:p>
          </table:table-cell>
          <table:table-cell table:style-name="ce45"/>
          <table:table-cell table:style-name="ce45" table:content-validation-name="val2"/>
          <table:table-cell table:style-name="ce45" office:value-type="string" calcext:value-type="string">
            <text:p>45 Parliament St, Toronto, ON M5A 2Y5, Canada</text:p>
          </table:table-cell>
          <table:table-cell table:style-name="ce45" table:number-columns-repeated="47"/>
          <table:table-cell table:number-columns-repeated="973"/>
        </table:table-row>
        <table:table-row table:style-name="ro1">
          <table:table-cell table:style-name="ce44" office:value-type="string" calcext:value-type="string">
            <text:p>DE-FRA01</text:p>
          </table:table-cell>
          <table:table-cell table:style-name="ce44"/>
          <table:table-cell table:style-name="ce44" table:content-validation-name="val2"/>
          <table:table-cell table:style-name="ce44" office:value-type="string" calcext:value-type="string">
            <text:p>Kleyerstraße 90, 60326 Frankfurt am Main, Germany</text:p>
          </table:table-cell>
          <table:table-cell table:style-name="ce44" table:number-columns-repeated="47"/>
          <table:table-cell table:number-columns-repeated="973"/>
        </table:table-row>
        <table:table-row table:style-name="ro1">
          <table:table-cell table:style-name="ce45" office:value-type="string" calcext:value-type="string">
            <text:p>ES-BCN02</text:p>
          </table:table-cell>
          <table:table-cell table:style-name="ce45"/>
          <table:table-cell table:style-name="ce45" table:content-validation-name="val2"/>
          <table:table-cell table:style-name="ce45" office:value-type="string" calcext:value-type="string">
            <text:p>Carrer de l’Acer 30–32, 08038 Barcelona, Spain</text:p>
          </table:table-cell>
          <table:table-cell table:style-name="ce45" table:number-columns-repeated="47"/>
          <table:table-cell table:number-columns-repeated="973"/>
        </table:table-row>
        <table:table-row table:style-name="ro4" table:number-rows-repeated="1048496">
          <table:table-cell table:number-columns-repeated="1024"/>
        </table:table-row>
        <table:table-row table:style-name="ro4">
          <table:table-cell table:number-columns-repeated="1024"/>
        </table:table-row>
        <table:named-expressions>
          <table:named-range table:name="_xlnm._FilterDatabase" table:base-cell-address="$Dashboard.$A$1" table:cell-range-address="$'Logistics Database'.$A$1:.$AY$79"/>
        </table:named-expressions>
      </table:table>
      <table:table table:name="DC Operations Database" table:style-name="ta3">
        <table:table-column table:style-name="co4" table:number-columns-repeated="2" table:default-cell-style-name="Default"/>
        <table:table-column table:style-name="co15" table:default-cell-style-name="Default"/>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column table:style-name="co19" table:number-columns-repeated="4" table:default-cell-style-name="Default"/>
        <table:table-column table:style-name="co3" table:number-columns-repeated="1012" table:default-cell-style-name="Default"/>
        <table:table-row table:style-name="ro5">
          <table:table-cell table:style-name="ce52" office:value-type="string" calcext:value-type="string">
            <text:p>LOCODE</text:p>
          </table:table-cell>
          <table:table-cell table:style-name="ce52" office:value-type="string" calcext:value-type="string">
            <text:p>Netbox ID</text:p>
          </table:table-cell>
          <table:table-cell table:style-name="ce52" office:value-type="string" calcext:value-type="string">
            <text:p># of Data Halls</text:p>
          </table:table-cell>
          <table:table-cell table:style-name="ce52" office:value-type="string" calcext:value-type="string">
            <text:p># of Active Racks</text:p>
          </table:table-cell>
          <table:table-cell table:style-name="ce52" office:value-type="string" calcext:value-type="string">
            <text:p># of Devices</text:p>
          </table:table-cell>
          <table:table-cell table:style-name="ce52" office:value-type="string" calcext:value-type="string">
            <text:p>Tenant</text:p>
          </table:table-cell>
          <table:table-cell table:style-name="ce52" office:value-type="string" calcext:value-type="string">
            <text:p>DC Site Manager</text:p>
          </table:table-cell>
          <table:table-cell table:style-name="ce52" office:value-type="string" calcext:value-type="string">
            <text:p>DC Area Manager</text:p>
          </table:table-cell>
          <table:table-cell table:style-name="ce52" office:value-type="string" calcext:value-type="string">
            <text:p>DC Regional Manager</text:p>
          </table:table-cell>
          <table:table-cell table:style-name="ce52" office:value-type="string" calcext:value-type="string">
            <text:p>Facility Engineer</text:p>
          </table:table-cell>
          <table:table-cell table:style-name="ce57" table:number-columns-repeated="2"/>
          <table:table-cell table:number-columns-repeated="1012"/>
        </table:table-row>
        <table:table-row table:style-name="ro1">
          <table:table-cell table:style-name="ce53" office:value-type="string" calcext:value-type="string">
            <text:p>CA-GAL01</text:p>
          </table:table-cell>
          <table:table-cell table:style-name="ce53" office:value-type="string" calcext:value-type="string">
            <text:p>CA-EAST-01A</text:p>
          </table:table-cell>
          <table:table-cell table:style-name="ce53" office:value-type="float" office:value="2" calcext:value-type="float">
            <text:p>2</text:p>
          </table:table-cell>
          <table:table-cell table:style-name="ce53" office:value-type="float" office:value="134" calcext:value-type="float">
            <text:p>134</text:p>
          </table:table-cell>
          <table:table-cell table:style-name="ce53" office:value-type="float" office:value="3274" calcext:value-type="float">
            <text:p>3274</text:p>
          </table:table-cell>
          <table:table-cell table:style-name="ce53"/>
          <table:table-cell table:style-name="ce53" office:value-type="string" calcext:value-type="string">
            <text:p>Ram Singh</text:p>
          </table:table-cell>
          <table:table-cell table:style-name="ce53" office:value-type="string" calcext:value-type="string">
            <text:p>Kinzi Stone</text:p>
          </table:table-cell>
          <table:table-cell table:style-name="ce53" office:value-type="string" calcext:value-type="string">
            <text:p>Rodney Ballard</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ES-BCN01</text:p>
          </table:table-cell>
          <table:table-cell table:style-name="ce54" office:value-type="string" calcext:value-type="string">
            <text:p>US-SOUTH-01</text:p>
          </table:table-cell>
          <table:table-cell table:style-name="ce54" office:value-type="float" office:value="2" calcext:value-type="float">
            <text:p>2</text:p>
          </table:table-cell>
          <table:table-cell table:style-name="ce54" office:value-type="float" office:value="442" calcext:value-type="float">
            <text:p>442</text:p>
          </table:table-cell>
          <table:table-cell table:style-name="ce54" office:value-type="float" office:value="1703" calcext:value-type="float">
            <text:p>1703</text:p>
          </table:table-cell>
          <table:table-cell table:style-name="ce54"/>
          <table:table-cell table:style-name="ce54" office:value-type="string" calcext:value-type="string">
            <text:p>Yoann Herembourg</text:p>
          </table:table-cell>
          <table:table-cell table:style-name="ce54" office:value-type="string" calcext:value-type="string">
            <text:p>Marcos Montoro Riestra</text:p>
          </table:table-cell>
          <table:table-cell table:style-name="ce54" office:value-type="string" calcext:value-type="string">
            <text:p>N/A</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ES-BCN03</text:p>
          </table:table-cell>
          <table:table-cell table:style-name="ce53" office:value-type="string" calcext:value-type="string">
            <text:p>EU-SOUTH-03B, EU-SOUTH-03A</text:p>
          </table:table-cell>
          <table:table-cell table:style-name="ce53" office:value-type="float" office:value="5" calcext:value-type="float">
            <text:p>5</text:p>
          </table:table-cell>
          <table:table-cell table:style-name="ce53" office:value-type="float" office:value="640" calcext:value-type="float">
            <text:p>640</text:p>
          </table:table-cell>
          <table:table-cell table:style-name="ce53" office:value-type="float" office:value="3863" calcext:value-type="float">
            <text:p>3863</text:p>
          </table:table-cell>
          <table:table-cell table:style-name="ce53"/>
          <table:table-cell table:style-name="ce53" office:value-type="string" calcext:value-type="string">
            <text:p>Basilio Saez Sanchez</text:p>
          </table:table-cell>
          <table:table-cell table:style-name="ce53" office:value-type="string" calcext:value-type="string">
            <text:p>Marcos Montoro Riestra </text:p>
          </table:table-cell>
          <table:table-cell table:style-name="ce53" office:value-type="string" calcext:value-type="string">
            <text:p>N/A</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GB-CWY01</text:p>
          </table:table-cell>
          <table:table-cell table:style-name="ce54" office:value-type="string" calcext:value-type="string">
            <text:p>EU-WEST-01</text:p>
          </table:table-cell>
          <table:table-cell table:style-name="ce54" office:value-type="float" office:value="3" calcext:value-type="float">
            <text:p>3</text:p>
          </table:table-cell>
          <table:table-cell table:style-name="ce54" office:value-type="float" office:value="602" calcext:value-type="float">
            <text:p>602</text:p>
          </table:table-cell>
          <table:table-cell table:style-name="ce54" office:value-type="float" office:value="2153" calcext:value-type="float">
            <text:p>2153</text:p>
          </table:table-cell>
          <table:table-cell table:style-name="ce54"/>
          <table:table-cell table:style-name="ce54" office:value-type="string" calcext:value-type="string">
            <text:p>Loyd Alappatt</text:p>
          </table:table-cell>
          <table:table-cell table:style-name="ce54" office:value-type="string" calcext:value-type="string">
            <text:p>Liam Rabey</text:p>
          </table:table-cell>
          <table:table-cell table:style-name="ce54" office:value-type="string" calcext:value-type="string">
            <text:p>N/A</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GB-PPL01</text:p>
          </table:table-cell>
          <table:table-cell table:style-name="ce53" office:value-type="string" calcext:value-type="string">
            <text:p>EU-WEST-02</text:p>
          </table:table-cell>
          <table:table-cell table:style-name="ce53" office:value-type="float" office:value="4" calcext:value-type="float">
            <text:p>4</text:p>
          </table:table-cell>
          <table:table-cell table:style-name="ce53" office:value-type="float" office:value="309" calcext:value-type="float">
            <text:p>309</text:p>
          </table:table-cell>
          <table:table-cell table:style-name="ce53" office:value-type="float" office:value="1939" calcext:value-type="float">
            <text:p>1939</text:p>
          </table:table-cell>
          <table:table-cell table:style-name="ce53"/>
          <table:table-cell table:style-name="ce53" office:value-type="string" calcext:value-type="string">
            <text:p>Tunde Olabode</text:p>
          </table:table-cell>
          <table:table-cell table:style-name="ce53" office:value-type="string" calcext:value-type="string">
            <text:p>Liam Rabey</text:p>
          </table:table-cell>
          <table:table-cell table:style-name="ce53" office:value-type="string" calcext:value-type="string">
            <text:p>N/A</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NO-OVO01</text:p>
          </table:table-cell>
          <table:table-cell table:style-name="ce54" office:value-type="string" calcext:value-type="string">
            <text:p>EU-NORTH-01</text:p>
          </table:table-cell>
          <table:table-cell table:style-name="ce54" office:value-type="float" office:value="2" calcext:value-type="float">
            <text:p>2</text:p>
          </table:table-cell>
          <table:table-cell table:style-name="ce54" office:value-type="float" office:value="235" calcext:value-type="float">
            <text:p>235</text:p>
          </table:table-cell>
          <table:table-cell table:style-name="ce54" office:value-type="float" office:value="6334" calcext:value-type="float">
            <text:p>6334</text:p>
          </table:table-cell>
          <table:table-cell table:style-name="ce54"/>
          <table:table-cell table:style-name="ce54" office:value-type="string" calcext:value-type="string">
            <text:p>Kamil Wegrzyk</text:p>
          </table:table-cell>
          <table:table-cell table:style-name="ce54" office:value-type="string" calcext:value-type="string">
            <text:p>Ilie Puiu</text:p>
          </table:table-cell>
          <table:table-cell table:style-name="ce54" office:value-type="string" calcext:value-type="string">
            <text:p>N/A</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Schertz TX - 3PL</text:p>
          </table:table-cell>
          <table:table-cell table:style-name="ce53" office:value-type="string" calcext:value-type="string">
            <text:p>3PL</text:p>
          </table:table-cell>
          <table:table-cell table:number-columns-repeated="2" table:style-name="ce53" office:value-type="float" office:value="0" calcext:value-type="float">
            <text:p>0</text:p>
          </table:table-cell>
          <table:table-cell table:style-name="ce53" office:value-type="float" office:value="10813" calcext:value-type="float">
            <text:p>10813</text:p>
          </table:table-cell>
          <table:table-cell table:style-name="ce53" table:number-columns-repeated="5"/>
          <table:table-cell table:style-name="ce58" table:number-columns-repeated="2"/>
          <table:table-cell table:number-columns-repeated="1012"/>
        </table:table-row>
        <table:table-row table:style-name="ro1">
          <table:table-cell table:style-name="ce54" office:value-type="string" calcext:value-type="string">
            <text:p>US-AAI01</text:p>
          </table:table-cell>
          <table:table-cell table:style-name="ce54" office:value-type="string" calcext:value-type="string">
            <text:p>ATL4</text:p>
          </table:table-cell>
          <table:table-cell table:style-name="ce54" office:value-type="float" office:value="2" calcext:value-type="float">
            <text:p>2</text:p>
          </table:table-cell>
          <table:table-cell table:style-name="ce54" office:value-type="float" office:value="521" calcext:value-type="float">
            <text:p>521</text:p>
          </table:table-cell>
          <table:table-cell table:style-name="ce54" office:value-type="float" office:value="2669" calcext:value-type="float">
            <text:p>2669</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ARQ01</text:p>
          </table:table-cell>
          <table:table-cell table:style-name="ce53" office:value-type="string" calcext:value-type="string">
            <text:p>US-EAST-11A</text:p>
          </table:table-cell>
          <table:table-cell table:style-name="ce53" office:value-type="float" office:value="2" calcext:value-type="float">
            <text:p>2</text:p>
          </table:table-cell>
          <table:table-cell table:style-name="ce53" office:value-type="float" office:value="152" calcext:value-type="float">
            <text:p>152</text:p>
          </table:table-cell>
          <table:table-cell table:style-name="ce53" office:value-type="float" office:value="1945" calcext:value-type="float">
            <text:p>1945</text:p>
          </table:table-cell>
          <table:table-cell table:style-name="ce53" table:number-columns-repeated="5"/>
          <table:table-cell table:style-name="ce58" table:number-columns-repeated="2"/>
          <table:table-cell table:number-columns-repeated="1012"/>
        </table:table-row>
        <table:table-row table:style-name="ro1">
          <table:table-cell table:number-columns-repeated="2" table:style-name="ce54" office:value-type="string" calcext:value-type="string">
            <text:p>US-AUS01</text:p>
          </table:table-cell>
          <table:table-cell table:style-name="ce54" office:value-type="float" office:value="2" calcext:value-type="float">
            <text:p>2</text:p>
          </table:table-cell>
          <table:table-cell table:style-name="ce54" office:value-type="float" office:value="1098" calcext:value-type="float">
            <text:p>1098</text:p>
          </table:table-cell>
          <table:table-cell table:style-name="ce54" office:value-type="float" office:value="3801" calcext:value-type="float">
            <text:p>3801</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BVI01</text:p>
          </table:table-cell>
          <table:table-cell table:style-name="ce53" office:value-type="string" calcext:value-type="string">
            <text:p>US-EAST-03A</text:p>
          </table:table-cell>
          <table:table-cell table:style-name="ce53" office:value-type="float" office:value="2" calcext:value-type="float">
            <text:p>2</text:p>
          </table:table-cell>
          <table:table-cell table:style-name="ce53" office:value-type="float" office:value="420" calcext:value-type="float">
            <text:p>420</text:p>
          </table:table-cell>
          <table:table-cell table:style-name="ce53" office:value-type="float" office:value="5001" calcext:value-type="float">
            <text:p>5001</text:p>
          </table:table-cell>
          <table:table-cell table:style-name="ce53" office:value-type="string" calcext:value-type="string">
            <text:p>Heron</text:p>
          </table:table-cell>
          <table:table-cell table:style-name="ce53" office:value-type="string" calcext:value-type="string">
            <text:p>Chris Grey</text:p>
          </table:table-cell>
          <table:table-cell table:style-name="ce53" office:value-type="string" calcext:value-type="string">
            <text:p>N/A</text:p>
          </table:table-cell>
          <table:table-cell table:style-name="ce53" office:value-type="string" calcext:value-type="string">
            <text:p>John Maimone</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US-CDZ01</text:p>
          </table:table-cell>
          <table:table-cell table:style-name="ce54" office:value-type="string" calcext:value-type="string">
            <text:p>US-EAST-13A</text:p>
          </table:table-cell>
          <table:table-cell table:style-name="ce54" office:value-type="float" office:value="1" calcext:value-type="float">
            <text:p>1</text:p>
          </table:table-cell>
          <table:table-cell table:style-name="ce54" office:value-type="float" office:value="126" calcext:value-type="float">
            <text:p>126</text:p>
          </table:table-cell>
          <table:table-cell table:style-name="ce54" office:value-type="float" office:value="2315" calcext:value-type="float">
            <text:p>2315</text:p>
          </table:table-cell>
          <table:table-cell table:style-name="ce54"/>
          <table:table-cell table:style-name="ce54" office:value-type="string" calcext:value-type="string">
            <text:p>Tyler Darden</text:p>
          </table:table-cell>
          <table:table-cell table:style-name="ce54" office:value-type="string" calcext:value-type="string">
            <text:p>N/A</text:p>
          </table:table-cell>
          <table:table-cell table:style-name="ce54" office:value-type="string" calcext:value-type="string">
            <text:p>Rodney Ballard</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CMH01</text:p>
          </table:table-cell>
          <table:table-cell table:style-name="ce53" office:value-type="string" calcext:value-type="string">
            <text:p>US-EAST-08A</text:p>
          </table:table-cell>
          <table:table-cell table:style-name="ce53" office:value-type="float" office:value="1" calcext:value-type="float">
            <text:p>1</text:p>
          </table:table-cell>
          <table:table-cell table:style-name="ce53" office:value-type="float" office:value="381" calcext:value-type="float">
            <text:p>381</text:p>
          </table:table-cell>
          <table:table-cell table:style-name="ce53" office:value-type="float" office:value="3728" calcext:value-type="float">
            <text:p>3728</text:p>
          </table:table-cell>
          <table:table-cell table:style-name="ce53" table:number-columns-repeated="5"/>
          <table:table-cell table:style-name="ce58" table:number-columns-repeated="2"/>
          <table:table-cell table:number-columns-repeated="1012"/>
        </table:table-row>
        <table:table-row table:style-name="ro1">
          <table:table-cell table:style-name="ce54" office:value-type="string" calcext:value-type="string">
            <text:p>US-CSZ01</text:p>
          </table:table-cell>
          <table:table-cell table:style-name="ce54" office:value-type="string" calcext:value-type="string">
            <text:p>US-EAST-04A</text:p>
          </table:table-cell>
          <table:table-cell table:style-name="ce54" office:value-type="float" office:value="3" calcext:value-type="float">
            <text:p>3</text:p>
          </table:table-cell>
          <table:table-cell table:style-name="ce54" office:value-type="float" office:value="1019" calcext:value-type="float">
            <text:p>1019</text:p>
          </table:table-cell>
          <table:table-cell table:style-name="ce54" office:value-type="float" office:value="6207" calcext:value-type="float">
            <text:p>6207</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CVG01</text:p>
          </table:table-cell>
          <table:table-cell table:style-name="ce53" office:value-type="string" calcext:value-type="string">
            <text:p>US-EAST-06A</text:p>
          </table:table-cell>
          <table:table-cell table:style-name="ce53" office:value-type="float" office:value="4" calcext:value-type="float">
            <text:p>4</text:p>
          </table:table-cell>
          <table:table-cell table:style-name="ce53" office:value-type="float" office:value="288" calcext:value-type="float">
            <text:p>288</text:p>
          </table:table-cell>
          <table:table-cell table:style-name="ce53" office:value-type="float" office:value="1523" calcext:value-type="float">
            <text:p>1523</text:p>
          </table:table-cell>
          <table:table-cell table:style-name="ce53"/>
          <table:table-cell table:style-name="ce53" office:value-type="string" calcext:value-type="string">
            <text:p>Alfred Nyamusa</text:p>
          </table:table-cell>
          <table:table-cell table:style-name="ce53" office:value-type="string" calcext:value-type="string">
            <text:p>N/A</text:p>
          </table:table-cell>
          <table:table-cell table:style-name="ce53" office:value-type="string" calcext:value-type="string">
            <text:p>Rodney Ballard</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US-CVY01</text:p>
          </table:table-cell>
          <table:table-cell table:style-name="ce54" office:value-type="string" calcext:value-type="string">
            <text:p>RDU1A</text:p>
          </table:table-cell>
          <table:table-cell table:style-name="ce54" office:value-type="float" office:value="6" calcext:value-type="float">
            <text:p>6</text:p>
          </table:table-cell>
          <table:table-cell table:style-name="ce54" office:value-type="float" office:value="1745" calcext:value-type="float">
            <text:p>1745</text:p>
          </table:table-cell>
          <table:table-cell table:style-name="ce54" office:value-type="float" office:value="8096" calcext:value-type="float">
            <text:p>8096</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CYL01</text:p>
          </table:table-cell>
          <table:table-cell table:style-name="ce53" office:value-type="string" calcext:value-type="string">
            <text:p>US-EAST-15A</text:p>
          </table:table-cell>
          <table:table-cell table:style-name="ce53" table:number-columns-repeated="8"/>
          <table:table-cell table:style-name="ce58" table:number-columns-repeated="2"/>
          <table:table-cell table:number-columns-repeated="1012"/>
        </table:table-row>
        <table:table-row table:style-name="ro1">
          <table:table-cell table:style-name="ce55" office:value-type="string" calcext:value-type="string">
            <text:p>US-DGV01</text:p>
          </table:table-cell>
          <table:table-cell table:style-name="ce55" office:value-type="string" calcext:value-type="string">
            <text:p>ATL2</text:p>
          </table:table-cell>
          <table:table-cell table:style-name="ce55" office:value-type="float" office:value="3" calcext:value-type="float">
            <text:p>3</text:p>
          </table:table-cell>
          <table:table-cell table:style-name="ce55" office:value-type="float" office:value="754" calcext:value-type="float">
            <text:p>754</text:p>
          </table:table-cell>
          <table:table-cell table:style-name="ce55" office:value-type="float" office:value="2890" calcext:value-type="float">
            <text:p>2890</text:p>
          </table:table-cell>
          <table:table-cell table:style-name="ce55"/>
          <table:table-cell table:style-name="ce54" table:number-columns-repeated="4"/>
          <table:table-cell table:style-name="ce59" table:number-columns-repeated="2"/>
          <table:table-cell table:number-columns-repeated="1012"/>
        </table:table-row>
        <table:table-row table:style-name="ro1">
          <table:table-cell table:style-name="ce53" office:value-type="string" calcext:value-type="string">
            <text:p>US-DNN02</text:p>
          </table:table-cell>
          <table:table-cell table:style-name="ce53" office:value-type="string" calcext:value-type="string">
            <text:p>1PL - Dalton</text:p>
          </table:table-cell>
          <table:table-cell table:style-name="ce53" table:number-columns-repeated="8"/>
          <table:table-cell table:style-name="ce58" table:number-columns-repeated="2"/>
          <table:table-cell table:number-columns-repeated="1012"/>
        </table:table-row>
        <table:table-row table:style-name="ro1">
          <table:table-cell table:style-name="ce54" office:value-type="string" calcext:value-type="string">
            <text:p>US-DTN01</text:p>
          </table:table-cell>
          <table:table-cell table:style-name="ce54" office:value-type="string" calcext:value-type="string">
            <text:p>US-CENTRAL-03A</text:p>
          </table:table-cell>
          <table:table-cell table:style-name="ce54" office:value-type="float" office:value="3" calcext:value-type="float">
            <text:p>3</text:p>
          </table:table-cell>
          <table:table-cell table:style-name="ce54" office:value-type="float" office:value="548" calcext:value-type="float">
            <text:p>548</text:p>
          </table:table-cell>
          <table:table-cell table:style-name="ce54" office:value-type="float" office:value="14367" calcext:value-type="float">
            <text:p>14367</text:p>
          </table:table-cell>
          <table:table-cell table:style-name="ce54"/>
          <table:table-cell table:style-name="ce54" office:value-type="string" calcext:value-type="string">
            <text:p>Walt Raemhild, Jonathan Gomez, Andrew Hulsey</text:p>
          </table:table-cell>
          <table:table-cell table:style-name="ce54" office:value-type="string" calcext:value-type="string">
            <text:p>Logan Davis</text:p>
          </table:table-cell>
          <table:table-cell table:style-name="ce54" office:value-type="string" calcext:value-type="string">
            <text:p>Jesse Ball</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EVI01</text:p>
          </table:table-cell>
          <table:table-cell table:style-name="ce53" office:value-type="string" calcext:value-type="string">
            <text:p>US-CENTRAL-07A</text:p>
          </table:table-cell>
          <table:table-cell table:style-name="ce53" table:number-columns-repeated="8"/>
          <table:table-cell table:style-name="ce58" table:number-columns-repeated="2"/>
          <table:table-cell table:number-columns-repeated="1012"/>
        </table:table-row>
        <table:table-row table:style-name="ro1">
          <table:table-cell table:style-name="ce54" office:value-type="string" calcext:value-type="string">
            <text:p>US-EWS01</text:p>
          </table:table-cell>
          <table:table-cell table:style-name="ce54" office:value-type="string" calcext:value-type="string">
            <text:p>US-EAST-02A</text:p>
          </table:table-cell>
          <table:table-cell table:style-name="ce54" office:value-type="float" office:value="6" calcext:value-type="float">
            <text:p>6</text:p>
          </table:table-cell>
          <table:table-cell table:style-name="ce54" office:value-type="float" office:value="528" calcext:value-type="float">
            <text:p>528</text:p>
          </table:table-cell>
          <table:table-cell table:style-name="ce54" office:value-type="float" office:value="6207" calcext:value-type="float">
            <text:p>6207</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HIO01</text:p>
          </table:table-cell>
          <table:table-cell table:style-name="ce53" office:value-type="string" calcext:value-type="string">
            <text:p>US-WEST-03</text:p>
          </table:table-cell>
          <table:table-cell table:style-name="ce53" office:value-type="float" office:value="1" calcext:value-type="float">
            <text:p>1</text:p>
          </table:table-cell>
          <table:table-cell table:style-name="ce53" office:value-type="float" office:value="336" calcext:value-type="float">
            <text:p>336</text:p>
          </table:table-cell>
          <table:table-cell table:style-name="ce53" office:value-type="float" office:value="1732" calcext:value-type="float">
            <text:p>1732</text:p>
          </table:table-cell>
          <table:table-cell table:style-name="ce53" table:number-columns-repeated="5"/>
          <table:table-cell table:style-name="ce58" table:number-columns-repeated="2"/>
          <table:table-cell table:number-columns-repeated="1012"/>
        </table:table-row>
        <table:table-row table:style-name="ro1">
          <table:table-cell table:style-name="ce54" office:value-type="string" calcext:value-type="string">
            <text:p>US-HIO02</text:p>
          </table:table-cell>
          <table:table-cell table:style-name="ce54" office:value-type="string" calcext:value-type="string">
            <text:p>PDX2</text:p>
          </table:table-cell>
          <table:table-cell table:style-name="ce54" office:value-type="float" office:value="1" calcext:value-type="float">
            <text:p>1</text:p>
          </table:table-cell>
          <table:table-cell table:style-name="ce54" office:value-type="float" office:value="514" calcext:value-type="float">
            <text:p>514</text:p>
          </table:table-cell>
          <table:table-cell table:style-name="ce54" office:value-type="float" office:value="1819" calcext:value-type="float">
            <text:p>1819</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HIO03</text:p>
          </table:table-cell>
          <table:table-cell table:style-name="ce53" office:value-type="string" calcext:value-type="string">
            <text:p>US-WEST-06</text:p>
          </table:table-cell>
          <table:table-cell table:style-name="ce53" office:value-type="float" office:value="4" calcext:value-type="float">
            <text:p>4</text:p>
          </table:table-cell>
          <table:table-cell table:style-name="ce53" office:value-type="float" office:value="2335" calcext:value-type="float">
            <text:p>2335</text:p>
          </table:table-cell>
          <table:table-cell table:style-name="ce53" office:value-type="float" office:value="8565" calcext:value-type="float">
            <text:p>8565</text:p>
          </table:table-cell>
          <table:table-cell table:style-name="ce53" table:number-columns-repeated="5"/>
          <table:table-cell table:style-name="ce58" table:number-columns-repeated="2"/>
          <table:table-cell table:number-columns-repeated="1012"/>
        </table:table-row>
        <table:table-row table:style-name="ro1">
          <table:table-cell table:style-name="ce54" office:value-type="string" calcext:value-type="string">
            <text:p>US-HMN01</text:p>
          </table:table-cell>
          <table:table-cell table:style-name="ce54" office:value-type="string" calcext:value-type="string">
            <text:p>SBN1</text:p>
          </table:table-cell>
          <table:table-cell table:style-name="ce54" office:value-type="float" office:value="1" calcext:value-type="float">
            <text:p>1</text:p>
          </table:table-cell>
          <table:table-cell table:style-name="ce54" office:value-type="float" office:value="622" calcext:value-type="float">
            <text:p>622</text:p>
          </table:table-cell>
          <table:table-cell table:style-name="ce54" office:value-type="float" office:value="2003" calcext:value-type="float">
            <text:p>2003</text:p>
          </table:table-cell>
          <table:table-cell table:style-name="ce54"/>
          <table:table-cell table:style-name="ce54" office:value-type="string" calcext:value-type="string">
            <text:p>Christopher Muckle</text:p>
          </table:table-cell>
          <table:table-cell table:style-name="ce54"/>
          <table:table-cell table:style-name="ce54" office:value-type="string" calcext:value-type="string">
            <text:p>Rodney Ballard </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LAS01</text:p>
          </table:table-cell>
          <table:table-cell table:style-name="ce53" office:value-type="string" calcext:value-type="string">
            <text:p>US-WEST-01A</text:p>
          </table:table-cell>
          <table:table-cell table:style-name="ce53" office:value-type="float" office:value="3" calcext:value-type="float">
            <text:p>3</text:p>
          </table:table-cell>
          <table:table-cell table:style-name="ce53" office:value-type="float" office:value="571" calcext:value-type="float">
            <text:p>571</text:p>
          </table:table-cell>
          <table:table-cell table:style-name="ce53" office:value-type="float" office:value="9789" calcext:value-type="float">
            <text:p>9789</text:p>
          </table:table-cell>
          <table:table-cell table:style-name="ce53" table:number-columns-repeated="5"/>
          <table:table-cell table:style-name="ce58" table:number-columns-repeated="2"/>
          <table:table-cell table:number-columns-repeated="1012"/>
        </table:table-row>
        <table:table-row table:style-name="ro1">
          <table:table-cell table:style-name="ce54" office:value-type="string" calcext:value-type="string">
            <text:p>US-LAS02</text:p>
          </table:table-cell>
          <table:table-cell table:style-name="ce54" office:value-type="string" calcext:value-type="string">
            <text:p>US-WEST-01A</text:p>
          </table:table-cell>
          <table:table-cell table:style-name="ce54" table:number-columns-repeated="8"/>
          <table:table-cell table:style-name="ce59" table:number-columns-repeated="2"/>
          <table:table-cell table:number-columns-repeated="1012"/>
        </table:table-row>
        <table:table-row table:style-name="ro1">
          <table:table-cell table:style-name="ce53" office:value-type="string" calcext:value-type="string">
            <text:p>US-LAS03</text:p>
          </table:table-cell>
          <table:table-cell table:style-name="ce53" office:value-type="string" calcext:value-type="string">
            <text:p>US-WEST-01A</text:p>
          </table:table-cell>
          <table:table-cell table:style-name="ce53" table:number-columns-repeated="8"/>
          <table:table-cell table:style-name="ce58" table:number-columns-repeated="2"/>
          <table:table-cell table:number-columns-repeated="1012"/>
        </table:table-row>
        <table:table-row table:style-name="ro1">
          <table:table-cell table:style-name="ce55" office:value-type="string" calcext:value-type="string">
            <text:p>US-LHS01</text:p>
          </table:table-cell>
          <table:table-cell table:style-name="ce55" office:value-type="string" calcext:value-type="string">
            <text:p>ATL1, US-LAB-01A, US-LAB-01B, US-LAB-01C</text:p>
          </table:table-cell>
          <table:table-cell table:style-name="ce55" office:value-type="float" office:value="2" calcext:value-type="float">
            <text:p>2</text:p>
          </table:table-cell>
          <table:table-cell table:style-name="ce55" office:value-type="float" office:value="170" calcext:value-type="float">
            <text:p>170</text:p>
          </table:table-cell>
          <table:table-cell table:style-name="ce55" office:value-type="float" office:value="1237" calcext:value-type="float">
            <text:p>1237</text:p>
          </table:table-cell>
          <table:table-cell table:style-name="ce55"/>
          <table:table-cell table:style-name="ce54" table:number-columns-repeated="4"/>
          <table:table-cell table:style-name="ce59" table:number-columns-repeated="2"/>
          <table:table-cell table:number-columns-repeated="1012"/>
        </table:table-row>
        <table:table-row table:style-name="ro1">
          <table:table-cell table:style-name="ce53" office:value-type="string" calcext:value-type="string">
            <text:p>US-LNB01</text:p>
          </table:table-cell>
          <table:table-cell table:style-name="ce53" office:value-type="string" calcext:value-type="string">
            <text:p>US-EAST-07A</text:p>
          </table:table-cell>
          <table:table-cell table:style-name="ce53" office:value-type="float" office:value="1" calcext:value-type="float">
            <text:p>1</text:p>
          </table:table-cell>
          <table:table-cell table:style-name="ce53" office:value-type="float" office:value="374" calcext:value-type="float">
            <text:p>374</text:p>
          </table:table-cell>
          <table:table-cell table:style-name="ce53" office:value-type="float" office:value="1830" calcext:value-type="float">
            <text:p>1830</text:p>
          </table:table-cell>
          <table:table-cell table:style-name="ce53" table:number-columns-repeated="5"/>
          <table:table-cell table:style-name="ce58" table:number-columns-repeated="2"/>
          <table:table-cell table:number-columns-repeated="1012"/>
        </table:table-row>
        <table:table-row table:style-name="ro1">
          <table:table-cell table:style-name="ce54" office:value-type="string" calcext:value-type="string">
            <text:p>US-LOE01</text:p>
          </table:table-cell>
          <table:table-cell table:style-name="ce54" office:value-type="string" calcext:value-type="string">
            <text:p>US-EAST-10</text:p>
          </table:table-cell>
          <table:table-cell table:style-name="ce54" office:value-type="float" office:value="3" calcext:value-type="float">
            <text:p>3</text:p>
          </table:table-cell>
          <table:table-cell table:style-name="ce54" office:value-type="float" office:value="527" calcext:value-type="float">
            <text:p>527</text:p>
          </table:table-cell>
          <table:table-cell table:style-name="ce54" office:value-type="float" office:value="4782" calcext:value-type="float">
            <text:p>4782</text:p>
          </table:table-cell>
          <table:table-cell table:style-name="ce54"/>
          <table:table-cell table:style-name="ce54" office:value-type="string" calcext:value-type="string">
            <text:p>Dan Menezes</text:p>
          </table:table-cell>
          <table:table-cell table:style-name="ce54" office:value-type="string" calcext:value-type="string">
            <text:p>N/A</text:p>
          </table:table-cell>
          <table:table-cell table:style-name="ce54" office:value-type="string" calcext:value-type="string">
            <text:p>John Maimone</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LYF01</text:p>
          </table:table-cell>
          <table:table-cell table:style-name="ce53" office:value-type="string" calcext:value-type="string">
            <text:p>US-WEST-05</text:p>
          </table:table-cell>
          <table:table-cell table:style-name="ce53" office:value-type="float" office:value="1" calcext:value-type="float">
            <text:p>1</text:p>
          </table:table-cell>
          <table:table-cell table:style-name="ce53" office:value-type="float" office:value="219" calcext:value-type="float">
            <text:p>219</text:p>
          </table:table-cell>
          <table:table-cell table:style-name="ce53" office:value-type="float" office:value="1024" calcext:value-type="float">
            <text:p>1024</text:p>
          </table:table-cell>
          <table:table-cell table:style-name="ce53"/>
          <table:table-cell table:style-name="ce53" office:value-type="string" calcext:value-type="string">
            <text:p>Gus Azure</text:p>
          </table:table-cell>
          <table:table-cell table:style-name="ce53" office:value-type="string" calcext:value-type="string">
            <text:p>N/A</text:p>
          </table:table-cell>
          <table:table-cell table:style-name="ce53" office:value-type="string" calcext:value-type="string">
            <text:p>Chris Conley</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US-MSC01</text:p>
          </table:table-cell>
          <table:table-cell table:style-name="ce54" office:value-type="string" calcext:value-type="string">
            <text:p>US-WEST-04A</text:p>
          </table:table-cell>
          <table:table-cell table:style-name="ce54" office:value-type="float" office:value="1" calcext:value-type="float">
            <text:p>1</text:p>
          </table:table-cell>
          <table:table-cell table:style-name="ce54" office:value-type="float" office:value="277" calcext:value-type="float">
            <text:p>277</text:p>
          </table:table-cell>
          <table:table-cell table:style-name="ce54" office:value-type="float" office:value="1571" calcext:value-type="float">
            <text:p>1571</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OBG01</text:p>
          </table:table-cell>
          <table:table-cell table:style-name="ce53" office:value-type="string" calcext:value-type="string">
            <text:p>US-EAST-01A</text:p>
          </table:table-cell>
          <table:table-cell table:style-name="ce53" office:value-type="float" office:value="4" calcext:value-type="float">
            <text:p>4</text:p>
          </table:table-cell>
          <table:table-cell table:style-name="ce53" office:value-type="float" office:value="483" calcext:value-type="float">
            <text:p>483</text:p>
          </table:table-cell>
          <table:table-cell table:style-name="ce53" office:value-type="float" office:value="4610" calcext:value-type="float">
            <text:p>4610</text:p>
          </table:table-cell>
          <table:table-cell table:style-name="ce53"/>
          <table:table-cell table:style-name="ce53" office:value-type="string" calcext:value-type="string">
            <text:p>Ivan Robles</text:p>
          </table:table-cell>
          <table:table-cell table:style-name="ce53" office:value-type="string" calcext:value-type="string">
            <text:p>N/A</text:p>
          </table:table-cell>
          <table:table-cell table:style-name="ce53" office:value-type="string" calcext:value-type="string">
            <text:p>John Maimone</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US-PHX01</text:p>
          </table:table-cell>
          <table:table-cell table:style-name="ce54" office:value-type="string" calcext:value-type="string">
            <text:p>US-WEST-02A, US-WEST-02B</text:p>
          </table:table-cell>
          <table:table-cell table:style-name="ce54" office:value-type="float" office:value="4" calcext:value-type="float">
            <text:p>4</text:p>
          </table:table-cell>
          <table:table-cell table:style-name="ce54" office:value-type="float" office:value="1221" calcext:value-type="float">
            <text:p>1221</text:p>
          </table:table-cell>
          <table:table-cell table:style-name="ce54" office:value-type="float" office:value="4417" calcext:value-type="float">
            <text:p>4417</text:p>
          </table:table-cell>
          <table:table-cell table:style-name="ce54"/>
          <table:table-cell table:style-name="ce54" office:value-type="string" calcext:value-type="string">
            <text:p>Monica Apodaca</text:p>
          </table:table-cell>
          <table:table-cell table:style-name="ce54" office:value-type="string" calcext:value-type="string">
            <text:p>NA</text:p>
          </table:table-cell>
          <table:table-cell table:style-name="ce54" office:value-type="string" calcext:value-type="string">
            <text:p>Robert Hernandez</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PLZ01</text:p>
          </table:table-cell>
          <table:table-cell table:style-name="ce53" office:value-type="string" calcext:value-type="string">
            <text:p>US-CENTRAL-02A</text:p>
          </table:table-cell>
          <table:table-cell table:style-name="ce53" office:value-type="float" office:value="6" calcext:value-type="float">
            <text:p>6</text:p>
          </table:table-cell>
          <table:table-cell table:style-name="ce53" office:value-type="float" office:value="1173" calcext:value-type="float">
            <text:p>1173</text:p>
          </table:table-cell>
          <table:table-cell table:style-name="ce53" office:value-type="float" office:value="6103" calcext:value-type="float">
            <text:p>6103</text:p>
          </table:table-cell>
          <table:table-cell table:style-name="ce53" table:number-columns-repeated="5"/>
          <table:table-cell table:style-name="ce58" table:number-columns-repeated="2"/>
          <table:table-cell table:number-columns-repeated="1012"/>
        </table:table-row>
        <table:table-row table:style-name="ro8">
          <table:table-cell table:style-name="ce54" office:value-type="string" calcext:value-type="string">
            <text:p>US-PLZ02</text:p>
          </table:table-cell>
          <table:table-cell table:style-name="ce54" office:value-type="string" calcext:value-type="string">
            <text:p>US-CENTRAL-04A</text:p>
          </table:table-cell>
          <table:table-cell table:style-name="ce54" office:value-type="float" office:value="1" calcext:value-type="float">
            <text:p>1</text:p>
          </table:table-cell>
          <table:table-cell table:style-name="ce54" office:value-type="float" office:value="324" calcext:value-type="float">
            <text:p>324</text:p>
          </table:table-cell>
          <table:table-cell table:style-name="ce54" office:value-type="float" office:value="2484" calcext:value-type="float">
            <text:p>2484</text:p>
          </table:table-cell>
          <table:table-cell table:style-name="ce54"/>
          <table:table-cell table:style-name="ce54" office:value-type="string" calcext:value-type="string">
            <text:p>Matthew Brennan</text:p>
          </table:table-cell>
          <table:table-cell table:style-name="ce54" office:value-type="string" calcext:value-type="string">
            <text:p>N/A</text:p>
          </table:table-cell>
          <table:table-cell table:style-name="ce54" office:value-type="string" calcext:value-type="string">
            <text:p>Robert Hernandez</text:p>
          </table:table-cell>
          <table:table-cell table:style-name="ce54"/>
          <table:table-cell table:style-name="ce59" table:number-columns-repeated="2"/>
          <table:table-cell table:number-columns-repeated="1012"/>
        </table:table-row>
        <table:table-row table:style-name="ro8">
          <table:table-cell table:style-name="ce53" office:value-type="string" calcext:value-type="string">
            <text:p>US-QNC01</text:p>
          </table:table-cell>
          <table:table-cell table:style-name="ce53" office:value-type="string" calcext:value-type="string">
            <text:p>US-WEST-09A, US-WEST-09B</text:p>
          </table:table-cell>
          <table:table-cell table:style-name="ce53" office:value-type="float" office:value="2" calcext:value-type="float">
            <text:p>2</text:p>
          </table:table-cell>
          <table:table-cell table:style-name="ce53" office:value-type="float" office:value="215" calcext:value-type="float">
            <text:p>215</text:p>
          </table:table-cell>
          <table:table-cell table:style-name="ce53" office:value-type="float" office:value="2411" calcext:value-type="float">
            <text:p>2411</text:p>
          </table:table-cell>
          <table:table-cell table:style-name="ce53"/>
          <table:table-cell table:style-name="ce53" office:value-type="string" calcext:value-type="string">
            <text:p>Bronson Urmston</text:p>
          </table:table-cell>
          <table:table-cell table:style-name="ce53" office:value-type="string" calcext:value-type="string">
            <text:p>N/A</text:p>
          </table:table-cell>
          <table:table-cell table:style-name="ce53" office:value-type="string" calcext:value-type="string">
            <text:p>Oliver Luo</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US-RIN01</text:p>
          </table:table-cell>
          <table:table-cell table:style-name="ce54" office:value-type="string" calcext:value-type="string">
            <text:p>US-CENTRAL-05A</text:p>
          </table:table-cell>
          <table:table-cell table:style-name="ce54" office:value-type="float" office:value="2" calcext:value-type="float">
            <text:p>2</text:p>
          </table:table-cell>
          <table:table-cell table:style-name="ce54" office:value-type="float" office:value="133" calcext:value-type="float">
            <text:p>133</text:p>
          </table:table-cell>
          <table:table-cell table:style-name="ce54" office:value-type="float" office:value="3127" calcext:value-type="float">
            <text:p>3127</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SPK01</text:p>
          </table:table-cell>
          <table:table-cell table:style-name="ce53" office:value-type="string" calcext:value-type="string">
            <text:p>RNO1</text:p>
          </table:table-cell>
          <table:table-cell table:style-name="ce53" office:value-type="float" office:value="1" calcext:value-type="float">
            <text:p>1</text:p>
          </table:table-cell>
          <table:table-cell table:style-name="ce53" office:value-type="float" office:value="173" calcext:value-type="float">
            <text:p>173</text:p>
          </table:table-cell>
          <table:table-cell table:style-name="ce53" office:value-type="float" office:value="1399" calcext:value-type="float">
            <text:p>1399</text:p>
          </table:table-cell>
          <table:table-cell table:style-name="ce53" table:number-columns-repeated="5"/>
          <table:table-cell table:style-name="ce58" table:number-columns-repeated="2"/>
          <table:table-cell table:number-columns-repeated="1012"/>
        </table:table-row>
        <table:table-row table:style-name="ro1">
          <table:table-cell table:style-name="ce54" office:value-type="string" calcext:value-type="string">
            <text:p>US-SPK02</text:p>
          </table:table-cell>
          <table:table-cell table:style-name="ce54" office:value-type="string" calcext:value-type="string">
            <text:p>RNO2A</text:p>
          </table:table-cell>
          <table:table-cell table:style-name="ce54" table:number-columns-repeated="8"/>
          <table:table-cell table:style-name="ce59" table:number-columns-repeated="2"/>
          <table:table-cell table:number-columns-repeated="1012"/>
        </table:table-row>
        <table:table-row table:style-name="ro1">
          <table:table-cell table:style-name="ce53" office:value-type="string" calcext:value-type="string">
            <text:p>US-SPK03</text:p>
          </table:table-cell>
          <table:table-cell table:style-name="ce56" office:value-type="string" calcext:value-type="string">
            <text:p>US-WEST-10</text:p>
          </table:table-cell>
          <table:table-cell table:style-name="ce53" table:number-columns-repeated="8"/>
          <table:table-cell table:style-name="ce58" table:number-columns-repeated="2"/>
          <table:table-cell table:number-columns-repeated="1012"/>
        </table:table-row>
        <table:table-row table:style-name="ro1">
          <table:table-cell table:style-name="ce54" office:value-type="string" calcext:value-type="string">
            <text:p>US-SVG01</text:p>
          </table:table-cell>
          <table:table-cell table:style-name="ce54" office:value-type="string" calcext:value-type="string">
            <text:p>US-EAST-09A</text:p>
          </table:table-cell>
          <table:table-cell table:style-name="ce54" office:value-type="float" office:value="2" calcext:value-type="float">
            <text:p>2</text:p>
          </table:table-cell>
          <table:table-cell table:style-name="ce54" office:value-type="float" office:value="465" calcext:value-type="float">
            <text:p>465</text:p>
          </table:table-cell>
          <table:table-cell table:style-name="ce54" office:value-type="float" office:value="2478" calcext:value-type="float">
            <text:p>2478</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VO201</text:p>
          </table:table-cell>
          <table:table-cell table:style-name="ce53" office:value-type="string" calcext:value-type="string">
            <text:p>US-CENTRAL-01A</text:p>
          </table:table-cell>
          <table:table-cell table:style-name="ce53" office:value-type="float" office:value="1" calcext:value-type="float">
            <text:p>1</text:p>
          </table:table-cell>
          <table:table-cell table:style-name="ce53" office:value-type="float" office:value="505" calcext:value-type="float">
            <text:p>505</text:p>
          </table:table-cell>
          <table:table-cell table:style-name="ce53" office:value-type="float" office:value="1915" calcext:value-type="float">
            <text:p>1915</text:p>
          </table:table-cell>
          <table:table-cell table:style-name="ce53"/>
          <table:table-cell table:style-name="ce53" office:value-type="string" calcext:value-type="string">
            <text:p>Corey Miller</text:p>
          </table:table-cell>
          <table:table-cell table:style-name="ce53" office:value-type="string" calcext:value-type="string">
            <text:p>N/A</text:p>
          </table:table-cell>
          <table:table-cell table:style-name="ce53" office:value-type="string" calcext:value-type="string">
            <text:p>Rodney Ballard</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US-WCI01</text:p>
          </table:table-cell>
          <table:table-cell table:style-name="ce54" office:value-type="string" calcext:value-type="string">
            <text:p>ORD1</text:p>
          </table:table-cell>
          <table:table-cell table:style-name="ce54" office:value-type="float" office:value="2" calcext:value-type="float">
            <text:p>2</text:p>
          </table:table-cell>
          <table:table-cell table:style-name="ce54" office:value-type="float" office:value="117" calcext:value-type="float">
            <text:p>117</text:p>
          </table:table-cell>
          <table:table-cell table:style-name="ce54" office:value-type="float" office:value="2588" calcext:value-type="float">
            <text:p>2588</text:p>
          </table:table-cell>
          <table:table-cell table:style-name="ce54" table:number-columns-repeated="5"/>
          <table:table-cell table:style-name="ce59" table:number-columns-repeated="2"/>
          <table:table-cell table:number-columns-repeated="1012"/>
        </table:table-row>
        <table:table-row table:style-name="ro1">
          <table:table-cell table:style-name="ce53" office:value-type="string" calcext:value-type="string">
            <text:p>US-WJQ01</text:p>
          </table:table-cell>
          <table:table-cell table:style-name="ce53" office:value-type="string" calcext:value-type="string">
            <text:p>LGA1</text:p>
          </table:table-cell>
          <table:table-cell table:style-name="ce53" office:value-type="float" office:value="2" calcext:value-type="float">
            <text:p>2</text:p>
          </table:table-cell>
          <table:table-cell table:style-name="ce53" office:value-type="float" office:value="253" calcext:value-type="float">
            <text:p>253</text:p>
          </table:table-cell>
          <table:table-cell table:style-name="ce53" office:value-type="float" office:value="4231" calcext:value-type="float">
            <text:p>4231</text:p>
          </table:table-cell>
          <table:table-cell table:style-name="ce53"/>
          <table:table-cell table:style-name="ce53" office:value-type="string" calcext:value-type="string">
            <text:p>Everton Small</text:p>
          </table:table-cell>
          <table:table-cell table:style-name="ce53" office:value-type="string" calcext:value-type="string">
            <text:p>N/A</text:p>
          </table:table-cell>
          <table:table-cell table:style-name="ce53" office:value-type="string" calcext:value-type="string">
            <text:p>John Maimone</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DK-SVL01</text:p>
          </table:table-cell>
          <table:table-cell table:style-name="ce54" table:number-columns-repeated="5"/>
          <table:table-cell table:number-columns-repeated="2" table:style-name="ce54" office:value-type="string" calcext:value-type="string">
            <text:p>Ilie Puiu</text:p>
          </table:table-cell>
          <table:table-cell table:style-name="ce54" office:value-type="string" calcext:value-type="string">
            <text:p>N/A</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ES-AVQ01</text:p>
          </table:table-cell>
          <table:table-cell table:style-name="ce53" office:value-type="string" calcext:value-type="string">
            <text:p>EU-SOUTH-04A</text:p>
          </table:table-cell>
          <table:table-cell table:style-name="ce53" table:number-columns-repeated="4"/>
          <table:table-cell table:style-name="ce53" office:value-type="string" calcext:value-type="string">
            <text:p>Yoann Herembourg</text:p>
          </table:table-cell>
          <table:table-cell table:style-name="ce53" office:value-type="string" calcext:value-type="string">
            <text:p>Marcos Montoro Riestra</text:p>
          </table:table-cell>
          <table:table-cell table:style-name="ce53" office:value-type="string" calcext:value-type="string">
            <text:p>N/A</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ES-BCN02</text:p>
          </table:table-cell>
          <table:table-cell table:style-name="ce54" table:number-columns-repeated="5"/>
          <table:table-cell table:style-name="ce54" office:value-type="string" calcext:value-type="string">
            <text:p>Basilio Saez Sanchez</text:p>
          </table:table-cell>
          <table:table-cell table:style-name="ce54" office:value-type="string" calcext:value-type="string">
            <text:p>Marcos Montoro Riestra </text:p>
          </table:table-cell>
          <table:table-cell table:style-name="ce54" office:value-type="string" calcext:value-type="string">
            <text:p>N/A</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SE-FAN01</text:p>
          </table:table-cell>
          <table:table-cell table:style-name="ce53" office:value-type="string" calcext:value-type="string">
            <text:p>EU-NORTH-01</text:p>
          </table:table-cell>
          <table:table-cell table:style-name="ce53" table:number-columns-repeated="4"/>
          <table:table-cell table:number-columns-repeated="2" table:style-name="ce53" office:value-type="string" calcext:value-type="string">
            <text:p>Ilie Puiu</text:p>
          </table:table-cell>
          <table:table-cell table:style-name="ce53" office:value-type="string" calcext:value-type="string">
            <text:p>N/A</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SE-SKH01</text:p>
          </table:table-cell>
          <table:table-cell table:style-name="ce54" table:number-columns-repeated="5"/>
          <table:table-cell table:number-columns-repeated="2" table:style-name="ce54" office:value-type="string" calcext:value-type="string">
            <text:p>Ilie Puiu</text:p>
          </table:table-cell>
          <table:table-cell table:style-name="ce54" office:value-type="string" calcext:value-type="string">
            <text:p>N/A</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KWO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LZL01</text:p>
          </table:table-cell>
          <table:table-cell table:style-name="ce54" office:value-type="string" calcext:value-type="string">
            <text:p>US-CENTRAL-08A</text:p>
          </table:table-cell>
          <table:table-cell table:style-name="ce54" table:number-columns-repeated="8"/>
          <table:table-cell table:style-name="ce59" table:number-columns-repeated="2"/>
          <table:table-cell table:number-columns-repeated="1012"/>
        </table:table-row>
        <table:table-row table:style-name="ro1">
          <table:table-cell table:style-name="ce53" office:value-type="string" calcext:value-type="string">
            <text:p>US-MKO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NKQ01</text:p>
          </table:table-cell>
          <table:table-cell table:style-name="ce54" office:value-type="string" calcext:value-type="string">
            <text:p>US-WEST-08A</text:p>
          </table:table-cell>
          <table:table-cell table:style-name="ce54" table:number-columns-repeated="4"/>
          <table:table-cell table:style-name="ce54" office:value-type="string" calcext:value-type="string">
            <text:p>Oliver Luo</text:p>
          </table:table-cell>
          <table:table-cell table:style-name="ce54" office:value-type="string" calcext:value-type="string">
            <text:p>N/A</text:p>
          </table:table-cell>
          <table:table-cell table:style-name="ce54" office:value-type="string" calcext:value-type="string">
            <text:p>Chris Conley</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NNN01</text:p>
          </table:table-cell>
          <table:table-cell table:style-name="ce53" office:value-type="string" calcext:value-type="string">
            <text:p>US-WEST-07A</text:p>
          </table:table-cell>
          <table:table-cell table:style-name="ce53" table:number-columns-repeated="4"/>
          <table:table-cell table:style-name="ce53" office:value-type="string" calcext:value-type="string">
            <text:p>Nathan Lindorf</text:p>
          </table:table-cell>
          <table:table-cell table:style-name="ce53" office:value-type="string" calcext:value-type="string">
            <text:p>N/A</text:p>
          </table:table-cell>
          <table:table-cell table:style-name="ce53" office:value-type="string" calcext:value-type="string">
            <text:p>Robert Hernandez</text:p>
          </table:table-cell>
          <table:table-cell table:style-name="ce53"/>
          <table:table-cell table:style-name="ce58" table:number-columns-repeated="2"/>
          <table:table-cell table:number-columns-repeated="1012"/>
        </table:table-row>
        <table:table-row table:style-name="ro1">
          <table:table-cell table:style-name="ce54" office:value-type="string" calcext:value-type="string">
            <text:p>US-PPY01</text:p>
          </table:table-cell>
          <table:table-cell table:style-name="ce54" office:value-type="string" calcext:value-type="string">
            <text:p>US-EAST-14A</text:p>
          </table:table-cell>
          <table:table-cell table:style-name="ce54" table:number-columns-repeated="4"/>
          <table:table-cell table:style-name="ce54" office:value-type="string" calcext:value-type="string">
            <text:p>Matthew Forsyth</text:p>
          </table:table-cell>
          <table:table-cell table:style-name="ce54" office:value-type="string" calcext:value-type="string">
            <text:p>N/A</text:p>
          </table:table-cell>
          <table:table-cell table:style-name="ce54" office:value-type="string" calcext:value-type="string">
            <text:p>John Maimone</text:p>
          </table:table-cell>
          <table:table-cell table:style-name="ce54"/>
          <table:table-cell table:style-name="ce59" table:number-columns-repeated="2"/>
          <table:table-cell table:number-columns-repeated="1012"/>
        </table:table-row>
        <table:table-row table:style-name="ro1">
          <table:table-cell table:style-name="ce53" office:value-type="string" calcext:value-type="string">
            <text:p>US-SKY01</text:p>
          </table:table-cell>
          <table:table-cell table:style-name="ce53" table:number-columns-repeated="11"/>
          <table:table-cell table:number-columns-repeated="1012"/>
        </table:table-row>
        <table:table-row table:style-name="ro1">
          <table:table-cell table:style-name="ce54" office:value-type="string" calcext:value-type="string">
            <text:p>US-RRX01</text:p>
          </table:table-cell>
          <table:table-cell table:style-name="ce54" table:number-columns-repeated="11"/>
          <table:table-cell table:number-columns-repeated="1012"/>
        </table:table-row>
        <table:table-row table:style-name="ro1">
          <table:table-cell table:style-name="ce53" office:value-type="string" calcext:value-type="string">
            <text:p>US-LBB01</text:p>
          </table:table-cell>
          <table:table-cell table:style-name="ce53" office:value-type="string" calcext:value-type="string">
            <text:p>US-CENTRAL-09A</text:p>
          </table:table-cell>
          <table:table-cell table:style-name="ce53" table:number-columns-repeated="8"/>
          <table:table-cell table:style-name="ce58" table:number-columns-repeated="2"/>
          <table:table-cell table:number-columns-repeated="1012"/>
        </table:table-row>
        <table:table-row table:style-name="ro1">
          <table:table-cell table:style-name="ce54" office:value-type="string" calcext:value-type="string">
            <text:p>US-TUZ01</text:p>
          </table:table-cell>
          <table:table-cell table:style-name="ce54" office:value-type="string" calcext:value-type="string">
            <text:p>US-WEST-02</text:p>
          </table:table-cell>
          <table:table-cell table:style-name="ce54" table:number-columns-repeated="8"/>
          <table:table-cell table:style-name="ce59" table:number-columns-repeated="2"/>
          <table:table-cell table:number-columns-repeated="1012"/>
        </table:table-row>
        <table:table-row table:style-name="ro1">
          <table:table-cell table:style-name="ce53" office:value-type="string" calcext:value-type="string">
            <text:p>US-DEN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LAX01</text:p>
          </table:table-cell>
          <table:table-cell table:style-name="ce54" table:number-columns-repeated="9"/>
          <table:table-cell table:style-name="ce59" table:number-columns-repeated="2"/>
          <table:table-cell table:number-columns-repeated="1012"/>
        </table:table-row>
        <table:table-row table:style-name="ro1">
          <table:table-cell table:style-name="ce53" office:value-type="string" calcext:value-type="string">
            <text:p>US-SEA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QAS01</text:p>
          </table:table-cell>
          <table:table-cell table:style-name="ce54" table:number-columns-repeated="9"/>
          <table:table-cell table:style-name="ce59" table:number-columns-repeated="2"/>
          <table:table-cell table:number-columns-repeated="1012"/>
        </table:table-row>
        <table:table-row table:style-name="ro1">
          <table:table-cell table:style-name="ce53" office:value-type="string" calcext:value-type="string">
            <text:p>US-ATL03</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CHI01</text:p>
          </table:table-cell>
          <table:table-cell table:style-name="ce54" table:number-columns-repeated="9"/>
          <table:table-cell table:style-name="ce59" table:number-columns-repeated="2"/>
          <table:table-cell table:number-columns-repeated="1012"/>
        </table:table-row>
        <table:table-row table:style-name="ro1">
          <table:table-cell table:style-name="ce53" office:value-type="string" calcext:value-type="string">
            <text:p>US-PHL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QTS01</text:p>
          </table:table-cell>
          <table:table-cell table:style-name="ce54" table:number-columns-repeated="9"/>
          <table:table-cell table:style-name="ce59" table:number-columns-repeated="2"/>
          <table:table-cell table:number-columns-repeated="1012"/>
        </table:table-row>
        <table:table-row table:style-name="ro1">
          <table:table-cell table:style-name="ce53" office:value-type="string" calcext:value-type="string">
            <text:p>US-SEA02</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SJC01</text:p>
          </table:table-cell>
          <table:table-cell table:style-name="ce54" table:number-columns-repeated="9"/>
          <table:table-cell table:style-name="ce59" table:number-columns-repeated="2"/>
          <table:table-cell table:number-columns-repeated="1012"/>
        </table:table-row>
        <table:table-row table:style-name="ro1">
          <table:table-cell table:style-name="ce53" office:value-type="string" calcext:value-type="string">
            <text:p>US-UYK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US-HIO04</text:p>
          </table:table-cell>
          <table:table-cell table:style-name="ce54" table:number-columns-repeated="9"/>
          <table:table-cell table:style-name="ce59" table:number-columns-repeated="2"/>
          <table:table-cell table:number-columns-repeated="1012"/>
        </table:table-row>
        <table:table-row table:style-name="ro1">
          <table:table-cell table:style-name="ce53" office:value-type="string" calcext:value-type="string">
            <text:p>US-DAL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CA-TOR01</text:p>
          </table:table-cell>
          <table:table-cell table:style-name="ce54" table:number-columns-repeated="9"/>
          <table:table-cell table:style-name="ce59" table:number-columns-repeated="2"/>
          <table:table-cell table:number-columns-repeated="1012"/>
        </table:table-row>
        <table:table-row table:style-name="ro1">
          <table:table-cell table:style-name="ce53" office:value-type="string" calcext:value-type="string">
            <text:p>DE-FRA01</text:p>
          </table:table-cell>
          <table:table-cell table:style-name="ce53" table:number-columns-repeated="9"/>
          <table:table-cell table:style-name="ce58" table:number-columns-repeated="2"/>
          <table:table-cell table:number-columns-repeated="1012"/>
        </table:table-row>
        <table:table-row table:style-name="ro1">
          <table:table-cell table:style-name="ce54" office:value-type="string" calcext:value-type="string">
            <text:p>ES-BCN02</text:p>
          </table:table-cell>
          <table:table-cell table:style-name="ce54" table:number-columns-repeated="9"/>
          <table:table-cell table:style-name="ce59" table:number-columns-repeated="2"/>
          <table:table-cell table:number-columns-repeated="1012"/>
        </table:table-row>
        <table:table-row table:style-name="ro4" table:number-rows-repeated="1048496">
          <table:table-cell table:number-columns-repeated="1024"/>
        </table:table-row>
        <table:table-row table:style-name="ro4">
          <table:table-cell table:number-columns-repeated="1024"/>
        </table:table-row>
        <table:named-expressions>
          <table:named-range table:name="_xlnm._FilterDatabase" table:base-cell-address="$Dashboard.$A$1" table:cell-range-address="$'DC Operations Database'.$A$1:.$I$79"/>
        </table:named-expressions>
      </table:table>
      <table:table table:name="Extra Data" table:style-name="ta4">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 table:number-columns-repeated="1012" table:default-cell-style-name="Default"/>
        <table:table-row table:style-name="ro9">
          <table:table-cell table:style-name="ce60" office:value-type="string" calcext:value-type="string">
            <text:p>Region</text:p>
          </table:table-cell>
          <table:table-cell table:style-name="ce60" office:value-type="string" calcext:value-type="string">
            <text:p>Location_Type</text:p>
          </table:table-cell>
          <table:table-cell table:style-name="ce60" office:value-type="string" calcext:value-type="string">
            <text:p>Status</text:p>
          </table:table-cell>
          <table:table-cell table:style-name="ce60" office:value-type="string" calcext:value-type="string">
            <text:p>LOCODE</text:p>
          </table:table-cell>
          <table:table-cell table:style-name="ce60" office:value-type="string" calcext:value-type="string">
            <text:p>NetBox_ID</text:p>
          </table:table-cell>
          <table:table-cell table:style-name="ce60" office:value-type="string" calcext:value-type="string">
            <text:p>Facility_Name</text:p>
          </table:table-cell>
          <table:table-cell table:style-name="ce60" office:value-type="string" calcext:value-type="string">
            <text:p>Street_Address</text:p>
          </table:table-cell>
          <table:table-cell table:style-name="ce62" office:value-type="string" calcext:value-type="string">
            <text:p>City</text:p>
          </table:table-cell>
          <table:table-cell table:style-name="ce60" office:value-type="string" calcext:value-type="string">
            <text:p>State_or_Region</text:p>
          </table:table-cell>
          <table:table-cell table:style-name="ce60" office:value-type="string" calcext:value-type="string">
            <text:p>Postal_Code</text:p>
          </table:table-cell>
          <table:table-cell table:style-name="ce60" office:value-type="string" calcext:value-type="string">
            <text:p>Country</text:p>
          </table:table-cell>
          <table:table-cell table:style-name="ce60" office:value-type="string" calcext:value-type="string">
            <text:p>Full_Address</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BVI01</text:p>
          </table:table-cell>
          <table:table-cell table:style-name="ce60" office:value-type="string" calcext:value-type="string">
            <text:p>US-EAST-03A</text:p>
          </table:table-cell>
          <table:table-cell table:style-name="ce60" office:value-type="string" calcext:value-type="string">
            <text:p>Allentown (TekPark)</text:p>
          </table:table-cell>
          <table:table-cell table:style-name="ce60" office:value-type="string" calcext:value-type="string">
            <text:p>9999 Hamilton Blvd, Building 4</text:p>
          </table:table-cell>
          <table:table-cell table:style-name="ce62" office:value-type="string" calcext:value-type="string">
            <text:p>Breinigsville</text:p>
          </table:table-cell>
          <table:table-cell table:style-name="ce60" office:value-type="string" calcext:value-type="string">
            <text:p>PA</text:p>
          </table:table-cell>
          <table:table-cell table:style-name="ce60" office:value-type="float" office:value="18031" calcext:value-type="float">
            <text:p>18031</text:p>
          </table:table-cell>
          <table:table-cell table:style-name="ce60" office:value-type="string" calcext:value-type="string">
            <text:p>USA</text:p>
          </table:table-cell>
          <table:table-cell table:style-name="ce60" table:formula="of:=[.G2]&amp;&quot;, &quot; &amp; [.H2]&amp;&quot;,  &quot;&amp;[.I2]&amp;&quot; &quot;&amp;[.J2]&amp;&quot;, &quot;&amp;[.K2]" office:value-type="string" office:string-value="9999 Hamilton Blvd, Building 4, Breinigsville,  PA 18031, USA" calcext:value-type="string">
            <text:p>9999 Hamilton Blvd, Building 4, Breinigsville, <text:s/>PA 18031,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CMH01</text:p>
          </table:table-cell>
          <table:table-cell table:style-name="ce60" office:value-type="string" calcext:value-type="string">
            <text:p>US-EAST-08A</text:p>
          </table:table-cell>
          <table:table-cell table:style-name="ce60" office:value-type="string" calcext:value-type="string">
            <text:p>Columbus</text:p>
          </table:table-cell>
          <table:table-cell table:style-name="ce60" office:value-type="string" calcext:value-type="string">
            <text:p>7500 Alta View Blvd</text:p>
          </table:table-cell>
          <table:table-cell table:style-name="ce62" office:value-type="string" calcext:value-type="string">
            <text:p>Columbus</text:p>
          </table:table-cell>
          <table:table-cell table:style-name="ce60" office:value-type="string" calcext:value-type="string">
            <text:p>OH</text:p>
          </table:table-cell>
          <table:table-cell table:style-name="ce60" office:value-type="float" office:value="43085" calcext:value-type="float">
            <text:p>43085</text:p>
          </table:table-cell>
          <table:table-cell table:style-name="ce60" office:value-type="string" calcext:value-type="string">
            <text:p>USA</text:p>
          </table:table-cell>
          <table:table-cell table:style-name="ce60" table:formula="of:=[.G3]&amp;&quot;, &quot; &amp; [.H3]&amp;&quot;,  &quot;&amp;[.I3]&amp;&quot; &quot;&amp;[.J3]&amp;&quot;, &quot;&amp;[.K3]" office:value-type="string" office:string-value="7500 Alta View Blvd, Columbus,  OH 43085, USA" calcext:value-type="string">
            <text:p>7500 Alta View Blvd, Columbus, <text:s/>OH 43085,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CSZ01</text:p>
          </table:table-cell>
          <table:table-cell table:style-name="ce60" office:value-type="string" calcext:value-type="string">
            <text:p>US-EAST-04A</text:p>
          </table:table-cell>
          <table:table-cell table:style-name="ce60" office:value-type="string" calcext:value-type="string">
            <text:p>Richmond / Chester (CTP‑01 Bldg 1)</text:p>
          </table:table-cell>
          <table:table-cell table:style-name="ce60" office:value-type="string" calcext:value-type="string">
            <text:p>1401 Meadowville Technology Pkwy</text:p>
          </table:table-cell>
          <table:table-cell table:style-name="ce62" office:value-type="string" calcext:value-type="string">
            <text:p>Chester</text:p>
          </table:table-cell>
          <table:table-cell table:style-name="ce60" office:value-type="string" calcext:value-type="string">
            <text:p>VA</text:p>
          </table:table-cell>
          <table:table-cell table:style-name="ce60" office:value-type="float" office:value="23836" calcext:value-type="float">
            <text:p>23836</text:p>
          </table:table-cell>
          <table:table-cell table:style-name="ce60" office:value-type="string" calcext:value-type="string">
            <text:p>USA</text:p>
          </table:table-cell>
          <table:table-cell table:style-name="ce60" table:formula="of:=[.G4]&amp;&quot;, &quot; &amp; [.H4]&amp;&quot;,  &quot;&amp;[.I4]&amp;&quot; &quot;&amp;[.J4]&amp;&quot;, &quot;&amp;[.K4]" office:value-type="string" office:string-value="1401 Meadowville Technology Pkwy, Chester,  VA 23836, USA" calcext:value-type="string">
            <text:p>1401 Meadowville Technology Pkwy, Chester, <text:s/>VA 23836, USA</text:p>
          </table:table-cell>
          <table:table-cell table:number-columns-repeated="1012"/>
        </table:table-row>
        <table:table-row table:style-name="ro9" table:visibility="collapse">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US-CSZ02</text:p>
          </table:table-cell>
          <table:table-cell table:style-name="ce60" office:value-type="string" calcext:value-type="string">
            <text:p>US-EAST-04B</text:p>
          </table:table-cell>
          <table:table-cell table:style-name="ce60" office:value-type="string" calcext:value-type="string">
            <text:p>Richmond / Chester (CTP‑01 Bldg 2)</text:p>
          </table:table-cell>
          <table:table-cell table:style-name="ce60" office:value-type="string" calcext:value-type="string">
            <text:p>1401 Meadowville Technology Pkwy, Building 2</text:p>
          </table:table-cell>
          <table:table-cell table:style-name="ce62" office:value-type="string" calcext:value-type="string">
            <text:p>Chester</text:p>
          </table:table-cell>
          <table:table-cell table:style-name="ce60" office:value-type="string" calcext:value-type="string">
            <text:p>VA</text:p>
          </table:table-cell>
          <table:table-cell table:style-name="ce60" office:value-type="float" office:value="23836" calcext:value-type="float">
            <text:p>23836</text:p>
          </table:table-cell>
          <table:table-cell table:style-name="ce60" office:value-type="string" calcext:value-type="string">
            <text:p>USA</text:p>
          </table:table-cell>
          <table:table-cell table:style-name="ce60" table:formula="of:=[.G5]&amp;&quot;, &quot; &amp; [.H5]&amp;&quot;,  &quot;&amp;[.I5]&amp;&quot; &quot;&amp;[.J5]&amp;&quot;, &quot;&amp;[.K5]" office:value-type="string" office:string-value="1401 Meadowville Technology Pkwy, Building 2, Chester,  VA 23836, USA" calcext:value-type="string">
            <text:p>1401 Meadowville Technology Pkwy, Building 2, Chester, <text:s/>VA 23836,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CVG01</text:p>
          </table:table-cell>
          <table:table-cell table:style-name="ce60" office:value-type="string" calcext:value-type="string">
            <text:p>US-EAST-06A</text:p>
          </table:table-cell>
          <table:table-cell table:style-name="ce60" office:value-type="string" calcext:value-type="string">
            <text:p>Cincinnati</text:p>
          </table:table-cell>
          <table:table-cell table:style-name="ce60" office:value-type="string" calcext:value-type="string">
            <text:p>229 W 7th St</text:p>
          </table:table-cell>
          <table:table-cell table:style-name="ce62" office:value-type="string" calcext:value-type="string">
            <text:p>Cincinnati</text:p>
          </table:table-cell>
          <table:table-cell table:style-name="ce60" office:value-type="string" calcext:value-type="string">
            <text:p>OH</text:p>
          </table:table-cell>
          <table:table-cell table:style-name="ce60" office:value-type="float" office:value="45202" calcext:value-type="float">
            <text:p>45202</text:p>
          </table:table-cell>
          <table:table-cell table:style-name="ce60" office:value-type="string" calcext:value-type="string">
            <text:p>USA</text:p>
          </table:table-cell>
          <table:table-cell table:style-name="ce60" table:formula="of:=[.G6]&amp;&quot;, &quot; &amp; [.H6]&amp;&quot;,  &quot;&amp;[.I6]&amp;&quot; &quot;&amp;[.J6]&amp;&quot;, &quot;&amp;[.K6]" office:value-type="string" office:string-value="229 W 7th St, Cincinnati,  OH 45202, USA" calcext:value-type="string">
            <text:p>229 W 7th St, Cincinnati, <text:s/>OH 45202,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CVY01</text:p>
          </table:table-cell>
          <table:table-cell table:style-name="ce60" office:value-type="string" calcext:value-type="string">
            <text:p>RDU1A</text:p>
          </table:table-cell>
          <table:table-cell table:style-name="ce60" office:value-type="string" calcext:value-type="string">
            <text:p>Clarksville</text:p>
          </table:table-cell>
          <table:table-cell table:style-name="ce60" office:value-type="string" calcext:value-type="string">
            <text:p>250 Burlington Dr</text:p>
          </table:table-cell>
          <table:table-cell table:style-name="ce62" office:value-type="string" calcext:value-type="string">
            <text:p>Clarksville</text:p>
          </table:table-cell>
          <table:table-cell table:style-name="ce60" office:value-type="string" calcext:value-type="string">
            <text:p>VA</text:p>
          </table:table-cell>
          <table:table-cell table:style-name="ce60" office:value-type="float" office:value="23927" calcext:value-type="float">
            <text:p>23927</text:p>
          </table:table-cell>
          <table:table-cell table:style-name="ce60" office:value-type="string" calcext:value-type="string">
            <text:p>USA</text:p>
          </table:table-cell>
          <table:table-cell table:style-name="ce60" table:formula="of:=[.G7]&amp;&quot;, &quot; &amp; [.H7]&amp;&quot;,  &quot;&amp;[.I7]&amp;&quot; &quot;&amp;[.J7]&amp;&quot;, &quot;&amp;[.K7]" office:value-type="string" office:string-value="250 Burlington Dr, Clarksville,  VA 23927, USA" calcext:value-type="string">
            <text:p>250 Burlington Dr, Clarksville, <text:s/>VA 23927,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DGV01</text:p>
          </table:table-cell>
          <table:table-cell table:style-name="ce60" office:value-type="string" calcext:value-type="string">
            <text:p>ATL2</text:p>
          </table:table-cell>
          <table:table-cell table:style-name="ce60" office:value-type="string" calcext:value-type="string">
            <text:p>Douglasville</text:p>
          </table:table-cell>
          <table:table-cell table:style-name="ce60" office:value-type="string" calcext:value-type="string">
            <text:p>1700 N River Rd</text:p>
          </table:table-cell>
          <table:table-cell table:style-name="ce62" office:value-type="string" calcext:value-type="string">
            <text:p>Douglasville</text:p>
          </table:table-cell>
          <table:table-cell table:style-name="ce60" office:value-type="string" calcext:value-type="string">
            <text:p>GA</text:p>
          </table:table-cell>
          <table:table-cell table:style-name="ce60" office:value-type="float" office:value="30122" calcext:value-type="float">
            <text:p>30122</text:p>
          </table:table-cell>
          <table:table-cell table:style-name="ce60" office:value-type="string" calcext:value-type="string">
            <text:p>USA</text:p>
          </table:table-cell>
          <table:table-cell table:style-name="ce60" table:formula="of:=[.G8]&amp;&quot;, &quot; &amp; [.H8]&amp;&quot;,  &quot;&amp;[.I8]&amp;&quot; &quot;&amp;[.J8]&amp;&quot;, &quot;&amp;[.K8]" office:value-type="string" office:string-value="1700 N River Rd, Douglasville,  GA 30122, USA" calcext:value-type="string">
            <text:p>1700 N River Rd, Douglasville, <text:s/>GA 30122,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DNN01</text:p>
          </table:table-cell>
          <table:table-cell table:style-name="ce60" office:value-type="string" calcext:value-type="string">
            <text:p>US-EAST-12A</text:p>
          </table:table-cell>
          <table:table-cell table:style-name="ce60" office:value-type="string" calcext:value-type="string">
            <text:p>Dalton</text:p>
          </table:table-cell>
          <table:table-cell table:style-name="ce60" office:value-type="string" calcext:value-type="string">
            <text:p>2205 Industrial South Rd</text:p>
          </table:table-cell>
          <table:table-cell table:style-name="ce62" office:value-type="string" calcext:value-type="string">
            <text:p>Dalton</text:p>
          </table:table-cell>
          <table:table-cell table:style-name="ce60" office:value-type="string" calcext:value-type="string">
            <text:p>GA</text:p>
          </table:table-cell>
          <table:table-cell table:style-name="ce60" office:value-type="float" office:value="30721" calcext:value-type="float">
            <text:p>30721</text:p>
          </table:table-cell>
          <table:table-cell table:style-name="ce60" office:value-type="string" calcext:value-type="string">
            <text:p>USA</text:p>
          </table:table-cell>
          <table:table-cell table:style-name="ce60" table:formula="of:=[.G9]&amp;&quot;, &quot; &amp; [.H9]&amp;&quot;,  &quot;&amp;[.I9]&amp;&quot; &quot;&amp;[.J9]&amp;&quot;, &quot;&amp;[.K9]" office:value-type="string" office:string-value="2205 Industrial South Rd, Dalton,  GA 30721, USA" calcext:value-type="string">
            <text:p>2205 Industrial South Rd, Dalton, <text:s/>GA 30721,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EWS01</text:p>
          </table:table-cell>
          <table:table-cell table:style-name="ce60" office:value-type="string" calcext:value-type="string">
            <text:p>US-EAST-02A</text:p>
          </table:table-cell>
          <table:table-cell table:style-name="ce60" office:value-type="string" calcext:value-type="string">
            <text:p>East Windsor (QTS)</text:p>
          </table:table-cell>
          <table:table-cell table:style-name="ce60" office:value-type="string" calcext:value-type="string">
            <text:p>159 Princeton-Hightstown Rd</text:p>
          </table:table-cell>
          <table:table-cell table:style-name="ce62" office:value-type="string" calcext:value-type="string">
            <text:p>East Windsor</text:p>
          </table:table-cell>
          <table:table-cell table:style-name="ce60" office:value-type="string" calcext:value-type="string">
            <text:p>NJ</text:p>
          </table:table-cell>
          <table:table-cell table:style-name="ce60" office:value-type="float" office:value="8520" calcext:value-type="float">
            <text:p>8520</text:p>
          </table:table-cell>
          <table:table-cell table:style-name="ce60" office:value-type="string" calcext:value-type="string">
            <text:p>USA</text:p>
          </table:table-cell>
          <table:table-cell table:style-name="ce60" table:formula="of:=[.G10]&amp;&quot;, &quot; &amp; [.H10]&amp;&quot;,  &quot;&amp;[.I10]&amp;&quot; &quot;&amp;[.J10]&amp;&quot;, &quot;&amp;[.K10]" office:value-type="string" office:string-value="159 Princeton-Hightstown Rd, East Windsor,  NJ 8520, USA" calcext:value-type="string">
            <text:p>159 Princeton-Hightstown Rd, East Windsor, <text:s/>NJ 8520,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LNB01</text:p>
          </table:table-cell>
          <table:table-cell table:style-name="ce60" office:value-type="string" calcext:value-type="string">
            <text:p>US-EAST-07A</text:p>
          </table:table-cell>
          <table:table-cell table:style-name="ce60" office:value-type="string" calcext:value-type="string">
            <text:p>Lebanon</text:p>
          </table:table-cell>
          <table:table-cell table:style-name="ce60" office:value-type="string" calcext:value-type="string">
            <text:p>401 Kingsview Dr</text:p>
          </table:table-cell>
          <table:table-cell table:style-name="ce62" office:value-type="string" calcext:value-type="string">
            <text:p>Lebanon</text:p>
          </table:table-cell>
          <table:table-cell table:style-name="ce60" office:value-type="string" calcext:value-type="string">
            <text:p>OH</text:p>
          </table:table-cell>
          <table:table-cell table:style-name="ce60" office:value-type="float" office:value="45036" calcext:value-type="float">
            <text:p>45036</text:p>
          </table:table-cell>
          <table:table-cell table:style-name="ce60" office:value-type="string" calcext:value-type="string">
            <text:p>USA</text:p>
          </table:table-cell>
          <table:table-cell table:style-name="ce60" table:formula="of:=[.G11]&amp;&quot;, &quot; &amp; [.H11]&amp;&quot;,  &quot;&amp;[.I11]&amp;&quot; &quot;&amp;[.J11]&amp;&quot;, &quot;&amp;[.K11]" office:value-type="string" office:string-value="401 Kingsview Dr, Lebanon,  OH 45036, USA" calcext:value-type="string">
            <text:p>401 Kingsview Dr, Lebanon, <text:s/>OH 45036,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LOE01</text:p>
          </table:table-cell>
          <table:table-cell table:style-name="ce60" office:value-type="string" calcext:value-type="string">
            <text:p>US-EAST-10A</text:p>
          </table:table-cell>
          <table:table-cell table:style-name="ce60" office:value-type="string" calcext:value-type="string">
            <text:p>Lowell (Markley)</text:p>
          </table:table-cell>
          <table:table-cell table:style-name="ce60" office:value-type="string" calcext:value-type="string">
            <text:p>1 Markley Way</text:p>
          </table:table-cell>
          <table:table-cell table:style-name="ce62" office:value-type="string" calcext:value-type="string">
            <text:p>Lowell</text:p>
          </table:table-cell>
          <table:table-cell table:style-name="ce60" office:value-type="string" calcext:value-type="string">
            <text:p>MA</text:p>
          </table:table-cell>
          <table:table-cell table:style-name="ce60" office:value-type="float" office:value="1852" calcext:value-type="float">
            <text:p>1852</text:p>
          </table:table-cell>
          <table:table-cell table:style-name="ce60" office:value-type="string" calcext:value-type="string">
            <text:p>USA</text:p>
          </table:table-cell>
          <table:table-cell table:style-name="ce60" table:formula="of:=[.G12]&amp;&quot;, &quot; &amp; [.H12]&amp;&quot;,  &quot;&amp;[.I12]&amp;&quot; &quot;&amp;[.J12]&amp;&quot;, &quot;&amp;[.K12]" office:value-type="string" office:string-value="1 Markley Way, Lowell,  MA 1852, USA" calcext:value-type="string">
            <text:p>1 Markley Way, Lowell, <text:s/>MA 1852,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OBG01</text:p>
          </table:table-cell>
          <table:table-cell table:style-name="ce60" office:value-type="string" calcext:value-type="string">
            <text:p>US-EAST-01A</text:p>
          </table:table-cell>
          <table:table-cell table:style-name="ce60" office:value-type="string" calcext:value-type="string">
            <text:p>Orangeburg</text:p>
          </table:table-cell>
          <table:table-cell table:style-name="ce60" office:value-type="string" calcext:value-type="string">
            <text:p>2000 Corporate Dr</text:p>
          </table:table-cell>
          <table:table-cell table:style-name="ce62" office:value-type="string" calcext:value-type="string">
            <text:p>Orangeburg</text:p>
          </table:table-cell>
          <table:table-cell table:style-name="ce60" office:value-type="string" calcext:value-type="string">
            <text:p>NY</text:p>
          </table:table-cell>
          <table:table-cell table:style-name="ce60" office:value-type="float" office:value="10962" calcext:value-type="float">
            <text:p>10962</text:p>
          </table:table-cell>
          <table:table-cell table:style-name="ce60" office:value-type="string" calcext:value-type="string">
            <text:p>USA</text:p>
          </table:table-cell>
          <table:table-cell table:style-name="ce60" table:formula="of:=[.G13]&amp;&quot;, &quot; &amp; [.H13]&amp;&quot;,  &quot;&amp;[.I13]&amp;&quot; &quot;&amp;[.J13]&amp;&quot;, &quot;&amp;[.K13]" office:value-type="string" office:string-value="2000 Corporate Dr, Orangeburg,  NY 10962, USA" calcext:value-type="string">
            <text:p>2000 Corporate Dr, Orangeburg, <text:s/>NY 10962,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Under construction</text:p>
          </table:table-cell>
          <table:table-cell table:style-name="ce60" office:value-type="string" calcext:value-type="string">
            <text:p>US-PPY01</text:p>
          </table:table-cell>
          <table:table-cell table:style-name="ce60" office:value-type="string" calcext:value-type="string">
            <text:p>US-EAST-14A</text:p>
          </table:table-cell>
          <table:table-cell table:style-name="ce60" office:value-type="string" calcext:value-type="string">
            <text:p>Parsippany</text:p>
          </table:table-cell>
          <table:table-cell table:style-name="ce60" office:value-type="string" calcext:value-type="string">
            <text:p>200 Webro Rd</text:p>
          </table:table-cell>
          <table:table-cell table:style-name="ce62" office:value-type="string" calcext:value-type="string">
            <text:p>Parsippany</text:p>
          </table:table-cell>
          <table:table-cell table:style-name="ce60" office:value-type="string" calcext:value-type="string">
            <text:p>NJ</text:p>
          </table:table-cell>
          <table:table-cell table:style-name="ce60" office:value-type="float" office:value="7054" calcext:value-type="float">
            <text:p>7054</text:p>
          </table:table-cell>
          <table:table-cell table:style-name="ce60" office:value-type="string" calcext:value-type="string">
            <text:p>USA</text:p>
          </table:table-cell>
          <table:table-cell table:style-name="ce60" table:formula="of:=[.G14]&amp;&quot;, &quot; &amp; [.H14]&amp;&quot;,  &quot;&amp;[.I14]&amp;&quot; &quot;&amp;[.J14]&amp;&quot;, &quot;&amp;[.K14]" office:value-type="string" office:string-value="200 Webro Rd, Parsippany,  NJ 7054, USA" calcext:value-type="string">
            <text:p>200 Webro Rd, Parsippany, <text:s/>NJ 7054,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SVG01</text:p>
          </table:table-cell>
          <table:table-cell table:style-name="ce60" office:value-type="string" calcext:value-type="string">
            <text:p>US-EAST-09A</text:p>
          </table:table-cell>
          <table:table-cell table:style-name="ce60" office:value-type="string" calcext:value-type="string">
            <text:p>Suwanee</text:p>
          </table:table-cell>
          <table:table-cell table:style-name="ce60" office:value-type="string" calcext:value-type="string">
            <text:p>120 Satellite Blvd</text:p>
          </table:table-cell>
          <table:table-cell table:style-name="ce62" office:value-type="string" calcext:value-type="string">
            <text:p>Suwanee</text:p>
          </table:table-cell>
          <table:table-cell table:style-name="ce60" office:value-type="string" calcext:value-type="string">
            <text:p>GA</text:p>
          </table:table-cell>
          <table:table-cell table:style-name="ce60" office:value-type="float" office:value="30024" calcext:value-type="float">
            <text:p>30024</text:p>
          </table:table-cell>
          <table:table-cell table:style-name="ce60" office:value-type="string" calcext:value-type="string">
            <text:p>USA</text:p>
          </table:table-cell>
          <table:table-cell table:style-name="ce60" table:formula="of:=[.G15]&amp;&quot;, &quot; &amp; [.H15]&amp;&quot;,  &quot;&amp;[.I15]&amp;&quot; &quot;&amp;[.J15]&amp;&quot;, &quot;&amp;[.K15]" office:value-type="string" office:string-value="120 Satellite Blvd, Suwanee,  GA 30024, USA" calcext:value-type="string">
            <text:p>120 Satellite Blvd, Suwanee, <text:s/>GA 30024,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WJQ01</text:p>
          </table:table-cell>
          <table:table-cell table:style-name="ce60" office:value-type="string" calcext:value-type="string">
            <text:p>LGA1</text:p>
          </table:table-cell>
          <table:table-cell table:style-name="ce60" office:value-type="string" calcext:value-type="string">
            <text:p>Weehawken (LGA1)</text:p>
          </table:table-cell>
          <table:table-cell table:style-name="ce60" office:value-type="string" calcext:value-type="string">
            <text:p>1919 Park Ave</text:p>
          </table:table-cell>
          <table:table-cell table:style-name="ce62" office:value-type="string" calcext:value-type="string">
            <text:p>Weehawken</text:p>
          </table:table-cell>
          <table:table-cell table:style-name="ce60" office:value-type="string" calcext:value-type="string">
            <text:p>NJ</text:p>
          </table:table-cell>
          <table:table-cell table:style-name="ce60" office:value-type="float" office:value="7086" calcext:value-type="float">
            <text:p>7086</text:p>
          </table:table-cell>
          <table:table-cell table:style-name="ce60" office:value-type="string" calcext:value-type="string">
            <text:p>USA</text:p>
          </table:table-cell>
          <table:table-cell table:style-name="ce60" table:formula="of:=[.G16]&amp;&quot;, &quot; &amp; [.H16]&amp;&quot;,  &quot;&amp;[.I16]&amp;&quot; &quot;&amp;[.J16]&amp;&quot;, &quot;&amp;[.K16]" office:value-type="string" office:string-value="1919 Park Ave, Weehawken,  NJ 7086, USA" calcext:value-type="string">
            <text:p>1919 Park Ave, Weehawken, <text:s/>NJ 7086,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Under construction</text:p>
          </table:table-cell>
          <table:table-cell table:style-name="ce60" office:value-type="string" calcext:value-type="string">
            <text:p>US-LNS01</text:p>
          </table:table-cell>
          <table:table-cell table:style-name="ce60"/>
          <table:table-cell table:style-name="ce60" office:value-type="string" calcext:value-type="string">
            <text:p>Lancaster (PA AI campus)</text:p>
          </table:table-cell>
          <table:table-cell table:style-name="ce60" office:value-type="string" calcext:value-type="string">
            <text:p>Lancaster, PA 17602 (exact street TBD)</text:p>
          </table:table-cell>
          <table:table-cell table:style-name="ce62" office:value-type="string" calcext:value-type="string">
            <text:p>Lancaster</text:p>
          </table:table-cell>
          <table:table-cell table:style-name="ce60" office:value-type="string" calcext:value-type="string">
            <text:p>PA</text:p>
          </table:table-cell>
          <table:table-cell table:style-name="ce60" office:value-type="float" office:value="17602" calcext:value-type="float">
            <text:p>17602</text:p>
          </table:table-cell>
          <table:table-cell table:style-name="ce60" office:value-type="string" calcext:value-type="string">
            <text:p>USA</text:p>
          </table:table-cell>
          <table:table-cell table:style-name="ce60" table:formula="of:=[.G17]&amp;&quot;, &quot; &amp; [.H17]&amp;&quot;,  &quot;&amp;[.I17]&amp;&quot; &quot;&amp;[.J17]&amp;&quot;, &quot;&amp;[.K17]" office:value-type="string" office:string-value="Lancaster, PA 17602 (exact street TBD), Lancaster,  PA 17602, USA" calcext:value-type="string">
            <text:p>Lancaster, PA 17602 (exact street TBD), Lancaster, <text:s/>PA 17602, USA</text:p>
          </table:table-cell>
          <table:table-cell table:number-columns-repeated="1012"/>
        </table:table-row>
        <table:table-row table:style-name="ro9" table:visibility="collapse">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US-MEM01</text:p>
          </table:table-cell>
          <table:table-cell table:style-name="ce60"/>
          <table:table-cell table:style-name="ce60" office:value-type="string" calcext:value-type="string">
            <text:p>Memphis DC (exact facility TBD)</text:p>
          </table:table-cell>
          <table:table-cell table:style-name="ce60" office:value-type="string" calcext:value-type="string">
            <text:p>Memphis (address TBD)</text:p>
          </table:table-cell>
          <table:table-cell table:style-name="ce62" office:value-type="string" calcext:value-type="string">
            <text:p>Memphis</text:p>
          </table:table-cell>
          <table:table-cell table:style-name="ce60" office:value-type="string" calcext:value-type="string">
            <text:p>TN</text:p>
          </table:table-cell>
          <table:table-cell table:style-name="ce60"/>
          <table:table-cell table:style-name="ce60" office:value-type="string" calcext:value-type="string">
            <text:p>USA</text:p>
          </table:table-cell>
          <table:table-cell table:style-name="ce60" table:formula="of:=[.G18]&amp;&quot;, &quot; &amp; [.H18]&amp;&quot;,  &quot;&amp;[.I18]&amp;&quot; &quot;&amp;[.J18]&amp;&quot;, &quot;&amp;[.K18]" office:value-type="string" office:string-value="Memphis (address TBD), Memphis,  TN , USA" calcext:value-type="string">
            <text:p>Memphis (address TBD), Memphis, <text:s/>TN , USA</text:p>
          </table:table-cell>
          <table:table-cell table:number-columns-repeated="1012"/>
        </table:table-row>
        <table:table-row table:style-name="ro9" table:visibility="collapse">
          <table:table-cell table:style-name="ce61" table:content-validation-name="val3" office:value-type="string" calcext:value-type="string">
            <text:p>US-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US-CYS01</text:p>
          </table:table-cell>
          <table:table-cell table:style-name="ce60"/>
          <table:table-cell table:style-name="ce60" office:value-type="string" calcext:value-type="string">
            <text:p>Cheyenne DC (exact facility TBD)</text:p>
          </table:table-cell>
          <table:table-cell table:style-name="ce60" office:value-type="string" calcext:value-type="string">
            <text:p>Cheyenne, WY 82001 (address TBD)</text:p>
          </table:table-cell>
          <table:table-cell table:style-name="ce62" office:value-type="string" calcext:value-type="string">
            <text:p>Cheyenne</text:p>
          </table:table-cell>
          <table:table-cell table:style-name="ce60" office:value-type="string" calcext:value-type="string">
            <text:p>WY</text:p>
          </table:table-cell>
          <table:table-cell table:style-name="ce60" office:value-type="float" office:value="82001" calcext:value-type="float">
            <text:p>82001</text:p>
          </table:table-cell>
          <table:table-cell table:style-name="ce60" office:value-type="string" calcext:value-type="string">
            <text:p>USA</text:p>
          </table:table-cell>
          <table:table-cell table:style-name="ce60" table:formula="of:=[.G19]&amp;&quot;, &quot; &amp; [.H19]&amp;&quot;,  &quot;&amp;[.I19]&amp;&quot; &quot;&amp;[.J19]&amp;&quot;, &quot;&amp;[.K19]" office:value-type="string" office:string-value="Cheyenne, WY 82001 (address TBD), Cheyenne,  WY 82001, USA" calcext:value-type="string">
            <text:p>Cheyenne, WY 82001 (address TBD), Cheyenne, <text:s/>WY 82001,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AAI01</text:p>
          </table:table-cell>
          <table:table-cell table:style-name="ce60" office:value-type="string" calcext:value-type="string">
            <text:p>ATL4</text:p>
          </table:table-cell>
          <table:table-cell table:style-name="ce60" office:value-type="string" calcext:value-type="string">
            <text:p>Alpharetta</text:p>
          </table:table-cell>
          <table:table-cell table:style-name="ce60" office:value-type="string" calcext:value-type="string">
            <text:p>4905 North Point Pkwy</text:p>
          </table:table-cell>
          <table:table-cell table:style-name="ce62" office:value-type="string" calcext:value-type="string">
            <text:p>Alpharetta</text:p>
          </table:table-cell>
          <table:table-cell table:style-name="ce60" office:value-type="string" calcext:value-type="string">
            <text:p>GA</text:p>
          </table:table-cell>
          <table:table-cell table:style-name="ce60" office:value-type="float" office:value="30022" calcext:value-type="float">
            <text:p>30022</text:p>
          </table:table-cell>
          <table:table-cell table:style-name="ce60" office:value-type="string" calcext:value-type="string">
            <text:p>USA</text:p>
          </table:table-cell>
          <table:table-cell table:style-name="ce60" table:formula="of:=[.G20]&amp;&quot;, &quot; &amp; [.H20]&amp;&quot;,  &quot;&amp;[.I20]&amp;&quot; &quot;&amp;[.J20]&amp;&quot;, &quot;&amp;[.K20]" office:value-type="string" office:string-value="4905 North Point Pkwy, Alpharetta,  GA 30022, USA" calcext:value-type="string">
            <text:p>4905 North Point Pkwy, Alpharetta, <text:s/>GA 30022,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DTN01</text:p>
          </table:table-cell>
          <table:table-cell table:style-name="ce60" office:value-type="string" calcext:value-type="string">
            <text:p>US-CENTRAL-03A</text:p>
          </table:table-cell>
          <table:table-cell table:style-name="ce60" office:value-type="string" calcext:value-type="string">
            <text:p>Denton (primary campus)</text:p>
          </table:table-cell>
          <table:table-cell table:style-name="ce60" office:value-type="string" calcext:value-type="string">
            <text:p>8171 Jim Christal Rd</text:p>
          </table:table-cell>
          <table:table-cell table:style-name="ce62" office:value-type="string" calcext:value-type="string">
            <text:p>Denton</text:p>
          </table:table-cell>
          <table:table-cell table:style-name="ce60" office:value-type="string" calcext:value-type="string">
            <text:p>TX</text:p>
          </table:table-cell>
          <table:table-cell table:style-name="ce60" office:value-type="float" office:value="76207" calcext:value-type="float">
            <text:p>76207</text:p>
          </table:table-cell>
          <table:table-cell table:style-name="ce60" office:value-type="string" calcext:value-type="string">
            <text:p>USA</text:p>
          </table:table-cell>
          <table:table-cell table:style-name="ce60" table:formula="of:=[.G21]&amp;&quot;, &quot; &amp; [.H21]&amp;&quot;,  &quot;&amp;[.I21]&amp;&quot; &quot;&amp;[.J21]&amp;&quot;, &quot;&amp;[.K21]" office:value-type="string" office:string-value="8171 Jim Christal Rd, Denton,  TX 76207, USA" calcext:value-type="string">
            <text:p>8171 Jim Christal Rd, Denton, <text:s/>TX 76207,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HMN01</text:p>
          </table:table-cell>
          <table:table-cell table:style-name="ce60" office:value-type="string" calcext:value-type="string">
            <text:p>SBN1</text:p>
          </table:table-cell>
          <table:table-cell table:style-name="ce60" office:value-type="string" calcext:value-type="string">
            <text:p>Hammond (Digital Crossroad)</text:p>
          </table:table-cell>
          <table:table-cell table:style-name="ce60" office:value-type="string" calcext:value-type="string">
            <text:p>100 Digital Crossroad Dr</text:p>
          </table:table-cell>
          <table:table-cell table:style-name="ce62" office:value-type="string" calcext:value-type="string">
            <text:p>Hammond</text:p>
          </table:table-cell>
          <table:table-cell table:style-name="ce60" office:value-type="string" calcext:value-type="string">
            <text:p>IN</text:p>
          </table:table-cell>
          <table:table-cell table:style-name="ce60" office:value-type="float" office:value="46320" calcext:value-type="float">
            <text:p>46320</text:p>
          </table:table-cell>
          <table:table-cell table:style-name="ce60" office:value-type="string" calcext:value-type="string">
            <text:p>USA</text:p>
          </table:table-cell>
          <table:table-cell table:style-name="ce60" table:formula="of:=[.G22]&amp;&quot;, &quot; &amp; [.H22]&amp;&quot;,  &quot;&amp;[.I22]&amp;&quot; &quot;&amp;[.J22]&amp;&quot;, &quot;&amp;[.K22]" office:value-type="string" office:string-value="100 Digital Crossroad Dr, Hammond,  IN 46320, USA" calcext:value-type="string">
            <text:p>100 Digital Crossroad Dr, Hammond, <text:s/>IN 46320,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PLZ01</text:p>
          </table:table-cell>
          <table:table-cell table:style-name="ce60" office:value-type="string" calcext:value-type="string">
            <text:p>DFW1A</text:p>
          </table:table-cell>
          <table:table-cell table:style-name="ce60" office:value-type="string" calcext:value-type="string">
            <text:p>Plano (1000 Coit – Lincoln Rackhouse)</text:p>
          </table:table-cell>
          <table:table-cell table:style-name="ce60" office:value-type="string" calcext:value-type="string">
            <text:p>1000 Coit Rd</text:p>
          </table:table-cell>
          <table:table-cell table:style-name="ce62" office:value-type="string" calcext:value-type="string">
            <text:p>Plano</text:p>
          </table:table-cell>
          <table:table-cell table:style-name="ce60" office:value-type="string" calcext:value-type="string">
            <text:p>TX</text:p>
          </table:table-cell>
          <table:table-cell table:style-name="ce60" office:value-type="float" office:value="75075" calcext:value-type="float">
            <text:p>75075</text:p>
          </table:table-cell>
          <table:table-cell table:style-name="ce60" office:value-type="string" calcext:value-type="string">
            <text:p>USA</text:p>
          </table:table-cell>
          <table:table-cell table:style-name="ce60" table:formula="of:=[.G23]&amp;&quot;, &quot; &amp; [.H23]&amp;&quot;,  &quot;&amp;[.I23]&amp;&quot; &quot;&amp;[.J23]&amp;&quot;, &quot;&amp;[.K23]" office:value-type="string" office:string-value="1000 Coit Rd, Plano,  TX 75075, USA" calcext:value-type="string">
            <text:p>1000 Coit Rd, Plano, <text:s/>TX 75075,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PLZ02</text:p>
          </table:table-cell>
          <table:table-cell table:style-name="ce60" office:value-type="string" calcext:value-type="string">
            <text:p>US-CENTRAL-04A</text:p>
          </table:table-cell>
          <table:table-cell table:style-name="ce60" office:value-type="string" calcext:value-type="string">
            <text:p>Plano2</text:p>
          </table:table-cell>
          <table:table-cell table:style-name="ce60" office:value-type="string" calcext:value-type="string">
            <text:p>3500 E Plano Pkwy</text:p>
          </table:table-cell>
          <table:table-cell table:style-name="ce62" office:value-type="string" calcext:value-type="string">
            <text:p>Plano</text:p>
          </table:table-cell>
          <table:table-cell table:style-name="ce60" office:value-type="string" calcext:value-type="string">
            <text:p>TX</text:p>
          </table:table-cell>
          <table:table-cell table:style-name="ce60" office:value-type="float" office:value="75074" calcext:value-type="float">
            <text:p>75074</text:p>
          </table:table-cell>
          <table:table-cell table:style-name="ce60" office:value-type="string" calcext:value-type="string">
            <text:p>USA</text:p>
          </table:table-cell>
          <table:table-cell table:style-name="ce60" table:formula="of:=[.G24]&amp;&quot;, &quot; &amp; [.H24]&amp;&quot;,  &quot;&amp;[.I24]&amp;&quot; &quot;&amp;[.J24]&amp;&quot;, &quot;&amp;[.K24]" office:value-type="string" office:string-value="3500 E Plano Pkwy, Plano,  TX 75074, USA" calcext:value-type="string">
            <text:p>3500 E Plano Pkwy, Plano, <text:s/>TX 75074,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RIN01</text:p>
          </table:table-cell>
          <table:table-cell table:style-name="ce60" office:value-type="string" calcext:value-type="string">
            <text:p>US-CENTRAL-05A</text:p>
          </table:table-cell>
          <table:table-cell table:style-name="ce60" office:value-type="string" calcext:value-type="string">
            <text:p>Richardson</text:p>
          </table:table-cell>
          <table:table-cell table:style-name="ce60" office:value-type="string" calcext:value-type="string">
            <text:p>1510 E Lookout Dr</text:p>
          </table:table-cell>
          <table:table-cell table:style-name="ce62" office:value-type="string" calcext:value-type="string">
            <text:p>Richardson</text:p>
          </table:table-cell>
          <table:table-cell table:style-name="ce60" office:value-type="string" calcext:value-type="string">
            <text:p>TX</text:p>
          </table:table-cell>
          <table:table-cell table:style-name="ce60" office:value-type="float" office:value="75082" calcext:value-type="float">
            <text:p>75082</text:p>
          </table:table-cell>
          <table:table-cell table:style-name="ce60" office:value-type="string" calcext:value-type="string">
            <text:p>USA</text:p>
          </table:table-cell>
          <table:table-cell table:style-name="ce60" table:formula="of:=[.G25]&amp;&quot;, &quot; &amp; [.H25]&amp;&quot;,  &quot;&amp;[.I25]&amp;&quot; &quot;&amp;[.J25]&amp;&quot;, &quot;&amp;[.K25]" office:value-type="string" office:string-value="1510 E Lookout Dr, Richardson,  TX 75082, USA" calcext:value-type="string">
            <text:p>1510 E Lookout Dr, Richardson, <text:s/>TX 75082,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VO201</text:p>
          </table:table-cell>
          <table:table-cell table:style-name="ce60" office:value-type="string" calcext:value-type="string">
            <text:p>US-CENTRAL-01A</text:p>
          </table:table-cell>
          <table:table-cell table:style-name="ce60" office:value-type="string" calcext:value-type="string">
            <text:p>Volo</text:p>
          </table:table-cell>
          <table:table-cell table:style-name="ce60" office:value-type="string" calcext:value-type="string">
            <text:p>300 S Fish Lake Rd</text:p>
          </table:table-cell>
          <table:table-cell table:style-name="ce62" office:value-type="string" calcext:value-type="string">
            <text:p>Volo</text:p>
          </table:table-cell>
          <table:table-cell table:style-name="ce60" office:value-type="string" calcext:value-type="string">
            <text:p>IL</text:p>
          </table:table-cell>
          <table:table-cell table:style-name="ce60" office:value-type="float" office:value="60073" calcext:value-type="float">
            <text:p>60073</text:p>
          </table:table-cell>
          <table:table-cell table:style-name="ce60" office:value-type="string" calcext:value-type="string">
            <text:p>USA</text:p>
          </table:table-cell>
          <table:table-cell table:style-name="ce60" table:formula="of:=[.G26]&amp;&quot;, &quot; &amp; [.H26]&amp;&quot;,  &quot;&amp;[.I26]&amp;&quot; &quot;&amp;[.J26]&amp;&quot;, &quot;&amp;[.K26]" office:value-type="string" office:string-value="300 S Fish Lake Rd, Volo,  IL 60073, USA" calcext:value-type="string">
            <text:p>300 S Fish Lake Rd, Volo, <text:s/>IL 60073,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WCI01</text:p>
          </table:table-cell>
          <table:table-cell table:style-name="ce60" office:value-type="string" calcext:value-type="string">
            <text:p>ORD1</text:p>
          </table:table-cell>
          <table:table-cell table:style-name="ce60" office:value-type="string" calcext:value-type="string">
            <text:p>West Chicago (ORD1)</text:p>
          </table:table-cell>
          <table:table-cell table:style-name="ce60" office:value-type="string" calcext:value-type="string">
            <text:p>603 Discovery Dr</text:p>
          </table:table-cell>
          <table:table-cell table:style-name="ce62" office:value-type="string" calcext:value-type="string">
            <text:p>West Chicago</text:p>
          </table:table-cell>
          <table:table-cell table:style-name="ce60" office:value-type="string" calcext:value-type="string">
            <text:p>IL</text:p>
          </table:table-cell>
          <table:table-cell table:style-name="ce60" office:value-type="float" office:value="60185" calcext:value-type="float">
            <text:p>60185</text:p>
          </table:table-cell>
          <table:table-cell table:style-name="ce60" office:value-type="string" calcext:value-type="string">
            <text:p>USA</text:p>
          </table:table-cell>
          <table:table-cell table:style-name="ce60" table:formula="of:=[.G27]&amp;&quot;, &quot; &amp; [.H27]&amp;&quot;,  &quot;&amp;[.I27]&amp;&quot; &quot;&amp;[.J27]&amp;&quot;, &quot;&amp;[.K27]" office:value-type="string" office:string-value="603 Discovery Dr, West Chicago,  IL 60185, USA" calcext:value-type="string">
            <text:p>603 Discovery Dr, West Chicago, <text:s/>IL 60185,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CDZ01</text:p>
          </table:table-cell>
          <table:table-cell table:style-name="ce60" office:value-type="string" calcext:value-type="string">
            <text:p>US-EAST-13A</text:p>
          </table:table-cell>
          <table:table-cell table:style-name="ce60" office:value-type="string" calcext:value-type="string">
            <text:p>Caledonia / Grand Rapids</text:p>
          </table:table-cell>
          <table:table-cell table:style-name="ce60" office:value-type="string" calcext:value-type="string">
            <text:p>6100 East Paris Ave SE</text:p>
          </table:table-cell>
          <table:table-cell table:style-name="ce62" office:value-type="string" calcext:value-type="string">
            <text:p>Caledonia</text:p>
          </table:table-cell>
          <table:table-cell table:style-name="ce60" office:value-type="string" calcext:value-type="string">
            <text:p>MI</text:p>
          </table:table-cell>
          <table:table-cell table:style-name="ce60" office:value-type="float" office:value="49512" calcext:value-type="float">
            <text:p>49512</text:p>
          </table:table-cell>
          <table:table-cell table:style-name="ce60" office:value-type="string" calcext:value-type="string">
            <text:p>USA</text:p>
          </table:table-cell>
          <table:table-cell table:style-name="ce60" table:formula="of:=[.G28]&amp;&quot;, &quot; &amp; [.H28]&amp;&quot;,  &quot;&amp;[.I28]&amp;&quot; &quot;&amp;[.J28]&amp;&quot;, &quot;&amp;[.K28]" office:value-type="string" office:string-value="6100 East Paris Ave SE, Caledonia,  MI 49512, USA" calcext:value-type="string">
            <text:p>6100 East Paris Ave SE, Caledonia, <text:s/>MI 49512,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EVI01</text:p>
          </table:table-cell>
          <table:table-cell table:style-name="ce60" office:value-type="string" calcext:value-type="string">
            <text:p>US-CENTRAL-07A</text:p>
          </table:table-cell>
          <table:table-cell table:style-name="ce60" office:value-type="string" calcext:value-type="string">
            <text:p>Elk Grove Village</text:p>
          </table:table-cell>
          <table:table-cell table:style-name="ce60" office:value-type="string" calcext:value-type="string">
            <text:p>1650–1500 E Higgins Rd</text:p>
          </table:table-cell>
          <table:table-cell table:style-name="ce62" office:value-type="string" calcext:value-type="string">
            <text:p>Elk Grove Village</text:p>
          </table:table-cell>
          <table:table-cell table:style-name="ce60" office:value-type="string" calcext:value-type="string">
            <text:p>IL</text:p>
          </table:table-cell>
          <table:table-cell table:style-name="ce60" office:value-type="float" office:value="60007" calcext:value-type="float">
            <text:p>60007</text:p>
          </table:table-cell>
          <table:table-cell table:style-name="ce60" office:value-type="string" calcext:value-type="string">
            <text:p>USA</text:p>
          </table:table-cell>
          <table:table-cell table:style-name="ce60" table:formula="of:=[.G29]&amp;&quot;, &quot; &amp; [.H29]&amp;&quot;,  &quot;&amp;[.I29]&amp;&quot; &quot;&amp;[.J29]&amp;&quot;, &quot;&amp;[.K29]" office:value-type="string" office:string-value="1650–1500 E Higgins Rd, Elk Grove Village,  IL 60007, USA" calcext:value-type="string">
            <text:p>1650–1500 E Higgins Rd, Elk Grove Village, <text:s/>IL 60007,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LZL01</text:p>
          </table:table-cell>
          <table:table-cell table:style-name="ce60" office:value-type="string" calcext:value-type="string">
            <text:p>US-CENTRAL-08B</text:p>
          </table:table-cell>
          <table:table-cell table:style-name="ce60" office:value-type="string" calcext:value-type="string">
            <text:p>Ellendale ND campus</text:p>
          </table:table-cell>
          <table:table-cell table:style-name="ce60" office:value-type="string" calcext:value-type="string">
            <text:p>9685 87th Ave SE</text:p>
          </table:table-cell>
          <table:table-cell table:style-name="ce62" office:value-type="string" calcext:value-type="string">
            <text:p>Ellendale</text:p>
          </table:table-cell>
          <table:table-cell table:style-name="ce60" office:value-type="string" calcext:value-type="string">
            <text:p>ND</text:p>
          </table:table-cell>
          <table:table-cell table:style-name="ce60" office:value-type="float" office:value="58436" calcext:value-type="float">
            <text:p>58436</text:p>
          </table:table-cell>
          <table:table-cell table:style-name="ce60" office:value-type="string" calcext:value-type="string">
            <text:p>USA</text:p>
          </table:table-cell>
          <table:table-cell table:style-name="ce60" table:formula="of:=[.G30]&amp;&quot;, &quot; &amp; [.H30]&amp;&quot;,  &quot;&amp;[.I30]&amp;&quot; &quot;&amp;[.J30]&amp;&quot;, &quot;&amp;[.K30]" office:value-type="string" office:string-value="9685 87th Ave SE, Ellendale,  ND 58436, USA" calcext:value-type="string">
            <text:p>9685 87th Ave SE, Ellendale, <text:s/>ND 58436,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Under construction</text:p>
          </table:table-cell>
          <table:table-cell table:style-name="ce60" office:value-type="string" calcext:value-type="string">
            <text:p>US-KWO01</text:p>
          </table:table-cell>
          <table:table-cell table:style-name="ce60" office:value-type="string" calcext:value-type="string">
            <text:p>US-EAST-02C</text:p>
          </table:table-cell>
          <table:table-cell table:style-name="ce60" office:value-type="string" calcext:value-type="string">
            <text:p>Kenilworth (NEST campus)</text:p>
          </table:table-cell>
          <table:table-cell table:style-name="ce60" office:value-type="string" calcext:value-type="string">
            <text:p>2000 Galloping Hill Rd</text:p>
          </table:table-cell>
          <table:table-cell table:style-name="ce62" office:value-type="string" calcext:value-type="string">
            <text:p>Kenilworth</text:p>
          </table:table-cell>
          <table:table-cell table:style-name="ce60" office:value-type="string" calcext:value-type="string">
            <text:p>NJ</text:p>
          </table:table-cell>
          <table:table-cell table:style-name="ce60" office:value-type="float" office:value="7033" calcext:value-type="float">
            <text:p>7033</text:p>
          </table:table-cell>
          <table:table-cell table:style-name="ce60" office:value-type="string" calcext:value-type="string">
            <text:p>USA</text:p>
          </table:table-cell>
          <table:table-cell table:style-name="ce60" table:formula="of:=[.G31]&amp;&quot;, &quot; &amp; [.H31]&amp;&quot;,  &quot;&amp;[.I31]&amp;&quot; &quot;&amp;[.J31]&amp;&quot;, &quot;&amp;[.K31]" office:value-type="string" office:string-value="2000 Galloping Hill Rd, Kenilworth,  NJ 7033, USA" calcext:value-type="string">
            <text:p>2000 Galloping Hill Rd, Kenilworth, <text:s/>NJ 7033,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Under construction</text:p>
          </table:table-cell>
          <table:table-cell table:style-name="ce60" office:value-type="string" calcext:value-type="string">
            <text:p>US-MKO01</text:p>
          </table:table-cell>
          <table:table-cell table:style-name="ce60" office:value-type="string" calcext:value-type="string">
            <text:p>US-CENTRAL-10A</text:p>
          </table:table-cell>
          <table:table-cell table:style-name="ce60" office:value-type="string" calcext:value-type="string">
            <text:p>Muskogee (DC campus)</text:p>
          </table:table-cell>
          <table:table-cell table:style-name="ce60" office:value-type="string" calcext:value-type="string">
            <text:p>4901 Harold Scoggins Dr</text:p>
          </table:table-cell>
          <table:table-cell table:style-name="ce62" office:value-type="string" calcext:value-type="string">
            <text:p>Muskogee</text:p>
          </table:table-cell>
          <table:table-cell table:style-name="ce60" office:value-type="string" calcext:value-type="string">
            <text:p>OK</text:p>
          </table:table-cell>
          <table:table-cell table:style-name="ce60" office:value-type="float" office:value="74403" calcext:value-type="float">
            <text:p>74403</text:p>
          </table:table-cell>
          <table:table-cell table:style-name="ce60" office:value-type="string" calcext:value-type="string">
            <text:p>USA</text:p>
          </table:table-cell>
          <table:table-cell table:style-name="ce60" table:formula="of:=[.G32]&amp;&quot;, &quot; &amp; [.H32]&amp;&quot;,  &quot;&amp;[.I32]&amp;&quot; &quot;&amp;[.J32]&amp;&quot;, &quot;&amp;[.K32]" office:value-type="string" office:string-value="4901 Harold Scoggins Dr, Muskogee,  OK 74403, USA" calcext:value-type="string">
            <text:p>4901 Harold Scoggins Dr, Muskogee, <text:s/>OK 74403,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Under construction</text:p>
          </table:table-cell>
          <table:table-cell table:style-name="ce60" office:value-type="string" calcext:value-type="string">
            <text:p>US-SKY01</text:p>
          </table:table-cell>
          <table:table-cell table:style-name="ce60" office:value-type="string" calcext:value-type="string">
            <text:p>US-CENTRAL-11A</text:p>
          </table:table-cell>
          <table:table-cell table:style-name="ce60" office:value-type="string" calcext:value-type="string">
            <text:p>Sandusky</text:p>
          </table:table-cell>
          <table:table-cell table:style-name="ce60" office:value-type="string" calcext:value-type="string">
            <text:p>2509 Hayes Ave, Building 1</text:p>
          </table:table-cell>
          <table:table-cell table:style-name="ce62" office:value-type="string" calcext:value-type="string">
            <text:p>Sandusky</text:p>
          </table:table-cell>
          <table:table-cell table:style-name="ce60" office:value-type="string" calcext:value-type="string">
            <text:p>OH</text:p>
          </table:table-cell>
          <table:table-cell table:style-name="ce60" office:value-type="float" office:value="44870" calcext:value-type="float">
            <text:p>44870</text:p>
          </table:table-cell>
          <table:table-cell table:style-name="ce60" office:value-type="string" calcext:value-type="string">
            <text:p>USA</text:p>
          </table:table-cell>
          <table:table-cell table:style-name="ce60" table:formula="of:=[.G33]&amp;&quot;, &quot; &amp; [.H33]&amp;&quot;,  &quot;&amp;[.I33]&amp;&quot; &quot;&amp;[.J33]&amp;&quot;, &quot;&amp;[.K33]" office:value-type="string" office:string-value="2509 Hayes Ave, Building 1, Sandusky,  OH 44870, USA" calcext:value-type="string">
            <text:p>2509 Hayes Ave, Building 1, Sandusky, <text:s/>OH 44870,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Under construction</text:p>
          </table:table-cell>
          <table:table-cell table:style-name="ce60" office:value-type="string" calcext:value-type="string">
            <text:p>US-LNS01</text:p>
          </table:table-cell>
          <table:table-cell table:style-name="ce60"/>
          <table:table-cell table:style-name="ce60" office:value-type="string" calcext:value-type="string">
            <text:p>Lancaster (PA AI campus)</text:p>
          </table:table-cell>
          <table:table-cell table:style-name="ce60" office:value-type="string" calcext:value-type="string">
            <text:p>Lancaster, PA 17602 (exact street TBD)</text:p>
          </table:table-cell>
          <table:table-cell table:style-name="ce62" office:value-type="string" calcext:value-type="string">
            <text:p>Lancaster</text:p>
          </table:table-cell>
          <table:table-cell table:style-name="ce60" office:value-type="string" calcext:value-type="string">
            <text:p>PA</text:p>
          </table:table-cell>
          <table:table-cell table:style-name="ce60" office:value-type="float" office:value="17602" calcext:value-type="float">
            <text:p>17602</text:p>
          </table:table-cell>
          <table:table-cell table:style-name="ce60" office:value-type="string" calcext:value-type="string">
            <text:p>USA</text:p>
          </table:table-cell>
          <table:table-cell table:style-name="ce60" table:formula="of:=[.G34]&amp;&quot;, &quot; &amp; [.H34]&amp;&quot;,  &quot;&amp;[.I34]&amp;&quot; &quot;&amp;[.J34]&amp;&quot;, &quot;&amp;[.K34]" office:value-type="string" office:string-value="Lancaster, PA 17602 (exact street TBD), Lancaster,  PA 17602, USA" calcext:value-type="string">
            <text:p>Lancaster, PA 17602 (exact street TBD), Lancaster, <text:s/>PA 17602, USA</text:p>
          </table:table-cell>
          <table:table-cell table:number-columns-repeated="1012"/>
        </table:table-row>
        <table:table-row table:style-name="ro9" table:visibility="collapse">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US-RRX01</text:p>
          </table:table-cell>
          <table:table-cell table:style-name="ce60" office:value-type="string" calcext:value-type="string">
            <text:p>US-CENTRAL-06A</text:p>
          </table:table-cell>
          <table:table-cell table:style-name="ce60" office:value-type="string" calcext:value-type="string">
            <text:p>Round Rock (AUS4)</text:p>
          </table:table-cell>
          <table:table-cell table:style-name="ce60" office:value-type="string" calcext:value-type="string">
            <text:p>150 Dell Way</text:p>
          </table:table-cell>
          <table:table-cell table:style-name="ce62" office:value-type="string" calcext:value-type="string">
            <text:p>Round Rock</text:p>
          </table:table-cell>
          <table:table-cell table:style-name="ce60" office:value-type="string" calcext:value-type="string">
            <text:p>TX</text:p>
          </table:table-cell>
          <table:table-cell table:style-name="ce60" office:value-type="float" office:value="78664" calcext:value-type="float">
            <text:p>78664</text:p>
          </table:table-cell>
          <table:table-cell table:style-name="ce60" office:value-type="string" calcext:value-type="string">
            <text:p>USA</text:p>
          </table:table-cell>
          <table:table-cell table:style-name="ce60" table:formula="of:=[.G35]&amp;&quot;, &quot; &amp; [.H35]&amp;&quot;,  &quot;&amp;[.I35]&amp;&quot; &quot;&amp;[.J35]&amp;&quot;, &quot;&amp;[.K35]" office:value-type="string" office:string-value="150 Dell Way, Round Rock,  TX 78664, USA" calcext:value-type="string">
            <text:p>150 Dell Way, Round Rock, <text:s/>TX 78664, USA</text:p>
          </table:table-cell>
          <table:table-cell table:number-columns-repeated="1012"/>
        </table:table-row>
        <table:table-row table:style-name="ro9" table:visibility="collapse">
          <table:table-cell table:style-name="ce61" table:content-validation-name="val3" office:value-type="string" calcext:value-type="string">
            <text:p>US-CENTRAL</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US-LBB01</text:p>
          </table:table-cell>
          <table:table-cell table:style-name="ce60" office:value-type="string" calcext:value-type="string">
            <text:p>US-CENTRAL-09A</text:p>
          </table:table-cell>
          <table:table-cell table:style-name="ce60" office:value-type="string" calcext:value-type="string">
            <text:p>Lubbock / West Texas “Helios” campus</text:p>
          </table:table-cell>
          <table:table-cell table:style-name="ce60" office:value-type="string" calcext:value-type="string">
            <text:p>984 Co Rd 112 (Afton, TX)</text:p>
          </table:table-cell>
          <table:table-cell table:style-name="ce62" office:value-type="string" calcext:value-type="string">
            <text:p>Afton</text:p>
          </table:table-cell>
          <table:table-cell table:style-name="ce60" office:value-type="string" calcext:value-type="string">
            <text:p>TX</text:p>
          </table:table-cell>
          <table:table-cell table:style-name="ce60" office:value-type="float" office:value="79220" calcext:value-type="float">
            <text:p>79220</text:p>
          </table:table-cell>
          <table:table-cell table:style-name="ce60" office:value-type="string" calcext:value-type="string">
            <text:p>USA</text:p>
          </table:table-cell>
          <table:table-cell table:style-name="ce60" table:formula="of:=[.G36]&amp;&quot;, &quot; &amp; [.H36]&amp;&quot;,  &quot;&amp;[.I36]&amp;&quot; &quot;&amp;[.J36]&amp;&quot;, &quot;&amp;[.K36]" office:value-type="string" office:string-value="984 Co Rd 112 (Afton, TX), Afton,  TX 79220, USA" calcext:value-type="string">
            <text:p>984 Co Rd 112 (Afton, TX), Afton, <text:s/>TX 79220,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HIO01</text:p>
          </table:table-cell>
          <table:table-cell table:style-name="ce60" office:value-type="string" calcext:value-type="string">
            <text:p>US-WEST-03A</text:p>
          </table:table-cell>
          <table:table-cell table:style-name="ce60" office:value-type="string" calcext:value-type="string">
            <text:p>Hillsboro 1</text:p>
          </table:table-cell>
          <table:table-cell table:style-name="ce60" office:value-type="string" calcext:value-type="string">
            <text:p>4735 NE Starr Blvd</text:p>
          </table:table-cell>
          <table:table-cell table:style-name="ce62" office:value-type="string" calcext:value-type="string">
            <text:p>Hillsboro</text:p>
          </table:table-cell>
          <table:table-cell table:style-name="ce60" office:value-type="string" calcext:value-type="string">
            <text:p>OR</text:p>
          </table:table-cell>
          <table:table-cell table:style-name="ce60" office:value-type="float" office:value="97124" calcext:value-type="float">
            <text:p>97124</text:p>
          </table:table-cell>
          <table:table-cell table:style-name="ce60" office:value-type="string" calcext:value-type="string">
            <text:p>USA</text:p>
          </table:table-cell>
          <table:table-cell table:style-name="ce60" table:formula="of:=[.G37]&amp;&quot;, &quot; &amp; [.H37]&amp;&quot;,  &quot;&amp;[.I37]&amp;&quot; &quot;&amp;[.J37]&amp;&quot;, &quot;&amp;[.K37]" office:value-type="string" office:string-value="4735 NE Starr Blvd, Hillsboro,  OR 97124, USA" calcext:value-type="string">
            <text:p>4735 NE Starr Blvd, Hillsboro, <text:s/>OR 97124,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HIO02</text:p>
          </table:table-cell>
          <table:table-cell table:style-name="ce60" office:value-type="string" calcext:value-type="string">
            <text:p>PDX2</text:p>
          </table:table-cell>
          <table:table-cell table:style-name="ce60" office:value-type="string" calcext:value-type="string">
            <text:p>Hillsboro 2</text:p>
          </table:table-cell>
          <table:table-cell table:style-name="ce60" office:value-type="string" calcext:value-type="string">
            <text:p>4915 NE Starr Blvd</text:p>
          </table:table-cell>
          <table:table-cell table:style-name="ce62" office:value-type="string" calcext:value-type="string">
            <text:p>Hillsboro</text:p>
          </table:table-cell>
          <table:table-cell table:style-name="ce60" office:value-type="string" calcext:value-type="string">
            <text:p>OR</text:p>
          </table:table-cell>
          <table:table-cell table:style-name="ce60" office:value-type="float" office:value="97124" calcext:value-type="float">
            <text:p>97124</text:p>
          </table:table-cell>
          <table:table-cell table:style-name="ce60" office:value-type="string" calcext:value-type="string">
            <text:p>USA</text:p>
          </table:table-cell>
          <table:table-cell table:style-name="ce60" table:formula="of:=[.G38]&amp;&quot;, &quot; &amp; [.H38]&amp;&quot;,  &quot;&amp;[.I38]&amp;&quot; &quot;&amp;[.J38]&amp;&quot;, &quot;&amp;[.K38]" office:value-type="string" office:string-value="4915 NE Starr Blvd, Hillsboro,  OR 97124, USA" calcext:value-type="string">
            <text:p>4915 NE Starr Blvd, Hillsboro, <text:s/>OR 97124,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HIO03</text:p>
          </table:table-cell>
          <table:table-cell table:style-name="ce60" office:value-type="string" calcext:value-type="string">
            <text:p>US-WEST-06A</text:p>
          </table:table-cell>
          <table:table-cell table:style-name="ce60" office:value-type="string" calcext:value-type="string">
            <text:p>Hillsboro 3</text:p>
          </table:table-cell>
          <table:table-cell table:style-name="ce60" office:value-type="string" calcext:value-type="string">
            <text:p>5870 NE Schaaf St</text:p>
          </table:table-cell>
          <table:table-cell table:style-name="ce62" office:value-type="string" calcext:value-type="string">
            <text:p>Hillsboro</text:p>
          </table:table-cell>
          <table:table-cell table:style-name="ce60" office:value-type="string" calcext:value-type="string">
            <text:p>OR</text:p>
          </table:table-cell>
          <table:table-cell table:style-name="ce60" office:value-type="float" office:value="97124" calcext:value-type="float">
            <text:p>97124</text:p>
          </table:table-cell>
          <table:table-cell table:style-name="ce60" office:value-type="string" calcext:value-type="string">
            <text:p>USA</text:p>
          </table:table-cell>
          <table:table-cell table:style-name="ce60" table:formula="of:=[.G39]&amp;&quot;, &quot; &amp; [.H39]&amp;&quot;,  &quot;&amp;[.I39]&amp;&quot; &quot;&amp;[.J39]&amp;&quot;, &quot;&amp;[.K39]" office:value-type="string" office:string-value="5870 NE Schaaf St, Hillsboro,  OR 97124, USA" calcext:value-type="string">
            <text:p>5870 NE Schaaf St, Hillsboro, <text:s/>OR 97124,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LAS01</text:p>
          </table:table-cell>
          <table:table-cell table:style-name="ce60" office:value-type="string" calcext:value-type="string">
            <text:p>LAS1</text:p>
          </table:table-cell>
          <table:table-cell table:style-name="ce60" office:value-type="string" calcext:value-type="string">
            <text:p>Las Vegas NAP7</text:p>
          </table:table-cell>
          <table:table-cell table:style-name="ce60" office:value-type="string" calcext:value-type="string">
            <text:p>7135 S Decatur Blvd</text:p>
          </table:table-cell>
          <table:table-cell table:style-name="ce62" office:value-type="string" calcext:value-type="string">
            <text:p>Las Vegas</text:p>
          </table:table-cell>
          <table:table-cell table:style-name="ce60" office:value-type="string" calcext:value-type="string">
            <text:p>NV</text:p>
          </table:table-cell>
          <table:table-cell table:style-name="ce60" office:value-type="float" office:value="89118" calcext:value-type="float">
            <text:p>89118</text:p>
          </table:table-cell>
          <table:table-cell table:style-name="ce60" office:value-type="string" calcext:value-type="string">
            <text:p>USA</text:p>
          </table:table-cell>
          <table:table-cell table:style-name="ce60" table:formula="of:=[.G40]&amp;&quot;, &quot; &amp; [.H40]&amp;&quot;,  &quot;&amp;[.I40]&amp;&quot; &quot;&amp;[.J40]&amp;&quot;, &quot;&amp;[.K40]" office:value-type="string" office:string-value="7135 S Decatur Blvd, Las Vegas,  NV 89118, USA" calcext:value-type="string">
            <text:p>7135 S Decatur Blvd, Las Vegas, <text:s/>NV 89118,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LAS02</text:p>
          </table:table-cell>
          <table:table-cell table:style-name="ce60" office:value-type="string" calcext:value-type="string">
            <text:p>US-WEST-01A</text:p>
          </table:table-cell>
          <table:table-cell table:style-name="ce60" office:value-type="string" calcext:value-type="string">
            <text:p>Las Vegas NAP12</text:p>
          </table:table-cell>
          <table:table-cell table:style-name="ce60" office:value-type="string" calcext:value-type="string">
            <text:p>5325 W Capovilla Ave</text:p>
          </table:table-cell>
          <table:table-cell table:style-name="ce62" office:value-type="string" calcext:value-type="string">
            <text:p>Las Vegas</text:p>
          </table:table-cell>
          <table:table-cell table:style-name="ce60" office:value-type="string" calcext:value-type="string">
            <text:p>NV</text:p>
          </table:table-cell>
          <table:table-cell table:style-name="ce60" office:value-type="float" office:value="89118" calcext:value-type="float">
            <text:p>89118</text:p>
          </table:table-cell>
          <table:table-cell table:style-name="ce60" office:value-type="string" calcext:value-type="string">
            <text:p>USA</text:p>
          </table:table-cell>
          <table:table-cell table:style-name="ce60" table:formula="of:=[.G41]&amp;&quot;, &quot; &amp; [.H41]&amp;&quot;,  &quot;&amp;[.I41]&amp;&quot; &quot;&amp;[.J41]&amp;&quot;, &quot;&amp;[.K41]" office:value-type="string" office:string-value="5325 W Capovilla Ave, Las Vegas,  NV 89118, USA" calcext:value-type="string">
            <text:p>5325 W Capovilla Ave, Las Vegas, <text:s/>NV 89118,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Under construction</text:p>
          </table:table-cell>
          <table:table-cell table:style-name="ce60" office:value-type="string" calcext:value-type="string">
            <text:p>US-LAS03</text:p>
          </table:table-cell>
          <table:table-cell table:style-name="ce60" office:value-type="string" calcext:value-type="string">
            <text:p>LAS1</text:p>
          </table:table-cell>
          <table:table-cell table:style-name="ce60" office:value-type="string" calcext:value-type="string">
            <text:p>Las Vegas NAP15</text:p>
          </table:table-cell>
          <table:table-cell table:style-name="ce60" office:value-type="string" calcext:value-type="string">
            <text:p>5660 W Badura Ave</text:p>
          </table:table-cell>
          <table:table-cell table:style-name="ce62" office:value-type="string" calcext:value-type="string">
            <text:p>Las Vegas</text:p>
          </table:table-cell>
          <table:table-cell table:style-name="ce60" office:value-type="string" calcext:value-type="string">
            <text:p>NV</text:p>
          </table:table-cell>
          <table:table-cell table:style-name="ce60" office:value-type="float" office:value="89118" calcext:value-type="float">
            <text:p>89118</text:p>
          </table:table-cell>
          <table:table-cell table:style-name="ce60" office:value-type="string" calcext:value-type="string">
            <text:p>USA</text:p>
          </table:table-cell>
          <table:table-cell table:style-name="ce60" table:formula="of:=[.G42]&amp;&quot;, &quot; &amp; [.H42]&amp;&quot;,  &quot;&amp;[.I42]&amp;&quot; &quot;&amp;[.J42]&amp;&quot;, &quot;&amp;[.K42]" office:value-type="string" office:string-value="5660 W Badura Ave, Las Vegas,  NV 89118, USA" calcext:value-type="string">
            <text:p>5660 W Badura Ave, Las Vegas, <text:s/>NV 89118,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LYF01</text:p>
          </table:table-cell>
          <table:table-cell table:style-name="ce60" office:value-type="string" calcext:value-type="string">
            <text:p>US-WEST-05</text:p>
          </table:table-cell>
          <table:table-cell table:style-name="ce60" office:value-type="string" calcext:value-type="string">
            <text:p>Lynnwood</text:p>
          </table:table-cell>
          <table:table-cell table:style-name="ce60" office:value-type="string" calcext:value-type="string">
            <text:p>4200 194th St SW</text:p>
          </table:table-cell>
          <table:table-cell table:style-name="ce62" office:value-type="string" calcext:value-type="string">
            <text:p>Lynnwood</text:p>
          </table:table-cell>
          <table:table-cell table:style-name="ce60" office:value-type="string" calcext:value-type="string">
            <text:p>WA</text:p>
          </table:table-cell>
          <table:table-cell table:style-name="ce60" office:value-type="float" office:value="98036" calcext:value-type="float">
            <text:p>98036</text:p>
          </table:table-cell>
          <table:table-cell table:style-name="ce60" office:value-type="string" calcext:value-type="string">
            <text:p>USA</text:p>
          </table:table-cell>
          <table:table-cell table:style-name="ce60" table:formula="of:=[.G43]&amp;&quot;, &quot; &amp; [.H43]&amp;&quot;,  &quot;&amp;[.I43]&amp;&quot; &quot;&amp;[.J43]&amp;&quot;, &quot;&amp;[.K43]" office:value-type="string" office:string-value="4200 194th St SW, Lynnwood,  WA 98036, USA" calcext:value-type="string">
            <text:p>4200 194th St SW, Lynnwood, <text:s/>WA 98036,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MSC01</text:p>
          </table:table-cell>
          <table:table-cell table:style-name="ce60" office:value-type="string" calcext:value-type="string">
            <text:p>US-WEST-04A</text:p>
          </table:table-cell>
          <table:table-cell table:style-name="ce60" office:value-type="string" calcext:value-type="string">
            <text:p>Mesa</text:p>
          </table:table-cell>
          <table:table-cell table:style-name="ce60" office:value-type="string" calcext:value-type="string">
            <text:p>1301 W University Dr</text:p>
          </table:table-cell>
          <table:table-cell table:style-name="ce62" office:value-type="string" calcext:value-type="string">
            <text:p>Mesa</text:p>
          </table:table-cell>
          <table:table-cell table:style-name="ce60" office:value-type="string" calcext:value-type="string">
            <text:p>AZ</text:p>
          </table:table-cell>
          <table:table-cell table:style-name="ce60" office:value-type="float" office:value="85201" calcext:value-type="float">
            <text:p>85201</text:p>
          </table:table-cell>
          <table:table-cell table:style-name="ce60" office:value-type="string" calcext:value-type="string">
            <text:p>USA</text:p>
          </table:table-cell>
          <table:table-cell table:style-name="ce60" table:formula="of:=[.G44]&amp;&quot;, &quot; &amp; [.H44]&amp;&quot;,  &quot;&amp;[.I44]&amp;&quot; &quot;&amp;[.J44]&amp;&quot;, &quot;&amp;[.K44]" office:value-type="string" office:string-value="1301 W University Dr, Mesa,  AZ 85201, USA" calcext:value-type="string">
            <text:p>1301 W University Dr, Mesa, <text:s/>AZ 85201,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NKQ01</text:p>
          </table:table-cell>
          <table:table-cell table:style-name="ce60" office:value-type="string" calcext:value-type="string">
            <text:p>US-WEST-08A</text:p>
          </table:table-cell>
          <table:table-cell table:style-name="ce60" office:value-type="string" calcext:value-type="string">
            <text:p>Newark (Bay Area)</text:p>
          </table:table-cell>
          <table:table-cell table:style-name="ce60" office:value-type="string" calcext:value-type="string">
            <text:p>39800 Eureka Dr</text:p>
          </table:table-cell>
          <table:table-cell table:style-name="ce62" office:value-type="string" calcext:value-type="string">
            <text:p>Newark</text:p>
          </table:table-cell>
          <table:table-cell table:style-name="ce60" office:value-type="string" calcext:value-type="string">
            <text:p>CA</text:p>
          </table:table-cell>
          <table:table-cell table:style-name="ce60" office:value-type="float" office:value="94560" calcext:value-type="float">
            <text:p>94560</text:p>
          </table:table-cell>
          <table:table-cell table:style-name="ce60" office:value-type="string" calcext:value-type="string">
            <text:p>USA</text:p>
          </table:table-cell>
          <table:table-cell table:style-name="ce60" table:formula="of:=[.G45]&amp;&quot;, &quot; &amp; [.H45]&amp;&quot;,  &quot;&amp;[.I45]&amp;&quot; &quot;&amp;[.J45]&amp;&quot;, &quot;&amp;[.K45]" office:value-type="string" office:string-value="39800 Eureka Dr, Newark,  CA 94560, USA" calcext:value-type="string">
            <text:p>39800 Eureka Dr, Newark, <text:s/>CA 94560,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PHX01</text:p>
          </table:table-cell>
          <table:table-cell table:style-name="ce60" office:value-type="string" calcext:value-type="string">
            <text:p>US-WEST-02A</text:p>
          </table:table-cell>
          <table:table-cell table:style-name="ce60" office:value-type="string" calcext:value-type="string">
            <text:p>Phoenix (Aligned)</text:p>
          </table:table-cell>
          <table:table-cell table:style-name="ce60" office:value-type="string" calcext:value-type="string">
            <text:p>2500 W Union Hills Dr</text:p>
          </table:table-cell>
          <table:table-cell table:style-name="ce62" office:value-type="string" calcext:value-type="string">
            <text:p>Phoenix</text:p>
          </table:table-cell>
          <table:table-cell table:style-name="ce60" office:value-type="string" calcext:value-type="string">
            <text:p>AZ</text:p>
          </table:table-cell>
          <table:table-cell table:style-name="ce60" office:value-type="float" office:value="85027" calcext:value-type="float">
            <text:p>85027</text:p>
          </table:table-cell>
          <table:table-cell table:style-name="ce60" office:value-type="string" calcext:value-type="string">
            <text:p>USA</text:p>
          </table:table-cell>
          <table:table-cell table:style-name="ce60" table:formula="of:=[.G46]&amp;&quot;, &quot; &amp; [.H46]&amp;&quot;,  &quot;&amp;[.I46]&amp;&quot; &quot;&amp;[.J46]&amp;&quot;, &quot;&amp;[.K46]" office:value-type="string" office:string-value="2500 W Union Hills Dr, Phoenix,  AZ 85027, USA" calcext:value-type="string">
            <text:p>2500 W Union Hills Dr, Phoenix, <text:s/>AZ 85027,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QNC01</text:p>
          </table:table-cell>
          <table:table-cell table:style-name="ce60" office:value-type="string" calcext:value-type="string">
            <text:p>US-WEST-09A</text:p>
          </table:table-cell>
          <table:table-cell table:style-name="ce60" office:value-type="string" calcext:value-type="string">
            <text:p>Quincy (WA)</text:p>
          </table:table-cell>
          <table:table-cell table:style-name="ce60" office:value-type="string" calcext:value-type="string">
            <text:p>1711 M St NE</text:p>
          </table:table-cell>
          <table:table-cell table:style-name="ce62" office:value-type="string" calcext:value-type="string">
            <text:p>Quincy</text:p>
          </table:table-cell>
          <table:table-cell table:style-name="ce60" office:value-type="string" calcext:value-type="string">
            <text:p>WA</text:p>
          </table:table-cell>
          <table:table-cell table:style-name="ce60" office:value-type="float" office:value="98848" calcext:value-type="float">
            <text:p>98848</text:p>
          </table:table-cell>
          <table:table-cell table:style-name="ce60" office:value-type="string" calcext:value-type="string">
            <text:p>USA</text:p>
          </table:table-cell>
          <table:table-cell table:style-name="ce60" table:formula="of:=[.G47]&amp;&quot;, &quot; &amp; [.H47]&amp;&quot;,  &quot;&amp;[.I47]&amp;&quot; &quot;&amp;[.J47]&amp;&quot;, &quot;&amp;[.K47]" office:value-type="string" office:string-value="1711 M St NE, Quincy,  WA 98848, USA" calcext:value-type="string">
            <text:p>1711 M St NE, Quincy, <text:s/>WA 98848,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SPK02</text:p>
          </table:table-cell>
          <table:table-cell table:style-name="ce60"/>
          <table:table-cell table:style-name="ce60" office:value-type="string" calcext:value-type="string">
            <text:p>Reno / Sparks 2 Superloop</text:p>
          </table:table-cell>
          <table:table-cell table:style-name="ce60" office:value-type="string" calcext:value-type="string">
            <text:p>2 Superloop Cir</text:p>
          </table:table-cell>
          <table:table-cell table:style-name="ce62" office:value-type="string" calcext:value-type="string">
            <text:p>Sparks</text:p>
          </table:table-cell>
          <table:table-cell table:style-name="ce60" office:value-type="string" calcext:value-type="string">
            <text:p>NV</text:p>
          </table:table-cell>
          <table:table-cell table:style-name="ce60" office:value-type="float" office:value="89437" calcext:value-type="float">
            <text:p>89437</text:p>
          </table:table-cell>
          <table:table-cell table:style-name="ce60" office:value-type="string" calcext:value-type="string">
            <text:p>USA</text:p>
          </table:table-cell>
          <table:table-cell table:style-name="ce60" table:formula="of:=[.G48]&amp;&quot;, &quot; &amp; [.H48]&amp;&quot;,  &quot;&amp;[.I48]&amp;&quot; &quot;&amp;[.J48]&amp;&quot;, &quot;&amp;[.K48]" office:value-type="string" office:string-value="2 Superloop Cir, Sparks,  NV 89437, USA" calcext:value-type="string">
            <text:p>2 Superloop Cir, Sparks, <text:s/>NV 89437,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US-NNN01</text:p>
          </table:table-cell>
          <table:table-cell table:style-name="ce60" office:value-type="string" calcext:value-type="string">
            <text:p>US-WEST-07A</text:p>
          </table:table-cell>
          <table:table-cell table:style-name="ce60" office:value-type="string" calcext:value-type="string">
            <text:p>Centennial (Denver metro)</text:p>
          </table:table-cell>
          <table:table-cell table:style-name="ce60" office:value-type="string" calcext:value-type="string">
            <text:p>6961 S Quentin St</text:p>
          </table:table-cell>
          <table:table-cell table:style-name="ce62" office:value-type="string" calcext:value-type="string">
            <text:p>Centennial</text:p>
          </table:table-cell>
          <table:table-cell table:style-name="ce60" office:value-type="string" calcext:value-type="string">
            <text:p>CO</text:p>
          </table:table-cell>
          <table:table-cell table:style-name="ce60" office:value-type="float" office:value="80112" calcext:value-type="float">
            <text:p>80112</text:p>
          </table:table-cell>
          <table:table-cell table:style-name="ce60" office:value-type="string" calcext:value-type="string">
            <text:p>USA</text:p>
          </table:table-cell>
          <table:table-cell table:style-name="ce60" table:formula="of:=[.G49]&amp;&quot;, &quot; &amp; [.H49]&amp;&quot;,  &quot;&amp;[.I49]&amp;&quot; &quot;&amp;[.J49]&amp;&quot;, &quot;&amp;[.K49]" office:value-type="string" office:string-value="6961 S Quentin St, Centennial,  CO 80112, USA" calcext:value-type="string">
            <text:p>6961 S Quentin St, Centennial, <text:s/>CO 80112, USA</text:p>
          </table:table-cell>
          <table:table-cell table:number-columns-repeated="1012"/>
        </table:table-row>
        <table:table-row table:style-name="ro9">
          <table:table-cell table:style-name="ce61" table:content-validation-name="val3" office:value-type="string" calcext:value-type="string">
            <text:p>CA-EA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CA-GAL01</text:p>
          </table:table-cell>
          <table:table-cell table:style-name="ce60" office:value-type="string" calcext:value-type="string">
            <text:p>CA-EAST-01A</text:p>
          </table:table-cell>
          <table:table-cell table:style-name="ce60" office:value-type="string" calcext:value-type="string">
            <text:p>Cambridge (Ontario)</text:p>
          </table:table-cell>
          <table:table-cell table:style-name="ce60" office:value-type="string" calcext:value-type="string">
            <text:p>17 Vondrau Dr</text:p>
          </table:table-cell>
          <table:table-cell table:style-name="ce62" office:value-type="string" calcext:value-type="string">
            <text:p>Cambridge</text:p>
          </table:table-cell>
          <table:table-cell table:style-name="ce60" office:value-type="string" calcext:value-type="string">
            <text:p>ON</text:p>
          </table:table-cell>
          <table:table-cell table:style-name="ce60" office:value-type="string" calcext:value-type="string">
            <text:p>N3E 1A6</text:p>
          </table:table-cell>
          <table:table-cell table:style-name="ce60" office:value-type="string" calcext:value-type="string">
            <text:p>Canada</text:p>
          </table:table-cell>
          <table:table-cell table:style-name="ce60" table:formula="of:=[.G50]&amp;&quot;, &quot; &amp; [.H50]&amp;&quot;,  &quot;&amp;[.I50]&amp;&quot; &quot;&amp;[.J50]&amp;&quot;, &quot;&amp;[.K50]" office:value-type="string" office:string-value="17 Vondrau Dr, Cambridge,  ON N3E 1A6, Canada" calcext:value-type="string">
            <text:p>17 Vondrau Dr, Cambridge, <text:s/>ON N3E 1A6, Canada</text:p>
          </table:table-cell>
          <table:table-cell table:number-columns-repeated="1012"/>
        </table:table-row>
        <table:table-row table:style-name="ro9">
          <table:table-cell table:style-name="ce61" table:content-validation-name="val3" office:value-type="string" calcext:value-type="string">
            <text:p>EU-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GB-CWY01</text:p>
          </table:table-cell>
          <table:table-cell table:style-name="ce60" office:value-type="string" calcext:value-type="string">
            <text:p>EU-WEST-01A</text:p>
          </table:table-cell>
          <table:table-cell table:style-name="ce60" office:value-type="string" calcext:value-type="string">
            <text:p>Crawley (LGW16)</text:p>
          </table:table-cell>
          <table:table-cell table:style-name="ce60" office:value-type="string" calcext:value-type="string">
            <text:p>Unit 2, Connect Way, Manor Royal</text:p>
          </table:table-cell>
          <table:table-cell table:style-name="ce62" office:value-type="string" calcext:value-type="string">
            <text:p>Crawley</text:p>
          </table:table-cell>
          <table:table-cell table:style-name="ce60" office:value-type="string" calcext:value-type="string">
            <text:p>West Sussex</text:p>
          </table:table-cell>
          <table:table-cell table:style-name="ce60" office:value-type="string" calcext:value-type="string">
            <text:p>RH10 9BD</text:p>
          </table:table-cell>
          <table:table-cell table:style-name="ce60" office:value-type="string" calcext:value-type="string">
            <text:p>United Kingdom</text:p>
          </table:table-cell>
          <table:table-cell table:style-name="ce60" table:formula="of:=[.G51]&amp;&quot;, &quot; &amp; [.H51]&amp;&quot;,  &quot;&amp;[.I51]&amp;&quot; &quot;&amp;[.J51]&amp;&quot;, &quot;&amp;[.K51]" office:value-type="string" office:string-value="Unit 2, Connect Way, Manor Royal, Crawley,  West Sussex RH10 9BD, United Kingdom" calcext:value-type="string">
            <text:p>Unit 2, Connect Way, Manor Royal, Crawley, <text:s/>West Sussex RH10 9BD, United Kingdom</text:p>
          </table:table-cell>
          <table:table-cell table:number-columns-repeated="1012"/>
        </table:table-row>
        <table:table-row table:style-name="ro9">
          <table:table-cell table:style-name="ce61" table:content-validation-name="val3" office:value-type="string" calcext:value-type="string">
            <text:p>EU-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GB-PPL01</text:p>
          </table:table-cell>
          <table:table-cell table:style-name="ce60" office:value-type="string" calcext:value-type="string">
            <text:p>EU-WEST-02A</text:p>
          </table:table-cell>
          <table:table-cell table:style-name="ce60" office:value-type="string" calcext:value-type="string">
            <text:p>Docklands (London)</text:p>
          </table:table-cell>
          <table:table-cell table:style-name="ce60" office:value-type="string" calcext:value-type="string">
            <text:p>Global Switch London East, 3 Nutmeg Ln</text:p>
          </table:table-cell>
          <table:table-cell table:style-name="ce62" office:value-type="string" calcext:value-type="string">
            <text:p>London</text:p>
          </table:table-cell>
          <table:table-cell table:style-name="ce60" office:value-type="string" calcext:value-type="string">
            <text:p>England</text:p>
          </table:table-cell>
          <table:table-cell table:style-name="ce60" office:value-type="string" calcext:value-type="string">
            <text:p>E14 2AX</text:p>
          </table:table-cell>
          <table:table-cell table:style-name="ce60" office:value-type="string" calcext:value-type="string">
            <text:p>United Kingdom</text:p>
          </table:table-cell>
          <table:table-cell table:style-name="ce60" table:formula="of:=[.G52]&amp;&quot;, &quot; &amp; [.H52]&amp;&quot;,  &quot;&amp;[.I52]&amp;&quot; &quot;&amp;[.J52]&amp;&quot;, &quot;&amp;[.K52]" office:value-type="string" office:string-value="Global Switch London East, 3 Nutmeg Ln, London,  England E14 2AX, United Kingdom" calcext:value-type="string">
            <text:p>Global Switch London East, 3 Nutmeg Ln, London, <text:s/>England E14 2AX, United Kingdom</text:p>
          </table:table-cell>
          <table:table-cell table:number-columns-repeated="1012"/>
        </table:table-row>
        <table:table-row table:style-name="ro9" table:visibility="collapse">
          <table:table-cell table:style-name="ce61" table:content-validation-name="val3" office:value-type="string" calcext:value-type="string">
            <text:p>EU-WEST</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GB-EIR01</text:p>
          </table:table-cell>
          <table:table-cell table:style-name="ce60"/>
          <table:table-cell table:style-name="ce60" office:value-type="string" calcext:value-type="string">
            <text:p>Chapelhall / Airdrie DC</text:p>
          </table:table-cell>
          <table:table-cell table:style-name="ce60" office:value-type="string" calcext:value-type="string">
            <text:p>Chapelhall – DataVita campus (exact street TBD)</text:p>
          </table:table-cell>
          <table:table-cell table:style-name="ce62" office:value-type="string" calcext:value-type="string">
            <text:p>Chapelhall (Airdrie)</text:p>
          </table:table-cell>
          <table:table-cell table:style-name="ce60" office:value-type="string" calcext:value-type="string">
            <text:p>Scotland</text:p>
          </table:table-cell>
          <table:table-cell table:style-name="ce60"/>
          <table:table-cell table:style-name="ce60" office:value-type="string" calcext:value-type="string">
            <text:p>United Kingdom</text:p>
          </table:table-cell>
          <table:table-cell table:style-name="ce60" table:formula="of:=[.G53]&amp;&quot;, &quot; &amp; [.H53]&amp;&quot;,  &quot;&amp;[.I53]&amp;&quot; &quot;&amp;[.J53]&amp;&quot;, &quot;&amp;[.K53]" office:value-type="string" office:string-value="Chapelhall – DataVita campus (exact street TBD), Chapelhall (Airdrie),  Scotland , United Kingdom" calcext:value-type="string">
            <text:p>Chapelhall – DataVita campus (exact street TBD), Chapelhall (Airdrie), <text:s/>Scotland , United Kingdom</text:p>
          </table:table-cell>
          <table:table-cell table:number-columns-repeated="1012"/>
        </table:table-row>
        <table:table-row table:style-name="ro9">
          <table:table-cell table:style-name="ce61" table:content-validation-name="val3" office:value-type="string" calcext:value-type="string">
            <text:p>EU-SOU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ES-BCN01</text:p>
          </table:table-cell>
          <table:table-cell table:style-name="ce60" office:value-type="string" calcext:value-type="string">
            <text:p>EU-SOUTH-01A</text:p>
          </table:table-cell>
          <table:table-cell table:style-name="ce60" office:value-type="string" calcext:value-type="string">
            <text:p>Barcelona 1 (Viladecans)</text:p>
          </table:table-cell>
          <table:table-cell table:style-name="ce60" office:value-type="string" calcext:value-type="string">
            <text:p>Carretera de la Santa Creu de Calafell, 99</text:p>
          </table:table-cell>
          <table:table-cell table:style-name="ce62" office:value-type="string" calcext:value-type="string">
            <text:p>Viladecans (Barcelona)</text:p>
          </table:table-cell>
          <table:table-cell table:style-name="ce60" office:value-type="string" calcext:value-type="string">
            <text:p>Catalunya</text:p>
          </table:table-cell>
          <table:table-cell table:style-name="ce60" office:value-type="float" office:value="8830" calcext:value-type="float">
            <text:p>8830</text:p>
          </table:table-cell>
          <table:table-cell table:style-name="ce60" office:value-type="string" calcext:value-type="string">
            <text:p>Spain</text:p>
          </table:table-cell>
          <table:table-cell table:style-name="ce60" table:formula="of:=[.G54]&amp;&quot;, &quot; &amp; [.H54]&amp;&quot;,  &quot;&amp;[.I54]&amp;&quot; &quot;&amp;[.J54]&amp;&quot;, &quot;&amp;[.K54]" office:value-type="string" office:string-value="Carretera de la Santa Creu de Calafell, 99, Viladecans (Barcelona),  Catalunya 8830, Spain" calcext:value-type="string">
            <text:p>Carretera de la Santa Creu de Calafell, 99, Viladecans (Barcelona), <text:s/>Catalunya 8830, Spain</text:p>
          </table:table-cell>
          <table:table-cell table:number-columns-repeated="1012"/>
        </table:table-row>
        <table:table-row table:style-name="ro9">
          <table:table-cell table:style-name="ce61" table:content-validation-name="val3" office:value-type="string" calcext:value-type="string">
            <text:p>EU-SOU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ES-BCN03</text:p>
          </table:table-cell>
          <table:table-cell table:style-name="ce60" office:value-type="string" calcext:value-type="string">
            <text:p>EU-SOUTH-03A</text:p>
          </table:table-cell>
          <table:table-cell table:style-name="ce60" office:value-type="string" calcext:value-type="string">
            <text:p>Barcelona 3 (Zona Franca)</text:p>
          </table:table-cell>
          <table:table-cell table:style-name="ce60" office:value-type="string" calcext:value-type="string">
            <text:p>Carrer 25 nº 6, Parc Logístic de la Zona Franca</text:p>
          </table:table-cell>
          <table:table-cell table:style-name="ce62" office:value-type="string" calcext:value-type="string">
            <text:p>Barcelona</text:p>
          </table:table-cell>
          <table:table-cell table:style-name="ce60" office:value-type="string" calcext:value-type="string">
            <text:p>Catalunya</text:p>
          </table:table-cell>
          <table:table-cell table:style-name="ce60" office:value-type="float" office:value="8040" calcext:value-type="float">
            <text:p>8040</text:p>
          </table:table-cell>
          <table:table-cell table:style-name="ce60" office:value-type="string" calcext:value-type="string">
            <text:p>Spain</text:p>
          </table:table-cell>
          <table:table-cell table:style-name="ce60" table:formula="of:=[.G55]&amp;&quot;, &quot; &amp; [.H55]&amp;&quot;,  &quot;&amp;[.I55]&amp;&quot; &quot;&amp;[.J55]&amp;&quot;, &quot;&amp;[.K55]" office:value-type="string" office:string-value="Carrer 25 nº 6, Parc Logístic de la Zona Franca, Barcelona,  Catalunya 8040, Spain" calcext:value-type="string">
            <text:p>Carrer 25 nº 6, Parc Logístic de la Zona Franca, Barcelona, <text:s/>Catalunya 8040, Spain</text:p>
          </table:table-cell>
          <table:table-cell table:number-columns-repeated="1012"/>
        </table:table-row>
        <table:table-row table:style-name="ro9">
          <table:table-cell table:style-name="ce61" table:content-validation-name="val3" office:value-type="string" calcext:value-type="string">
            <text:p>EU-SOU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ES-AVQ01</text:p>
          </table:table-cell>
          <table:table-cell table:style-name="ce60" office:value-type="string" calcext:value-type="string">
            <text:p>EU-SOUTH-04A</text:p>
          </table:table-cell>
          <table:table-cell table:style-name="ce60" office:value-type="string" calcext:value-type="string">
            <text:p>Alava / Rivabellosa</text:p>
          </table:table-cell>
          <table:table-cell table:style-name="ce60" office:value-type="string" calcext:value-type="string">
            <text:p>Avenida Rivera Baja, S/N</text:p>
          </table:table-cell>
          <table:table-cell table:style-name="ce62" office:value-type="string" calcext:value-type="string">
            <text:p>Rivabellosa</text:p>
          </table:table-cell>
          <table:table-cell table:style-name="ce60" office:value-type="string" calcext:value-type="string">
            <text:p>Álava</text:p>
          </table:table-cell>
          <table:table-cell table:style-name="ce60" office:value-type="float" office:value="1213" calcext:value-type="float">
            <text:p>1213</text:p>
          </table:table-cell>
          <table:table-cell table:style-name="ce60" office:value-type="string" calcext:value-type="string">
            <text:p>Spain</text:p>
          </table:table-cell>
          <table:table-cell table:style-name="ce60" table:formula="of:=[.G56]&amp;&quot;, &quot; &amp; [.H56]&amp;&quot;,  &quot;&amp;[.I56]&amp;&quot; &quot;&amp;[.J56]&amp;&quot;, &quot;&amp;[.K56]" office:value-type="string" office:string-value="Avenida Rivera Baja, S/N, Rivabellosa,  Álava 1213, Spain" calcext:value-type="string">
            <text:p>Avenida Rivera Baja, S/N, Rivabellosa, <text:s/>Álava 1213, Spain</text:p>
          </table:table-cell>
          <table:table-cell table:number-columns-repeated="1012"/>
        </table:table-row>
        <table:table-row table:style-name="ro9">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NO-OVO01</text:p>
          </table:table-cell>
          <table:table-cell table:style-name="ce60" office:value-type="string" calcext:value-type="string">
            <text:p>EU-NORTH-02A</text:p>
          </table:table-cell>
          <table:table-cell table:style-name="ce60" office:value-type="string" calcext:value-type="string">
            <text:p>Øvrebø (Norway)</text:p>
          </table:table-cell>
          <table:table-cell table:style-name="ce60" office:value-type="string" calcext:value-type="string">
            <text:p>Stølevegen 39</text:p>
          </table:table-cell>
          <table:table-cell table:style-name="ce62" office:value-type="string" calcext:value-type="string">
            <text:p>Øvrebø</text:p>
          </table:table-cell>
          <table:table-cell table:style-name="ce60" office:value-type="string" calcext:value-type="string">
            <text:p>Agder</text:p>
          </table:table-cell>
          <table:table-cell table:style-name="ce60" office:value-type="float" office:value="4715" calcext:value-type="float">
            <text:p>4715</text:p>
          </table:table-cell>
          <table:table-cell table:style-name="ce60" office:value-type="string" calcext:value-type="string">
            <text:p>Norway</text:p>
          </table:table-cell>
          <table:table-cell table:style-name="ce60" table:formula="of:=[.G57]&amp;&quot;, &quot; &amp; [.H57]&amp;&quot;,  &quot;&amp;[.I57]&amp;&quot; &quot;&amp;[.J57]&amp;&quot;, &quot;&amp;[.K57]" office:value-type="string" office:string-value="Stølevegen 39, Øvrebø,  Agder 4715, Norway" calcext:value-type="string">
            <text:p>Stølevegen 39, Øvrebø, <text:s/>Agder 4715, Norway</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NO-RKN01</text:p>
          </table:table-cell>
          <table:table-cell table:style-name="ce60" office:value-type="string" calcext:value-type="string">
            <text:p>EU-NORTH-03A</text:p>
          </table:table-cell>
          <table:table-cell table:style-name="ce60" office:value-type="string" calcext:value-type="string">
            <text:p>Rjukan (Green Mountain) DC</text:p>
          </table:table-cell>
          <table:table-cell table:style-name="ce60" office:value-type="string" calcext:value-type="string">
            <text:p>Green Mountain campus (address TBD)</text:p>
          </table:table-cell>
          <table:table-cell table:style-name="ce62" office:value-type="string" calcext:value-type="string">
            <text:p>Rjukan</text:p>
          </table:table-cell>
          <table:table-cell table:style-name="ce60" office:value-type="string" calcext:value-type="string">
            <text:p>Telemark</text:p>
          </table:table-cell>
          <table:table-cell table:style-name="ce60"/>
          <table:table-cell table:style-name="ce60" office:value-type="string" calcext:value-type="string">
            <text:p>Norway</text:p>
          </table:table-cell>
          <table:table-cell table:style-name="ce60" table:formula="of:=[.G58]&amp;&quot;, &quot; &amp; [.H58]&amp;&quot;,  &quot;&amp;[.I58]&amp;&quot; &quot;&amp;[.J58]&amp;&quot;, &quot;&amp;[.K58]" office:value-type="string" office:string-value="Green Mountain campus (address TBD), Rjukan,  Telemark , Norway" calcext:value-type="string">
            <text:p>Green Mountain campus (address TBD), Rjukan, <text:s/>Telemark , Norway</text:p>
          </table:table-cell>
          <table:table-cell table:number-columns-repeated="1012"/>
        </table:table-row>
        <table:table-row table:style-name="ro9">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Operational</text:p>
          </table:table-cell>
          <table:table-cell table:style-name="ce60" office:value-type="string" calcext:value-type="string">
            <text:p>SE-FAN01</text:p>
          </table:table-cell>
          <table:table-cell table:style-name="ce60"/>
          <table:table-cell table:style-name="ce60" office:value-type="string" calcext:value-type="string">
            <text:p>Falun</text:p>
          </table:table-cell>
          <table:table-cell table:style-name="ce60" office:value-type="string" calcext:value-type="string">
            <text:p>Slaggvarpsvägen 21</text:p>
          </table:table-cell>
          <table:table-cell table:style-name="ce62" office:value-type="string" calcext:value-type="string">
            <text:p>Falun</text:p>
          </table:table-cell>
          <table:table-cell table:style-name="ce60" office:value-type="string" calcext:value-type="string">
            <text:p>Dalarnas län</text:p>
          </table:table-cell>
          <table:table-cell table:style-name="ce60" office:value-type="float" office:value="79177" calcext:value-type="float">
            <text:p>79177</text:p>
          </table:table-cell>
          <table:table-cell table:style-name="ce60" office:value-type="string" calcext:value-type="string">
            <text:p>Sweden</text:p>
          </table:table-cell>
          <table:table-cell table:style-name="ce60" table:formula="of:=[.G59]&amp;&quot;, &quot; &amp; [.H59]&amp;&quot;,  &quot;&amp;[.I59]&amp;&quot; &quot;&amp;[.J59]&amp;&quot;, &quot;&amp;[.K59]" office:value-type="string" office:string-value="Slaggvarpsvägen 21, Falun,  Dalarnas län 79177, Sweden" calcext:value-type="string">
            <text:p>Slaggvarpsvägen 21, Falun, <text:s/>Dalarnas län 79177, Sweden</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SE-STO01</text:p>
          </table:table-cell>
          <table:table-cell table:style-name="ce60"/>
          <table:table-cell table:style-name="ce60" office:value-type="string" calcext:value-type="string">
            <text:p>Stockholm 4 South</text:p>
          </table:table-cell>
          <table:table-cell table:style-name="ce60" office:value-type="string" calcext:value-type="string">
            <text:p>Stensätravägen 6</text:p>
          </table:table-cell>
          <table:table-cell table:style-name="ce62" office:value-type="string" calcext:value-type="string">
            <text:p>Skärholmen (Stockholm)</text:p>
          </table:table-cell>
          <table:table-cell table:style-name="ce60" office:value-type="string" calcext:value-type="string">
            <text:p>Stockholm</text:p>
          </table:table-cell>
          <table:table-cell table:style-name="ce60" office:value-type="float" office:value="12739" calcext:value-type="float">
            <text:p>12739</text:p>
          </table:table-cell>
          <table:table-cell table:style-name="ce60" office:value-type="string" calcext:value-type="string">
            <text:p>Sweden</text:p>
          </table:table-cell>
          <table:table-cell table:style-name="ce60" table:formula="of:=[.G60]&amp;&quot;, &quot; &amp; [.H60]&amp;&quot;,  &quot;&amp;[.I60]&amp;&quot; &quot;&amp;[.J60]&amp;&quot;, &quot;&amp;[.K60]" office:value-type="string" office:string-value="Stensätravägen 6, Skärholmen (Stockholm),  Stockholm 12739, Sweden" calcext:value-type="string">
            <text:p>Stensätravägen 6, Skärholmen (Stockholm), <text:s/>Stockholm 12739, Sweden</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SE-SKH01</text:p>
          </table:table-cell>
          <table:table-cell table:style-name="ce60"/>
          <table:table-cell table:style-name="ce60" office:value-type="string" calcext:value-type="string">
            <text:p>Stockholm – Future DC 1</text:p>
          </table:table-cell>
          <table:table-cell table:style-name="ce60" office:value-type="string" calcext:value-type="string">
            <text:p>(address TBD)</text:p>
          </table:table-cell>
          <table:table-cell table:style-name="ce62" office:value-type="string" calcext:value-type="string">
            <text:p>Stockholm</text:p>
          </table:table-cell>
          <table:table-cell table:style-name="ce60" office:value-type="string" calcext:value-type="string">
            <text:p>Stockholm</text:p>
          </table:table-cell>
          <table:table-cell table:style-name="ce60"/>
          <table:table-cell table:style-name="ce60" office:value-type="string" calcext:value-type="string">
            <text:p>Sweden</text:p>
          </table:table-cell>
          <table:table-cell table:style-name="ce60" table:formula="of:=[.G61]&amp;&quot;, &quot; &amp; [.H61]&amp;&quot;,  &quot;&amp;[.I61]&amp;&quot; &quot;&amp;[.J61]&amp;&quot;, &quot;&amp;[.K61]" office:value-type="string" office:string-value="(address TBD), Stockholm,  Stockholm , Sweden" calcext:value-type="string">
            <text:p>(address TBD), Stockholm, <text:s/>Stockholm , Sweden</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SE-SKH02</text:p>
          </table:table-cell>
          <table:table-cell table:style-name="ce60"/>
          <table:table-cell table:style-name="ce60" office:value-type="string" calcext:value-type="string">
            <text:p>Stockholm – Future DC 2</text:p>
          </table:table-cell>
          <table:table-cell table:style-name="ce60" office:value-type="string" calcext:value-type="string">
            <text:p>(address TBD)</text:p>
          </table:table-cell>
          <table:table-cell table:style-name="ce62" office:value-type="string" calcext:value-type="string">
            <text:p>Stockholm</text:p>
          </table:table-cell>
          <table:table-cell table:style-name="ce60" office:value-type="string" calcext:value-type="string">
            <text:p>Stockholm</text:p>
          </table:table-cell>
          <table:table-cell table:style-name="ce60"/>
          <table:table-cell table:style-name="ce60" office:value-type="string" calcext:value-type="string">
            <text:p>Sweden</text:p>
          </table:table-cell>
          <table:table-cell table:style-name="ce60" table:formula="of:=[.G62]&amp;&quot;, &quot; &amp; [.H62]&amp;&quot;,  &quot;&amp;[.I62]&amp;&quot; &quot;&amp;[.J62]&amp;&quot;, &quot;&amp;[.K62]" office:value-type="string" office:string-value="(address TBD), Stockholm,  Stockholm , Sweden" calcext:value-type="string">
            <text:p>(address TBD), Stockholm, <text:s/>Stockholm , Sweden</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office:value-type="string" calcext:value-type="string">
            <text:p>DK-SVL01</text:p>
          </table:table-cell>
          <table:table-cell table:style-name="ce60" office:value-type="string" calcext:value-type="string">
            <text:p>EU-NORTH-05A</text:p>
          </table:table-cell>
          <table:table-cell table:style-name="ce60" office:value-type="string" calcext:value-type="string">
            <text:p>Skovlunde DC</text:p>
          </table:table-cell>
          <table:table-cell table:style-name="ce60" office:value-type="string" calcext:value-type="string">
            <text:p>Tonsbakken 12</text:p>
          </table:table-cell>
          <table:table-cell table:style-name="ce62" office:value-type="string" calcext:value-type="string">
            <text:p>Skovlunde</text:p>
          </table:table-cell>
          <table:table-cell table:style-name="ce60" office:value-type="string" calcext:value-type="string">
            <text:p>Copenhagen Region</text:p>
          </table:table-cell>
          <table:table-cell table:style-name="ce60" office:value-type="float" office:value="2740" calcext:value-type="float">
            <text:p>2740</text:p>
          </table:table-cell>
          <table:table-cell table:style-name="ce60" office:value-type="string" calcext:value-type="string">
            <text:p>Denmark</text:p>
          </table:table-cell>
          <table:table-cell table:style-name="ce60" table:formula="of:=[.G63]&amp;&quot;, &quot; &amp; [.H63]&amp;&quot;,  &quot;&amp;[.I63]&amp;&quot; &quot;&amp;[.J63]&amp;&quot;, &quot;&amp;[.K63]" office:value-type="string" office:string-value="Tonsbakken 12, Skovlunde,  Copenhagen Region 2740, Denmark" calcext:value-type="string">
            <text:p>Tonsbakken 12, Skovlunde, <text:s/>Copenhagen Region 2740, Denmark</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Copenhagen DC</text:p>
          </table:table-cell>
          <table:table-cell table:style-name="ce60" office:value-type="string" calcext:value-type="string">
            <text:p>(address TBD)</text:p>
          </table:table-cell>
          <table:table-cell table:style-name="ce62" office:value-type="string" calcext:value-type="string">
            <text:p>Copenhagen</text:p>
          </table:table-cell>
          <table:table-cell table:style-name="ce60" office:value-type="string" calcext:value-type="string">
            <text:p>Capital Region</text:p>
          </table:table-cell>
          <table:table-cell table:style-name="ce60"/>
          <table:table-cell table:style-name="ce60" office:value-type="string" calcext:value-type="string">
            <text:p>Denmark</text:p>
          </table:table-cell>
          <table:table-cell table:style-name="ce60" table:formula="of:=[.G64]&amp;&quot;, &quot; &amp; [.H64]&amp;&quot;,  &quot;&amp;[.I64]&amp;&quot; &quot;&amp;[.J64]&amp;&quot;, &quot;&amp;[.K64]" office:value-type="string" office:string-value="(address TBD), Copenhagen,  Capital Region , Denmark" calcext:value-type="string">
            <text:p>(address TBD), Copenhagen, <text:s/>Capital Region , Denmark</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Porsgrunn (solar DC)</text:p>
          </table:table-cell>
          <table:table-cell table:style-name="ce60" office:value-type="string" calcext:value-type="string">
            <text:p>(address TBD)</text:p>
          </table:table-cell>
          <table:table-cell table:style-name="ce62" office:value-type="string" calcext:value-type="string">
            <text:p>Porsgrunn</text:p>
          </table:table-cell>
          <table:table-cell table:style-name="ce60" office:value-type="string" calcext:value-type="string">
            <text:p>Telemark</text:p>
          </table:table-cell>
          <table:table-cell table:style-name="ce60"/>
          <table:table-cell table:style-name="ce60" office:value-type="string" calcext:value-type="string">
            <text:p>Norway</text:p>
          </table:table-cell>
          <table:table-cell table:style-name="ce60" table:formula="of:=[.G65]&amp;&quot;, &quot; &amp; [.H65]&amp;&quot;,  &quot;&amp;[.I65]&amp;&quot; &quot;&amp;[.J65]&amp;&quot;, &quot;&amp;[.K65]" office:value-type="string" office:string-value="(address TBD), Porsgrunn,  Telemark , Norway" calcext:value-type="string">
            <text:p>(address TBD), Porsgrunn, <text:s/>Telemark , Norway</text:p>
          </table:table-cell>
          <table:table-cell table:number-columns-repeated="1012"/>
        </table:table-row>
        <table:table-row table:style-name="ro9" table:visibility="collapse">
          <table:table-cell table:style-name="ce61" table:content-validation-name="val3" office:value-type="string" calcext:value-type="string">
            <text:p>EU-NORTH</text:p>
          </table:table-cell>
          <table:table-cell table:style-name="ce61" table:content-validation-name="val4" office:value-type="string" calcext:value-type="string">
            <text:p>Data Center</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Kouvola / “Kuvola estonia (atnorth)”</text:p>
          </table:table-cell>
          <table:table-cell table:style-name="ce60" office:value-type="string" calcext:value-type="string">
            <text:p>(address TBD)</text:p>
          </table:table-cell>
          <table:table-cell table:style-name="ce62" office:value-type="string" calcext:value-type="string">
            <text:p>(Nordics)</text:p>
          </table:table-cell>
          <table:table-cell table:style-name="ce60" table:number-columns-repeated="2"/>
          <table:table-cell table:style-name="ce60" office:value-type="string" calcext:value-type="string">
            <text:p>(TBD)</text:p>
          </table:table-cell>
          <table:table-cell table:style-name="ce60" table:formula="of:=[.G66]&amp;&quot;, &quot; &amp; [.H66]&amp;&quot;,  &quot;&amp;[.I66]&amp;&quot; &quot;&amp;[.J66]&amp;&quot;, &quot;&amp;[.K66]" office:value-type="string" office:string-value="(address TBD), (Nordics),   , (TBD)" calcext:value-type="string">
            <text:p>(address TBD), (Nordics), <text:s text:c="2"/>, (TBD)</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Inventory Storage</text:p>
          </table:table-cell>
          <table:table-cell table:style-name="ce61" table:content-validation-name="val5" office:value-type="string" calcext:value-type="string">
            <text:p>Operational</text:p>
          </table:table-cell>
          <table:table-cell table:style-name="ce60" table:number-columns-repeated="2"/>
          <table:table-cell table:style-name="ce60" office:value-type="string" calcext:value-type="string">
            <text:p>Dancker furniture storage</text:p>
          </table:table-cell>
          <table:table-cell table:style-name="ce60" office:value-type="string" calcext:value-type="string">
            <text:p>(vendor warehouse – address not specified)</text:p>
          </table:table-cell>
          <table:table-cell table:style-name="ce62" office:value-type="string" calcext:value-type="string">
            <text:p>(NY/NJ metro)</text:p>
          </table:table-cell>
          <table:table-cell table:style-name="ce60"/>
          <table:table-cell table:style-name="ce60" office:value-type="string" calcext:value-type="string">
            <text:p>USA</text:p>
          </table:table-cell>
          <table:table-cell table:style-name="ce60"/>
          <table:table-cell table:style-name="ce60" table:formula="of:=[.G67]&amp;&quot;, &quot; &amp; [.H67]&amp;&quot;,  &quot;&amp;[.I67]&amp;&quot; &quot;&amp;[.J67]&amp;&quot;, &quot;&amp;[.K67]" office:value-type="string" office:string-value="(vendor warehouse – address not specified), (NY/NJ metro),   USA, " calcext:value-type="string">
            <text:p>(vendor warehouse – address not specified), (NY/NJ metro), <text:s text:c="2"/>USA, </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office:value-type="string" calcext:value-type="string">
            <text:p>US-ORF</text:p>
          </table:table-cell>
          <table:table-cell table:style-name="ce60"/>
          <table:table-cell table:style-name="ce60" office:value-type="string" calcext:value-type="string">
            <text:p>Virginia Beach 3PL (Chesapeake)</text:p>
          </table:table-cell>
          <table:table-cell table:style-name="ce60" office:value-type="string" calcext:value-type="string">
            <text:p>1400 Cavalier Blvd, Suite J</text:p>
          </table:table-cell>
          <table:table-cell table:style-name="ce62" office:value-type="string" calcext:value-type="string">
            <text:p>Chesapeake</text:p>
          </table:table-cell>
          <table:table-cell table:style-name="ce60" office:value-type="string" calcext:value-type="string">
            <text:p>VA</text:p>
          </table:table-cell>
          <table:table-cell table:style-name="ce60" office:value-type="float" office:value="23323" calcext:value-type="float">
            <text:p>23323</text:p>
          </table:table-cell>
          <table:table-cell table:style-name="ce60" office:value-type="string" calcext:value-type="string">
            <text:p>USA</text:p>
          </table:table-cell>
          <table:table-cell table:style-name="ce60" table:formula="of:=[.G68]&amp;&quot;, &quot; &amp; [.H68]&amp;&quot;,  &quot;&amp;[.I68]&amp;&quot; &quot;&amp;[.J68]&amp;&quot;, &quot;&amp;[.K68]" office:value-type="string" office:string-value="1400 Cavalier Blvd, Suite J, Chesapeake,  VA 23323, USA" calcext:value-type="string">
            <text:p>1400 Cavalier Blvd, Suite J, Chesapeake, <text:s/>VA 23323, USA</text:p>
          </table:table-cell>
          <table:table-cell table:number-columns-repeated="1012"/>
        </table:table-row>
        <table:table-row table:style-name="ro9">
          <table:table-cell table:style-name="ce61" table:content-validation-name="val3" office:value-type="string" calcext:value-type="string">
            <text:p>US-EA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table:number-columns-repeated="2"/>
          <table:table-cell table:style-name="ce60" office:value-type="string" calcext:value-type="string">
            <text:p>Dalton GA – 1PL</text:p>
          </table:table-cell>
          <table:table-cell table:style-name="ce60" office:value-type="string" calcext:value-type="string">
            <text:p>3351 Box Dr</text:p>
          </table:table-cell>
          <table:table-cell table:style-name="ce62" office:value-type="string" calcext:value-type="string">
            <text:p>Dalton</text:p>
          </table:table-cell>
          <table:table-cell table:style-name="ce60" office:value-type="string" calcext:value-type="string">
            <text:p>GA</text:p>
          </table:table-cell>
          <table:table-cell table:style-name="ce60"/>
          <table:table-cell table:style-name="ce60" office:value-type="string" calcext:value-type="string">
            <text:p>USA</text:p>
          </table:table-cell>
          <table:table-cell table:style-name="ce60" table:formula="of:=[.G69]&amp;&quot;, &quot; &amp; [.H69]&amp;&quot;,  &quot;&amp;[.I69]&amp;&quot; &quot;&amp;[.J69]&amp;&quot;, &quot;&amp;[.K69]" office:value-type="string" office:string-value="3351 Box Dr, Dalton,  GA , USA" calcext:value-type="string">
            <text:p>3351 Box Dr, Dalton, <text:s/>GA , USA</text:p>
          </table:table-cell>
          <table:table-cell table:number-columns-repeated="1012"/>
        </table:table-row>
        <table:table-row table:style-name="ro9" table:visibility="collapse">
          <table:table-cell table:style-name="ce61" table:content-validation-name="val3" office:value-type="string" calcext:value-type="string">
            <text:p>US-EA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office:value-type="string" calcext:value-type="string">
            <text:p>US-XXX</text:p>
          </table:table-cell>
          <table:table-cell table:style-name="ce60"/>
          <table:table-cell table:style-name="ce60" office:value-type="string" calcext:value-type="string">
            <text:p>Aberdeen SD / Ellendale ND 1PL</text:p>
          </table:table-cell>
          <table:table-cell table:style-name="ce60" office:value-type="string" calcext:value-type="string">
            <text:p>1401 Brown County 19 N</text:p>
          </table:table-cell>
          <table:table-cell table:style-name="ce62" office:value-type="string" calcext:value-type="string">
            <text:p>Aberdeen</text:p>
          </table:table-cell>
          <table:table-cell table:style-name="ce60" office:value-type="string" calcext:value-type="string">
            <text:p>SD</text:p>
          </table:table-cell>
          <table:table-cell table:style-name="ce60"/>
          <table:table-cell table:style-name="ce60" office:value-type="string" calcext:value-type="string">
            <text:p>USA</text:p>
          </table:table-cell>
          <table:table-cell table:style-name="ce60" table:formula="of:=[.G70]&amp;&quot;, &quot; &amp; [.H70]&amp;&quot;,  &quot;&amp;[.I70]&amp;&quot; &quot;&amp;[.J70]&amp;&quot;, &quot;&amp;[.K70]" office:value-type="string" office:string-value="1401 Brown County 19 N, Aberdeen,  SD , USA" calcext:value-type="string">
            <text:p>1401 Brown County 19 N, Aberdeen, <text:s/>SD , USA</text:p>
          </table:table-cell>
          <table:table-cell table:number-columns-repeated="1012"/>
        </table:table-row>
        <table:table-row table:style-name="ro9" table:visibility="collapse">
          <table:table-cell table:style-name="ce61" table:content-validation-name="val3" office:value-type="string" calcext:value-type="string">
            <text:p>US-EA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Lancaster</text:p>
          </table:table-cell>
          <table:table-cell table:style-name="ce60" office:value-type="string" calcext:value-type="string">
            <text:p>PA 1PL</text:p>
          </table:table-cell>
          <table:table-cell table:style-name="ce60" office:value-type="string" calcext:value-type="string">
            <text:p>Lancaster</text:p>
          </table:table-cell>
          <table:table-cell table:style-name="ce60" office:value-type="string" calcext:value-type="string">
            <text:p>PA</text:p>
          </table:table-cell>
          <table:table-cell table:style-name="ce60" office:value-type="float" office:value="17602" calcext:value-type="float">
            <text:p>17602</text:p>
          </table:table-cell>
          <table:table-cell table:style-name="ce60" office:value-type="string" calcext:value-type="string">
            <text:p>USA</text:p>
          </table:table-cell>
          <table:table-cell table:style-name="ce60" table:formula="of:=[.G71]&amp;&quot;, &quot; &amp; [.H71]&amp;&quot;,  &quot;&amp;[.I71]&amp;&quot; &quot;&amp;[.J71]&amp;&quot;, &quot;&amp;[.K71]" office:value-type="string" office:string-value="PA 1PL, Lancaster,  PA 17602, USA" calcext:value-type="string">
            <text:p>PA 1PL, Lancaster, <text:s/>PA 17602, USA</text:p>
          </table:table-cell>
          <table:table-cell table:number-columns-repeated="1012"/>
        </table:table-row>
        <table:table-row table:style-name="ro9" table:visibility="collapse">
          <table:table-cell table:style-name="ce61" table:content-validation-name="val3" office:value-type="string" calcext:value-type="string">
            <text:p>US-EA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Kenilworth</text:p>
          </table:table-cell>
          <table:table-cell table:style-name="ce60" office:value-type="string" calcext:value-type="string">
            <text:p>NJ 1PL</text:p>
          </table:table-cell>
          <table:table-cell table:style-name="ce60" office:value-type="string" calcext:value-type="string">
            <text:p>Kenilworth</text:p>
          </table:table-cell>
          <table:table-cell table:style-name="ce60" office:value-type="string" calcext:value-type="string">
            <text:p>NJ</text:p>
          </table:table-cell>
          <table:table-cell table:style-name="ce60" office:value-type="float" office:value="7033" calcext:value-type="float">
            <text:p>7033</text:p>
          </table:table-cell>
          <table:table-cell table:style-name="ce60" office:value-type="string" calcext:value-type="string">
            <text:p>USA</text:p>
          </table:table-cell>
          <table:table-cell table:style-name="ce60" table:formula="of:=[.G72]&amp;&quot;, &quot; &amp; [.H72]&amp;&quot;,  &quot;&amp;[.I72]&amp;&quot; &quot;&amp;[.J72]&amp;&quot;, &quot;&amp;[.K72]" office:value-type="string" office:string-value="NJ 1PL, Kenilworth,  NJ 7033, USA" calcext:value-type="string">
            <text:p>NJ 1PL, Kenilworth, <text:s/>NJ 7033,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office:value-type="string" calcext:value-type="string">
            <text:p>US-DNT01</text:p>
          </table:table-cell>
          <table:table-cell table:style-name="ce60"/>
          <table:table-cell table:style-name="ce60" office:value-type="string" calcext:value-type="string">
            <text:p>Denton 1PL Warehouse</text:p>
          </table:table-cell>
          <table:table-cell table:style-name="ce60" office:value-type="string" calcext:value-type="string">
            <text:p>161 N I-35E Frontage Rd, Suite 131</text:p>
          </table:table-cell>
          <table:table-cell table:style-name="ce62" office:value-type="string" calcext:value-type="string">
            <text:p>Denton</text:p>
          </table:table-cell>
          <table:table-cell table:style-name="ce60" office:value-type="string" calcext:value-type="string">
            <text:p>TX</text:p>
          </table:table-cell>
          <table:table-cell table:style-name="ce60" office:value-type="float" office:value="76205" calcext:value-type="float">
            <text:p>76205</text:p>
          </table:table-cell>
          <table:table-cell table:style-name="ce60" office:value-type="string" calcext:value-type="string">
            <text:p>USA</text:p>
          </table:table-cell>
          <table:table-cell table:style-name="ce60" table:formula="of:=[.G73]&amp;&quot;, &quot; &amp; [.H73]&amp;&quot;,  &quot;&amp;[.I73]&amp;&quot; &quot;&amp;[.J73]&amp;&quot;, &quot;&amp;[.K73]" office:value-type="string" office:string-value="161 N I-35E Frontage Rd, Suite 131, Denton,  TX 76205, USA" calcext:value-type="string">
            <text:p>161 N I-35E Frontage Rd, Suite 131, Denton, <text:s/>TX 76205,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office:value-type="string" calcext:value-type="string">
            <text:p>US-LBB01</text:p>
          </table:table-cell>
          <table:table-cell table:style-name="ce60"/>
          <table:table-cell table:style-name="ce60" office:value-type="string" calcext:value-type="string">
            <text:p>Lubbock TX – LBB01 Warehouse</text:p>
          </table:table-cell>
          <table:table-cell table:style-name="ce60" office:value-type="string" calcext:value-type="string">
            <text:p>8111 Patel Dr</text:p>
          </table:table-cell>
          <table:table-cell table:style-name="ce62" office:value-type="string" calcext:value-type="string">
            <text:p>Wolfforth</text:p>
          </table:table-cell>
          <table:table-cell table:style-name="ce60" office:value-type="string" calcext:value-type="string">
            <text:p>TX</text:p>
          </table:table-cell>
          <table:table-cell table:style-name="ce60" office:value-type="float" office:value="79382" calcext:value-type="float">
            <text:p>79382</text:p>
          </table:table-cell>
          <table:table-cell table:style-name="ce60" office:value-type="string" calcext:value-type="string">
            <text:p>USA</text:p>
          </table:table-cell>
          <table:table-cell table:style-name="ce60" table:formula="of:=[.G74]&amp;&quot;, &quot; &amp; [.H74]&amp;&quot;,  &quot;&amp;[.I74]&amp;&quot; &quot;&amp;[.J74]&amp;&quot;, &quot;&amp;[.K74]" office:value-type="string" office:string-value="8111 Patel Dr, Wolfforth,  TX 79382, USA" calcext:value-type="string">
            <text:p>8111 Patel Dr, Wolfforth, <text:s/>TX 79382,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table:number-columns-repeated="2"/>
          <table:table-cell table:style-name="ce60" office:value-type="string" calcext:value-type="string">
            <text:p>Tulsa OK – 1PL</text:p>
          </table:table-cell>
          <table:table-cell table:style-name="ce60" office:value-type="string" calcext:value-type="string">
            <text:p>6240 E 15th St</text:p>
          </table:table-cell>
          <table:table-cell table:style-name="ce62" office:value-type="string" calcext:value-type="string">
            <text:p>Tulsa</text:p>
          </table:table-cell>
          <table:table-cell table:style-name="ce60" office:value-type="string" calcext:value-type="string">
            <text:p>OK</text:p>
          </table:table-cell>
          <table:table-cell table:style-name="ce60" office:value-type="float" office:value="74112" calcext:value-type="float">
            <text:p>74112</text:p>
          </table:table-cell>
          <table:table-cell table:style-name="ce60" office:value-type="string" calcext:value-type="string">
            <text:p>USA</text:p>
          </table:table-cell>
          <table:table-cell table:style-name="ce60" table:formula="of:=[.G75]&amp;&quot;, &quot; &amp; [.H75]&amp;&quot;,  &quot;&amp;[.I75]&amp;&quot; &quot;&amp;[.J75]&amp;&quot;, &quot;&amp;[.K75]" office:value-type="string" office:string-value="6240 E 15th St, Tulsa,  OK 74112, USA" calcext:value-type="string">
            <text:p>6240 E 15th St, Tulsa, <text:s/>OK 74112,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table:number-columns-repeated="2"/>
          <table:table-cell table:style-name="ce60" office:value-type="string" calcext:value-type="string">
            <text:p>Murphy / Marble NC – 1PL</text:p>
          </table:table-cell>
          <table:table-cell table:style-name="ce60" office:value-type="string" calcext:value-type="string">
            <text:p>3694 E US Hwy 64 Alt</text:p>
          </table:table-cell>
          <table:table-cell table:style-name="ce62" office:value-type="string" calcext:value-type="string">
            <text:p>Murphy</text:p>
          </table:table-cell>
          <table:table-cell table:style-name="ce60" office:value-type="string" calcext:value-type="string">
            <text:p>NC</text:p>
          </table:table-cell>
          <table:table-cell table:style-name="ce60" office:value-type="float" office:value="28906" calcext:value-type="float">
            <text:p>28906</text:p>
          </table:table-cell>
          <table:table-cell table:style-name="ce60" office:value-type="string" calcext:value-type="string">
            <text:p>USA</text:p>
          </table:table-cell>
          <table:table-cell table:style-name="ce60" table:formula="of:=[.G76]&amp;&quot;, &quot; &amp; [.H76]&amp;&quot;,  &quot;&amp;[.I76]&amp;&quot; &quot;&amp;[.J76]&amp;&quot;, &quot;&amp;[.K76]" office:value-type="string" office:string-value="3694 E US Hwy 64 Alt, Murphy,  NC 28906, USA" calcext:value-type="string">
            <text:p>3694 E US Hwy 64 Alt, Murphy, <text:s/>NC 28906, USA</text:p>
          </table:table-cell>
          <table:table-cell table:number-columns-repeated="1012"/>
        </table:table-row>
        <table:table-row table:style-name="ro9">
          <table:table-cell table:style-name="ce61" table:content-validation-name="val3" office:value-type="string" calcext:value-type="string">
            <text:p>US-CENTRAL</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table:number-columns-repeated="2"/>
          <table:table-cell table:style-name="ce60" office:value-type="string" calcext:value-type="string">
            <text:p>Bensenville IL – 3PL</text:p>
          </table:table-cell>
          <table:table-cell table:style-name="ce60" office:value-type="string" calcext:value-type="string">
            <text:p>849 Thomas Dr</text:p>
          </table:table-cell>
          <table:table-cell table:style-name="ce62" office:value-type="string" calcext:value-type="string">
            <text:p>Bensenville</text:p>
          </table:table-cell>
          <table:table-cell table:style-name="ce60" office:value-type="string" calcext:value-type="string">
            <text:p>IL</text:p>
          </table:table-cell>
          <table:table-cell table:style-name="ce60" office:value-type="float" office:value="60106" calcext:value-type="float">
            <text:p>60106</text:p>
          </table:table-cell>
          <table:table-cell table:style-name="ce60" office:value-type="string" calcext:value-type="string">
            <text:p>USA</text:p>
          </table:table-cell>
          <table:table-cell table:style-name="ce60" table:formula="of:=[.G77]&amp;&quot;, &quot; &amp; [.H77]&amp;&quot;,  &quot;&amp;[.I77]&amp;&quot; &quot;&amp;[.J77]&amp;&quot;, &quot;&amp;[.K77]" office:value-type="string" office:string-value="849 Thomas Dr, Bensenville,  IL 60106, USA" calcext:value-type="string">
            <text:p>849 Thomas Dr, Bensenville, <text:s/>IL 60106, USA</text:p>
          </table:table-cell>
          <table:table-cell table:number-columns-repeated="1012"/>
        </table:table-row>
        <table:table-row table:style-name="ro9" table:visibility="collapse">
          <table:table-cell table:style-name="ce61" table:content-validation-name="val3" office:value-type="string" calcext:value-type="string">
            <text:p>US-CENTRAL</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office:value-type="string" calcext:value-type="string">
            <text:p>US-XXX</text:p>
          </table:table-cell>
          <table:table-cell table:style-name="ce60"/>
          <table:table-cell table:style-name="ce60" office:value-type="string" calcext:value-type="string">
            <text:p>DFW 3PL hub candidate</text:p>
          </table:table-cell>
          <table:table-cell table:style-name="ce60" office:value-type="string" calcext:value-type="string">
            <text:p>3331 Farm to Market Rd 1173</text:p>
          </table:table-cell>
          <table:table-cell table:style-name="ce62" office:value-type="string" calcext:value-type="string">
            <text:p>Denton area</text:p>
          </table:table-cell>
          <table:table-cell table:style-name="ce60" office:value-type="string" calcext:value-type="string">
            <text:p>TX</text:p>
          </table:table-cell>
          <table:table-cell table:style-name="ce60"/>
          <table:table-cell table:style-name="ce60" office:value-type="string" calcext:value-type="string">
            <text:p>USA</text:p>
          </table:table-cell>
          <table:table-cell table:style-name="ce60" table:formula="of:=[.G78]&amp;&quot;, &quot; &amp; [.H78]&amp;&quot;,  &quot;&amp;[.I78]&amp;&quot; &quot;&amp;[.J78]&amp;&quot;, &quot;&amp;[.K78]" office:value-type="string" office:string-value="3331 Farm to Market Rd 1173, Denton area,  TX , USA" calcext:value-type="string">
            <text:p>3331 Farm to Market Rd 1173, Denton area, <text:s/>TX , USA</text:p>
          </table:table-cell>
          <table:table-cell table:number-columns-repeated="1012"/>
        </table:table-row>
        <table:table-row table:style-name="ro9" table:visibility="collapse">
          <table:table-cell table:style-name="ce61" table:content-validation-name="val3" office:value-type="string" calcext:value-type="string">
            <text:p>US-CENTRAL</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office:value-type="string" calcext:value-type="string">
            <text:p>US-XXX</text:p>
          </table:table-cell>
          <table:table-cell table:style-name="ce60"/>
          <table:table-cell table:style-name="ce60" office:value-type="string" calcext:value-type="string">
            <text:p>Aberdeen SD / Ellendale ND 1PL</text:p>
          </table:table-cell>
          <table:table-cell table:style-name="ce60" office:value-type="string" calcext:value-type="string">
            <text:p>1401 Brown County 19 N</text:p>
          </table:table-cell>
          <table:table-cell table:style-name="ce62" office:value-type="string" calcext:value-type="string">
            <text:p>Aberdeen</text:p>
          </table:table-cell>
          <table:table-cell table:style-name="ce60" office:value-type="string" calcext:value-type="string">
            <text:p>SD</text:p>
          </table:table-cell>
          <table:table-cell table:style-name="ce60"/>
          <table:table-cell table:style-name="ce60" office:value-type="string" calcext:value-type="string">
            <text:p>USA</text:p>
          </table:table-cell>
          <table:table-cell table:style-name="ce60" table:formula="of:=[.G79]&amp;&quot;, &quot; &amp; [.H79]&amp;&quot;,  &quot;&amp;[.I79]&amp;&quot; &quot;&amp;[.J79]&amp;&quot;, &quot;&amp;[.K79]" office:value-type="string" office:string-value="1401 Brown County 19 N, Aberdeen,  SD , USA" calcext:value-type="string">
            <text:p>1401 Brown County 19 N, Aberdeen, <text:s/>SD ,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office:value-type="string" calcext:value-type="string">
            <text:p>US-DFW</text:p>
          </table:table-cell>
          <table:table-cell table:style-name="ce60"/>
          <table:table-cell table:style-name="ce60" office:value-type="string" calcext:value-type="string">
            <text:p>Grapevine TX – 3PL (Hanover Dr)</text:p>
          </table:table-cell>
          <table:table-cell table:style-name="ce60" office:value-type="string" calcext:value-type="string">
            <text:p>701 Hanover Dr, Suite 100</text:p>
          </table:table-cell>
          <table:table-cell table:style-name="ce62" office:value-type="string" calcext:value-type="string">
            <text:p>Grapevine</text:p>
          </table:table-cell>
          <table:table-cell table:style-name="ce60" office:value-type="string" calcext:value-type="string">
            <text:p>TX</text:p>
          </table:table-cell>
          <table:table-cell table:style-name="ce60" office:value-type="float" office:value="76051" calcext:value-type="float">
            <text:p>76051</text:p>
          </table:table-cell>
          <table:table-cell table:style-name="ce60" office:value-type="string" calcext:value-type="string">
            <text:p>USA</text:p>
          </table:table-cell>
          <table:table-cell table:style-name="ce60" table:formula="of:=[.G80]&amp;&quot;, &quot; &amp; [.H80]&amp;&quot;,  &quot;&amp;[.I80]&amp;&quot; &quot;&amp;[.J80]&amp;&quot;, &quot;&amp;[.K80]" office:value-type="string" office:string-value="701 Hanover Dr, Suite 100, Grapevine,  TX 76051, USA" calcext:value-type="string">
            <text:p>701 Hanover Dr, Suite 100, Grapevine, <text:s/>TX 76051,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office:value-type="string" calcext:value-type="string">
            <text:p>US-DFW</text:p>
          </table:table-cell>
          <table:table-cell table:style-name="ce60"/>
          <table:table-cell table:style-name="ce60" office:value-type="string" calcext:value-type="string">
            <text:p>Grapevine TX – 3PL2 (Dallas Rd)</text:p>
          </table:table-cell>
          <table:table-cell table:style-name="ce60" office:value-type="string" calcext:value-type="string">
            <text:p>506 E Dallas Rd, Suite 400</text:p>
          </table:table-cell>
          <table:table-cell table:style-name="ce62" office:value-type="string" calcext:value-type="string">
            <text:p>Grapevine</text:p>
          </table:table-cell>
          <table:table-cell table:style-name="ce60" office:value-type="string" calcext:value-type="string">
            <text:p>TX</text:p>
          </table:table-cell>
          <table:table-cell table:style-name="ce60" office:value-type="float" office:value="76051" calcext:value-type="float">
            <text:p>76051</text:p>
          </table:table-cell>
          <table:table-cell table:style-name="ce60" office:value-type="string" calcext:value-type="string">
            <text:p>USA</text:p>
          </table:table-cell>
          <table:table-cell table:style-name="ce60" table:formula="of:=[.G81]&amp;&quot;, &quot; &amp; [.H81]&amp;&quot;,  &quot;&amp;[.I81]&amp;&quot; &quot;&amp;[.J81]&amp;&quot;, &quot;&amp;[.K81]" office:value-type="string" office:string-value="506 E Dallas Rd, Suite 400, Grapevine,  TX 76051, USA" calcext:value-type="string">
            <text:p>506 E Dallas Rd, Suite 400, Grapevine, <text:s/>TX 76051,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table:number-columns-repeated="2"/>
          <table:table-cell table:style-name="ce60" office:value-type="string" calcext:value-type="string">
            <text:p>Austin</text:p>
          </table:table-cell>
          <table:table-cell table:style-name="ce60" office:value-type="string" calcext:value-type="string">
            <text:p>TX – 3PL</text:p>
          </table:table-cell>
          <table:table-cell table:style-name="ce62" office:value-type="string" calcext:value-type="string">
            <text:p>6405 Moores Crossing Blvd</text:p>
          </table:table-cell>
          <table:table-cell table:style-name="ce60" office:value-type="string" calcext:value-type="string">
            <text:p>Austin</text:p>
          </table:table-cell>
          <table:table-cell table:style-name="ce60" office:value-type="string" calcext:value-type="string">
            <text:p>TX</text:p>
          </table:table-cell>
          <table:table-cell table:style-name="ce60" office:value-type="float" office:value="78617" calcext:value-type="float">
            <text:p>78617</text:p>
          </table:table-cell>
          <table:table-cell table:style-name="ce60" table:formula="of:=[.G82]&amp;&quot;, &quot; &amp; [.H82]&amp;&quot;,  &quot;&amp;[.I82]&amp;&quot; &quot;&amp;[.J82]&amp;&quot;, &quot;&amp;[.K82]" office:value-type="string" office:string-value="TX – 3PL, 6405 Moores Crossing Blvd,  Austin TX, 78617" calcext:value-type="string">
            <text:p>TX – 3PL, 6405 Moores Crossing Blvd, <text:s/>Austin TX, 78617</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office:value-type="string" calcext:value-type="string">
            <text:p>US-AUS</text:p>
          </table:table-cell>
          <table:table-cell table:style-name="ce60"/>
          <table:table-cell table:style-name="ce60" office:value-type="string" calcext:value-type="string">
            <text:p>Schertz TX – 3PL (Building 5)</text:p>
          </table:table-cell>
          <table:table-cell table:style-name="ce60" office:value-type="string" calcext:value-type="string">
            <text:p>17745 Lookout Rd, Building 5, Suite 540</text:p>
          </table:table-cell>
          <table:table-cell table:style-name="ce62" office:value-type="string" calcext:value-type="string">
            <text:p>Schertz</text:p>
          </table:table-cell>
          <table:table-cell table:style-name="ce60" office:value-type="string" calcext:value-type="string">
            <text:p>TX</text:p>
          </table:table-cell>
          <table:table-cell table:style-name="ce60" office:value-type="float" office:value="78155" calcext:value-type="float">
            <text:p>78155</text:p>
          </table:table-cell>
          <table:table-cell table:style-name="ce60" office:value-type="string" calcext:value-type="string">
            <text:p>USA</text:p>
          </table:table-cell>
          <table:table-cell table:style-name="ce60" table:formula="of:=[.G83]&amp;&quot;, &quot; &amp; [.H83]&amp;&quot;,  &quot;&amp;[.I83]&amp;&quot; &quot;&amp;[.J83]&amp;&quot;, &quot;&amp;[.K83]" office:value-type="string" office:string-value="17745 Lookout Rd, Building 5, Suite 540, Schertz,  TX 78155, USA" calcext:value-type="string">
            <text:p>17745 Lookout Rd, Building 5, Suite 540, Schertz, <text:s/>TX 78155, USA</text:p>
          </table:table-cell>
          <table:table-cell table:number-columns-repeated="1012"/>
        </table:table-row>
        <table:table-row table:style-name="ro9">
          <table:table-cell table:style-name="ce61" table:content-validation-name="val3" office:value-type="string" calcext:value-type="string">
            <text:p>US-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Operational</text:p>
          </table:table-cell>
          <table:table-cell table:style-name="ce60" office:value-type="string" calcext:value-type="string">
            <text:p>US-AUS2</text:p>
          </table:table-cell>
          <table:table-cell table:style-name="ce60"/>
          <table:table-cell table:style-name="ce60" office:value-type="string" calcext:value-type="string">
            <text:p>Schertz TX – 3PL (Building 6)</text:p>
          </table:table-cell>
          <table:table-cell table:style-name="ce60" office:value-type="string" calcext:value-type="string">
            <text:p>17745 Lookout Rd, Building 6, Suite 540</text:p>
          </table:table-cell>
          <table:table-cell table:style-name="ce62" office:value-type="string" calcext:value-type="string">
            <text:p>Schertz</text:p>
          </table:table-cell>
          <table:table-cell table:style-name="ce60" office:value-type="string" calcext:value-type="string">
            <text:p>TX</text:p>
          </table:table-cell>
          <table:table-cell table:style-name="ce60" office:value-type="float" office:value="78154" calcext:value-type="float">
            <text:p>78154</text:p>
          </table:table-cell>
          <table:table-cell table:style-name="ce60" office:value-type="string" calcext:value-type="string">
            <text:p>USA</text:p>
          </table:table-cell>
          <table:table-cell table:style-name="ce60" table:formula="of:=[.G84]&amp;&quot;, &quot; &amp; [.H84]&amp;&quot;,  &quot;&amp;[.I84]&amp;&quot; &quot;&amp;[.J84]&amp;&quot;, &quot;&amp;[.K84]" office:value-type="string" office:string-value="17745 Lookout Rd, Building 6, Suite 540, Schertz,  TX 78154, USA" calcext:value-type="string">
            <text:p>17745 Lookout Rd, Building 6, Suite 540, Schertz, <text:s/>TX 78154, USA</text:p>
          </table:table-cell>
          <table:table-cell table:number-columns-repeated="1012"/>
        </table:table-row>
        <table:table-row table:style-name="ro9" table:visibility="collapse">
          <table:table-cell table:style-name="ce61" table:content-validation-name="val3" office:value-type="string" calcext:value-type="string">
            <text:p>EU-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office:value-type="string" calcext:value-type="string">
            <text:p>NL-XXX</text:p>
          </table:table-cell>
          <table:table-cell table:style-name="ce60"/>
          <table:table-cell table:style-name="ce60" office:value-type="string" calcext:value-type="string">
            <text:p>Netherlands 3PL hub – Venlo</text:p>
          </table:table-cell>
          <table:table-cell table:style-name="ce60" office:value-type="string" calcext:value-type="string">
            <text:p>John Hicksstraat 21–23</text:p>
          </table:table-cell>
          <table:table-cell table:style-name="ce62" office:value-type="string" calcext:value-type="string">
            <text:p>Venlo</text:p>
          </table:table-cell>
          <table:table-cell table:style-name="ce60" office:value-type="string" calcext:value-type="string">
            <text:p>Limburg</text:p>
          </table:table-cell>
          <table:table-cell table:style-name="ce60" office:value-type="string" calcext:value-type="string">
            <text:p>5928 SJ</text:p>
          </table:table-cell>
          <table:table-cell table:style-name="ce60" office:value-type="string" calcext:value-type="string">
            <text:p>Netherlands</text:p>
          </table:table-cell>
          <table:table-cell table:style-name="ce60" table:formula="of:=[.G85]&amp;&quot;, &quot; &amp; [.H85]&amp;&quot;,  &quot;&amp;[.I85]&amp;&quot; &quot;&amp;[.J85]&amp;&quot;, &quot;&amp;[.K85]" office:value-type="string" office:string-value="John Hicksstraat 21–23, Venlo,  Limburg 5928 SJ, Netherlands" calcext:value-type="string">
            <text:p>John Hicksstraat 21–23, Venlo, <text:s/>Limburg 5928 SJ, Netherlands</text:p>
          </table:table-cell>
          <table:table-cell table:number-columns-repeated="1012"/>
        </table:table-row>
        <table:table-row table:style-name="ro9" table:visibility="collapse">
          <table:table-cell table:style-name="ce61" table:content-validation-name="val3" office:value-type="string" calcext:value-type="string">
            <text:p>EU-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Amsterdam “low‑cost hub”</text:p>
          </table:table-cell>
          <table:table-cell table:style-name="ce60" office:value-type="string" calcext:value-type="string">
            <text:p>(address TBD)</text:p>
          </table:table-cell>
          <table:table-cell table:style-name="ce62" office:value-type="string" calcext:value-type="string">
            <text:p>Amsterdam region</text:p>
          </table:table-cell>
          <table:table-cell table:style-name="ce60"/>
          <table:table-cell table:style-name="ce60" office:value-type="string" calcext:value-type="string">
            <text:p>Netherlands</text:p>
          </table:table-cell>
          <table:table-cell table:style-name="ce60"/>
          <table:table-cell table:style-name="ce60" table:formula="of:=[.G86]&amp;&quot;, &quot; &amp; [.H86]&amp;&quot;,  &quot;&amp;[.I86]&amp;&quot; &quot;&amp;[.J86]&amp;&quot;, &quot;&amp;[.K86]" office:value-type="string" office:string-value="(address TBD), Amsterdam region,   Netherlands, " calcext:value-type="string">
            <text:p>(address TBD), Amsterdam region, <text:s text:c="2"/>Netherlands, </text:p>
          </table:table-cell>
          <table:table-cell table:number-columns-repeated="1012"/>
        </table:table-row>
        <table:table-row table:style-name="ro9" table:visibility="collapse">
          <table:table-cell table:style-name="ce61" table:content-validation-name="val3" office:value-type="string" calcext:value-type="string">
            <text:p>EU-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Dublin “low‑cost hub”</text:p>
          </table:table-cell>
          <table:table-cell table:style-name="ce60" office:value-type="string" calcext:value-type="string">
            <text:p>(address TBD)</text:p>
          </table:table-cell>
          <table:table-cell table:style-name="ce62" office:value-type="string" calcext:value-type="string">
            <text:p>Dublin</text:p>
          </table:table-cell>
          <table:table-cell table:style-name="ce60" office:value-type="string" calcext:value-type="string">
            <text:p>Leinster</text:p>
          </table:table-cell>
          <table:table-cell table:style-name="ce60"/>
          <table:table-cell table:style-name="ce60" office:value-type="string" calcext:value-type="string">
            <text:p>Ireland</text:p>
          </table:table-cell>
          <table:table-cell table:style-name="ce60" table:formula="of:=[.G87]&amp;&quot;, &quot; &amp; [.H87]&amp;&quot;,  &quot;&amp;[.I87]&amp;&quot; &quot;&amp;[.J87]&amp;&quot;, &quot;&amp;[.K87]" office:value-type="string" office:string-value="(address TBD), Dublin,  Leinster , Ireland" calcext:value-type="string">
            <text:p>(address TBD), Dublin, <text:s/>Leinster , Ireland</text:p>
          </table:table-cell>
          <table:table-cell table:number-columns-repeated="1012"/>
        </table:table-row>
        <table:table-row table:style-name="ro9" table:visibility="collapse">
          <table:table-cell table:style-name="ce61" table:content-validation-name="val3" office:value-type="string" calcext:value-type="string">
            <text:p>EU-WEST</text:p>
          </table:table-cell>
          <table:table-cell table:style-name="ce61" table:content-validation-name="val4" office:value-type="string" calcext:value-type="string">
            <text:p>Warehouse</text:p>
          </table:table-cell>
          <table:table-cell table:style-name="ce61" table:content-validation-name="val5" office:value-type="string" calcext:value-type="string">
            <text:p>Announced / Planned</text:p>
          </table:table-cell>
          <table:table-cell table:style-name="ce60" table:number-columns-repeated="2"/>
          <table:table-cell table:style-name="ce60" office:value-type="string" calcext:value-type="string">
            <text:p>Warsaw “low‑cost hub”</text:p>
          </table:table-cell>
          <table:table-cell table:style-name="ce60" office:value-type="string" calcext:value-type="string">
            <text:p>(address TBD)</text:p>
          </table:table-cell>
          <table:table-cell table:style-name="ce62" office:value-type="string" calcext:value-type="string">
            <text:p>Warsaw</text:p>
          </table:table-cell>
          <table:table-cell table:style-name="ce60"/>
          <table:table-cell table:style-name="ce60" office:value-type="string" calcext:value-type="string">
            <text:p>Poland</text:p>
          </table:table-cell>
          <table:table-cell table:style-name="ce60"/>
          <table:table-cell table:style-name="ce60" table:formula="of:=[.G88]&amp;&quot;, &quot; &amp; [.H88]&amp;&quot;,  &quot;&amp;[.I88]&amp;&quot; &quot;&amp;[.J88]&amp;&quot;, &quot;&amp;[.K88]" office:value-type="string" office:string-value="(address TBD), Warsaw,   Poland, " calcext:value-type="string">
            <text:p>(address TBD), Warsaw, <text:s text:c="2"/>Poland,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amp;&quot;, &quot; &amp; [.H89]&amp;&quot;,  &quot;&amp;[.I89]&amp;&quot; &quot;&amp;[.J89]&amp;&quot;, &quot;&amp;[.K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amp;&quot;, &quot; &amp; [.H90]&amp;&quot;,  &quot;&amp;[.I90]&amp;&quot; &quot;&amp;[.J90]&amp;&quot;, &quot;&amp;[.K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amp;&quot;, &quot; &amp; [.H91]&amp;&quot;,  &quot;&amp;[.I91]&amp;&quot; &quot;&amp;[.J91]&amp;&quot;, &quot;&amp;[.K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amp;&quot;, &quot; &amp; [.H92]&amp;&quot;,  &quot;&amp;[.I92]&amp;&quot; &quot;&amp;[.J92]&amp;&quot;, &quot;&amp;[.K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amp;&quot;, &quot; &amp; [.H93]&amp;&quot;,  &quot;&amp;[.I93]&amp;&quot; &quot;&amp;[.J93]&amp;&quot;, &quot;&amp;[.K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amp;&quot;, &quot; &amp; [.H94]&amp;&quot;,  &quot;&amp;[.I94]&amp;&quot; &quot;&amp;[.J94]&amp;&quot;, &quot;&amp;[.K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amp;&quot;, &quot; &amp; [.H95]&amp;&quot;,  &quot;&amp;[.I95]&amp;&quot; &quot;&amp;[.J95]&amp;&quot;, &quot;&amp;[.K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amp;&quot;, &quot; &amp; [.H96]&amp;&quot;,  &quot;&amp;[.I96]&amp;&quot; &quot;&amp;[.J96]&amp;&quot;, &quot;&amp;[.K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amp;&quot;, &quot; &amp; [.H97]&amp;&quot;,  &quot;&amp;[.I97]&amp;&quot; &quot;&amp;[.J97]&amp;&quot;, &quot;&amp;[.K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amp;&quot;, &quot; &amp; [.H98]&amp;&quot;,  &quot;&amp;[.I98]&amp;&quot; &quot;&amp;[.J98]&amp;&quot;, &quot;&amp;[.K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9]&amp;&quot;, &quot; &amp; [.H99]&amp;&quot;,  &quot;&amp;[.I99]&amp;&quot; &quot;&amp;[.J99]&amp;&quot;, &quot;&amp;[.K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0]&amp;&quot;, &quot; &amp; [.H100]&amp;&quot;,  &quot;&amp;[.I100]&amp;&quot; &quot;&amp;[.J100]&amp;&quot;, &quot;&amp;[.K1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1]&amp;&quot;, &quot; &amp; [.H101]&amp;&quot;,  &quot;&amp;[.I101]&amp;&quot; &quot;&amp;[.J101]&amp;&quot;, &quot;&amp;[.K1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2]&amp;&quot;, &quot; &amp; [.H102]&amp;&quot;,  &quot;&amp;[.I102]&amp;&quot; &quot;&amp;[.J102]&amp;&quot;, &quot;&amp;[.K1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3]&amp;&quot;, &quot; &amp; [.H103]&amp;&quot;,  &quot;&amp;[.I103]&amp;&quot; &quot;&amp;[.J103]&amp;&quot;, &quot;&amp;[.K1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4]&amp;&quot;, &quot; &amp; [.H104]&amp;&quot;,  &quot;&amp;[.I104]&amp;&quot; &quot;&amp;[.J104]&amp;&quot;, &quot;&amp;[.K1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5]&amp;&quot;, &quot; &amp; [.H105]&amp;&quot;,  &quot;&amp;[.I105]&amp;&quot; &quot;&amp;[.J105]&amp;&quot;, &quot;&amp;[.K1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6]&amp;&quot;, &quot; &amp; [.H106]&amp;&quot;,  &quot;&amp;[.I106]&amp;&quot; &quot;&amp;[.J106]&amp;&quot;, &quot;&amp;[.K1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7]&amp;&quot;, &quot; &amp; [.H107]&amp;&quot;,  &quot;&amp;[.I107]&amp;&quot; &quot;&amp;[.J107]&amp;&quot;, &quot;&amp;[.K1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8]&amp;&quot;, &quot; &amp; [.H108]&amp;&quot;,  &quot;&amp;[.I108]&amp;&quot; &quot;&amp;[.J108]&amp;&quot;, &quot;&amp;[.K1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09]&amp;&quot;, &quot; &amp; [.H109]&amp;&quot;,  &quot;&amp;[.I109]&amp;&quot; &quot;&amp;[.J109]&amp;&quot;, &quot;&amp;[.K1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0]&amp;&quot;, &quot; &amp; [.H110]&amp;&quot;,  &quot;&amp;[.I110]&amp;&quot; &quot;&amp;[.J110]&amp;&quot;, &quot;&amp;[.K1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1]&amp;&quot;, &quot; &amp; [.H111]&amp;&quot;,  &quot;&amp;[.I111]&amp;&quot; &quot;&amp;[.J111]&amp;&quot;, &quot;&amp;[.K1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2]&amp;&quot;, &quot; &amp; [.H112]&amp;&quot;,  &quot;&amp;[.I112]&amp;&quot; &quot;&amp;[.J112]&amp;&quot;, &quot;&amp;[.K1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3]&amp;&quot;, &quot; &amp; [.H113]&amp;&quot;,  &quot;&amp;[.I113]&amp;&quot; &quot;&amp;[.J113]&amp;&quot;, &quot;&amp;[.K1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4]&amp;&quot;, &quot; &amp; [.H114]&amp;&quot;,  &quot;&amp;[.I114]&amp;&quot; &quot;&amp;[.J114]&amp;&quot;, &quot;&amp;[.K1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5]&amp;&quot;, &quot; &amp; [.H115]&amp;&quot;,  &quot;&amp;[.I115]&amp;&quot; &quot;&amp;[.J115]&amp;&quot;, &quot;&amp;[.K1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6]&amp;&quot;, &quot; &amp; [.H116]&amp;&quot;,  &quot;&amp;[.I116]&amp;&quot; &quot;&amp;[.J116]&amp;&quot;, &quot;&amp;[.K1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7]&amp;&quot;, &quot; &amp; [.H117]&amp;&quot;,  &quot;&amp;[.I117]&amp;&quot; &quot;&amp;[.J117]&amp;&quot;, &quot;&amp;[.K1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8]&amp;&quot;, &quot; &amp; [.H118]&amp;&quot;,  &quot;&amp;[.I118]&amp;&quot; &quot;&amp;[.J118]&amp;&quot;, &quot;&amp;[.K1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19]&amp;&quot;, &quot; &amp; [.H119]&amp;&quot;,  &quot;&amp;[.I119]&amp;&quot; &quot;&amp;[.J119]&amp;&quot;, &quot;&amp;[.K1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0]&amp;&quot;, &quot; &amp; [.H120]&amp;&quot;,  &quot;&amp;[.I120]&amp;&quot; &quot;&amp;[.J120]&amp;&quot;, &quot;&amp;[.K1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1]&amp;&quot;, &quot; &amp; [.H121]&amp;&quot;,  &quot;&amp;[.I121]&amp;&quot; &quot;&amp;[.J121]&amp;&quot;, &quot;&amp;[.K1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2]&amp;&quot;, &quot; &amp; [.H122]&amp;&quot;,  &quot;&amp;[.I122]&amp;&quot; &quot;&amp;[.J122]&amp;&quot;, &quot;&amp;[.K1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3]&amp;&quot;, &quot; &amp; [.H123]&amp;&quot;,  &quot;&amp;[.I123]&amp;&quot; &quot;&amp;[.J123]&amp;&quot;, &quot;&amp;[.K1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4]&amp;&quot;, &quot; &amp; [.H124]&amp;&quot;,  &quot;&amp;[.I124]&amp;&quot; &quot;&amp;[.J124]&amp;&quot;, &quot;&amp;[.K1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5]&amp;&quot;, &quot; &amp; [.H125]&amp;&quot;,  &quot;&amp;[.I125]&amp;&quot; &quot;&amp;[.J125]&amp;&quot;, &quot;&amp;[.K1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6]&amp;&quot;, &quot; &amp; [.H126]&amp;&quot;,  &quot;&amp;[.I126]&amp;&quot; &quot;&amp;[.J126]&amp;&quot;, &quot;&amp;[.K1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7]&amp;&quot;, &quot; &amp; [.H127]&amp;&quot;,  &quot;&amp;[.I127]&amp;&quot; &quot;&amp;[.J127]&amp;&quot;, &quot;&amp;[.K1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8]&amp;&quot;, &quot; &amp; [.H128]&amp;&quot;,  &quot;&amp;[.I128]&amp;&quot; &quot;&amp;[.J128]&amp;&quot;, &quot;&amp;[.K1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29]&amp;&quot;, &quot; &amp; [.H129]&amp;&quot;,  &quot;&amp;[.I129]&amp;&quot; &quot;&amp;[.J129]&amp;&quot;, &quot;&amp;[.K1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0]&amp;&quot;, &quot; &amp; [.H130]&amp;&quot;,  &quot;&amp;[.I130]&amp;&quot; &quot;&amp;[.J130]&amp;&quot;, &quot;&amp;[.K1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1]&amp;&quot;, &quot; &amp; [.H131]&amp;&quot;,  &quot;&amp;[.I131]&amp;&quot; &quot;&amp;[.J131]&amp;&quot;, &quot;&amp;[.K1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2]&amp;&quot;, &quot; &amp; [.H132]&amp;&quot;,  &quot;&amp;[.I132]&amp;&quot; &quot;&amp;[.J132]&amp;&quot;, &quot;&amp;[.K1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3]&amp;&quot;, &quot; &amp; [.H133]&amp;&quot;,  &quot;&amp;[.I133]&amp;&quot; &quot;&amp;[.J133]&amp;&quot;, &quot;&amp;[.K1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4]&amp;&quot;, &quot; &amp; [.H134]&amp;&quot;,  &quot;&amp;[.I134]&amp;&quot; &quot;&amp;[.J134]&amp;&quot;, &quot;&amp;[.K1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5]&amp;&quot;, &quot; &amp; [.H135]&amp;&quot;,  &quot;&amp;[.I135]&amp;&quot; &quot;&amp;[.J135]&amp;&quot;, &quot;&amp;[.K1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6]&amp;&quot;, &quot; &amp; [.H136]&amp;&quot;,  &quot;&amp;[.I136]&amp;&quot; &quot;&amp;[.J136]&amp;&quot;, &quot;&amp;[.K1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7]&amp;&quot;, &quot; &amp; [.H137]&amp;&quot;,  &quot;&amp;[.I137]&amp;&quot; &quot;&amp;[.J137]&amp;&quot;, &quot;&amp;[.K1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8]&amp;&quot;, &quot; &amp; [.H138]&amp;&quot;,  &quot;&amp;[.I138]&amp;&quot; &quot;&amp;[.J138]&amp;&quot;, &quot;&amp;[.K1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39]&amp;&quot;, &quot; &amp; [.H139]&amp;&quot;,  &quot;&amp;[.I139]&amp;&quot; &quot;&amp;[.J139]&amp;&quot;, &quot;&amp;[.K1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0]&amp;&quot;, &quot; &amp; [.H140]&amp;&quot;,  &quot;&amp;[.I140]&amp;&quot; &quot;&amp;[.J140]&amp;&quot;, &quot;&amp;[.K1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1]&amp;&quot;, &quot; &amp; [.H141]&amp;&quot;,  &quot;&amp;[.I141]&amp;&quot; &quot;&amp;[.J141]&amp;&quot;, &quot;&amp;[.K1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2]&amp;&quot;, &quot; &amp; [.H142]&amp;&quot;,  &quot;&amp;[.I142]&amp;&quot; &quot;&amp;[.J142]&amp;&quot;, &quot;&amp;[.K1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3]&amp;&quot;, &quot; &amp; [.H143]&amp;&quot;,  &quot;&amp;[.I143]&amp;&quot; &quot;&amp;[.J143]&amp;&quot;, &quot;&amp;[.K1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4]&amp;&quot;, &quot; &amp; [.H144]&amp;&quot;,  &quot;&amp;[.I144]&amp;&quot; &quot;&amp;[.J144]&amp;&quot;, &quot;&amp;[.K1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5]&amp;&quot;, &quot; &amp; [.H145]&amp;&quot;,  &quot;&amp;[.I145]&amp;&quot; &quot;&amp;[.J145]&amp;&quot;, &quot;&amp;[.K1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6]&amp;&quot;, &quot; &amp; [.H146]&amp;&quot;,  &quot;&amp;[.I146]&amp;&quot; &quot;&amp;[.J146]&amp;&quot;, &quot;&amp;[.K1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7]&amp;&quot;, &quot; &amp; [.H147]&amp;&quot;,  &quot;&amp;[.I147]&amp;&quot; &quot;&amp;[.J147]&amp;&quot;, &quot;&amp;[.K1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8]&amp;&quot;, &quot; &amp; [.H148]&amp;&quot;,  &quot;&amp;[.I148]&amp;&quot; &quot;&amp;[.J148]&amp;&quot;, &quot;&amp;[.K1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49]&amp;&quot;, &quot; &amp; [.H149]&amp;&quot;,  &quot;&amp;[.I149]&amp;&quot; &quot;&amp;[.J149]&amp;&quot;, &quot;&amp;[.K1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0]&amp;&quot;, &quot; &amp; [.H150]&amp;&quot;,  &quot;&amp;[.I150]&amp;&quot; &quot;&amp;[.J150]&amp;&quot;, &quot;&amp;[.K1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1]&amp;&quot;, &quot; &amp; [.H151]&amp;&quot;,  &quot;&amp;[.I151]&amp;&quot; &quot;&amp;[.J151]&amp;&quot;, &quot;&amp;[.K1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2]&amp;&quot;, &quot; &amp; [.H152]&amp;&quot;,  &quot;&amp;[.I152]&amp;&quot; &quot;&amp;[.J152]&amp;&quot;, &quot;&amp;[.K1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3]&amp;&quot;, &quot; &amp; [.H153]&amp;&quot;,  &quot;&amp;[.I153]&amp;&quot; &quot;&amp;[.J153]&amp;&quot;, &quot;&amp;[.K1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4]&amp;&quot;, &quot; &amp; [.H154]&amp;&quot;,  &quot;&amp;[.I154]&amp;&quot; &quot;&amp;[.J154]&amp;&quot;, &quot;&amp;[.K1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5]&amp;&quot;, &quot; &amp; [.H155]&amp;&quot;,  &quot;&amp;[.I155]&amp;&quot; &quot;&amp;[.J155]&amp;&quot;, &quot;&amp;[.K1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6]&amp;&quot;, &quot; &amp; [.H156]&amp;&quot;,  &quot;&amp;[.I156]&amp;&quot; &quot;&amp;[.J156]&amp;&quot;, &quot;&amp;[.K1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7]&amp;&quot;, &quot; &amp; [.H157]&amp;&quot;,  &quot;&amp;[.I157]&amp;&quot; &quot;&amp;[.J157]&amp;&quot;, &quot;&amp;[.K1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8]&amp;&quot;, &quot; &amp; [.H158]&amp;&quot;,  &quot;&amp;[.I158]&amp;&quot; &quot;&amp;[.J158]&amp;&quot;, &quot;&amp;[.K1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59]&amp;&quot;, &quot; &amp; [.H159]&amp;&quot;,  &quot;&amp;[.I159]&amp;&quot; &quot;&amp;[.J159]&amp;&quot;, &quot;&amp;[.K1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0]&amp;&quot;, &quot; &amp; [.H160]&amp;&quot;,  &quot;&amp;[.I160]&amp;&quot; &quot;&amp;[.J160]&amp;&quot;, &quot;&amp;[.K1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1]&amp;&quot;, &quot; &amp; [.H161]&amp;&quot;,  &quot;&amp;[.I161]&amp;&quot; &quot;&amp;[.J161]&amp;&quot;, &quot;&amp;[.K1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2]&amp;&quot;, &quot; &amp; [.H162]&amp;&quot;,  &quot;&amp;[.I162]&amp;&quot; &quot;&amp;[.J162]&amp;&quot;, &quot;&amp;[.K1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3]&amp;&quot;, &quot; &amp; [.H163]&amp;&quot;,  &quot;&amp;[.I163]&amp;&quot; &quot;&amp;[.J163]&amp;&quot;, &quot;&amp;[.K1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4]&amp;&quot;, &quot; &amp; [.H164]&amp;&quot;,  &quot;&amp;[.I164]&amp;&quot; &quot;&amp;[.J164]&amp;&quot;, &quot;&amp;[.K1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5]&amp;&quot;, &quot; &amp; [.H165]&amp;&quot;,  &quot;&amp;[.I165]&amp;&quot; &quot;&amp;[.J165]&amp;&quot;, &quot;&amp;[.K1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6]&amp;&quot;, &quot; &amp; [.H166]&amp;&quot;,  &quot;&amp;[.I166]&amp;&quot; &quot;&amp;[.J166]&amp;&quot;, &quot;&amp;[.K1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7]&amp;&quot;, &quot; &amp; [.H167]&amp;&quot;,  &quot;&amp;[.I167]&amp;&quot; &quot;&amp;[.J167]&amp;&quot;, &quot;&amp;[.K1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8]&amp;&quot;, &quot; &amp; [.H168]&amp;&quot;,  &quot;&amp;[.I168]&amp;&quot; &quot;&amp;[.J168]&amp;&quot;, &quot;&amp;[.K1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69]&amp;&quot;, &quot; &amp; [.H169]&amp;&quot;,  &quot;&amp;[.I169]&amp;&quot; &quot;&amp;[.J169]&amp;&quot;, &quot;&amp;[.K1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0]&amp;&quot;, &quot; &amp; [.H170]&amp;&quot;,  &quot;&amp;[.I170]&amp;&quot; &quot;&amp;[.J170]&amp;&quot;, &quot;&amp;[.K1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1]&amp;&quot;, &quot; &amp; [.H171]&amp;&quot;,  &quot;&amp;[.I171]&amp;&quot; &quot;&amp;[.J171]&amp;&quot;, &quot;&amp;[.K1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2]&amp;&quot;, &quot; &amp; [.H172]&amp;&quot;,  &quot;&amp;[.I172]&amp;&quot; &quot;&amp;[.J172]&amp;&quot;, &quot;&amp;[.K1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3]&amp;&quot;, &quot; &amp; [.H173]&amp;&quot;,  &quot;&amp;[.I173]&amp;&quot; &quot;&amp;[.J173]&amp;&quot;, &quot;&amp;[.K1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4]&amp;&quot;, &quot; &amp; [.H174]&amp;&quot;,  &quot;&amp;[.I174]&amp;&quot; &quot;&amp;[.J174]&amp;&quot;, &quot;&amp;[.K1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5]&amp;&quot;, &quot; &amp; [.H175]&amp;&quot;,  &quot;&amp;[.I175]&amp;&quot; &quot;&amp;[.J175]&amp;&quot;, &quot;&amp;[.K1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6]&amp;&quot;, &quot; &amp; [.H176]&amp;&quot;,  &quot;&amp;[.I176]&amp;&quot; &quot;&amp;[.J176]&amp;&quot;, &quot;&amp;[.K1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7]&amp;&quot;, &quot; &amp; [.H177]&amp;&quot;,  &quot;&amp;[.I177]&amp;&quot; &quot;&amp;[.J177]&amp;&quot;, &quot;&amp;[.K1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8]&amp;&quot;, &quot; &amp; [.H178]&amp;&quot;,  &quot;&amp;[.I178]&amp;&quot; &quot;&amp;[.J178]&amp;&quot;, &quot;&amp;[.K1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79]&amp;&quot;, &quot; &amp; [.H179]&amp;&quot;,  &quot;&amp;[.I179]&amp;&quot; &quot;&amp;[.J179]&amp;&quot;, &quot;&amp;[.K1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0]&amp;&quot;, &quot; &amp; [.H180]&amp;&quot;,  &quot;&amp;[.I180]&amp;&quot; &quot;&amp;[.J180]&amp;&quot;, &quot;&amp;[.K1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1]&amp;&quot;, &quot; &amp; [.H181]&amp;&quot;,  &quot;&amp;[.I181]&amp;&quot; &quot;&amp;[.J181]&amp;&quot;, &quot;&amp;[.K1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2]&amp;&quot;, &quot; &amp; [.H182]&amp;&quot;,  &quot;&amp;[.I182]&amp;&quot; &quot;&amp;[.J182]&amp;&quot;, &quot;&amp;[.K1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3]&amp;&quot;, &quot; &amp; [.H183]&amp;&quot;,  &quot;&amp;[.I183]&amp;&quot; &quot;&amp;[.J183]&amp;&quot;, &quot;&amp;[.K1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4]&amp;&quot;, &quot; &amp; [.H184]&amp;&quot;,  &quot;&amp;[.I184]&amp;&quot; &quot;&amp;[.J184]&amp;&quot;, &quot;&amp;[.K1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5]&amp;&quot;, &quot; &amp; [.H185]&amp;&quot;,  &quot;&amp;[.I185]&amp;&quot; &quot;&amp;[.J185]&amp;&quot;, &quot;&amp;[.K1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6]&amp;&quot;, &quot; &amp; [.H186]&amp;&quot;,  &quot;&amp;[.I186]&amp;&quot; &quot;&amp;[.J186]&amp;&quot;, &quot;&amp;[.K1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7]&amp;&quot;, &quot; &amp; [.H187]&amp;&quot;,  &quot;&amp;[.I187]&amp;&quot; &quot;&amp;[.J187]&amp;&quot;, &quot;&amp;[.K1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8]&amp;&quot;, &quot; &amp; [.H188]&amp;&quot;,  &quot;&amp;[.I188]&amp;&quot; &quot;&amp;[.J188]&amp;&quot;, &quot;&amp;[.K1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89]&amp;&quot;, &quot; &amp; [.H189]&amp;&quot;,  &quot;&amp;[.I189]&amp;&quot; &quot;&amp;[.J189]&amp;&quot;, &quot;&amp;[.K1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0]&amp;&quot;, &quot; &amp; [.H190]&amp;&quot;,  &quot;&amp;[.I190]&amp;&quot; &quot;&amp;[.J190]&amp;&quot;, &quot;&amp;[.K1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1]&amp;&quot;, &quot; &amp; [.H191]&amp;&quot;,  &quot;&amp;[.I191]&amp;&quot; &quot;&amp;[.J191]&amp;&quot;, &quot;&amp;[.K1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2]&amp;&quot;, &quot; &amp; [.H192]&amp;&quot;,  &quot;&amp;[.I192]&amp;&quot; &quot;&amp;[.J192]&amp;&quot;, &quot;&amp;[.K1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3]&amp;&quot;, &quot; &amp; [.H193]&amp;&quot;,  &quot;&amp;[.I193]&amp;&quot; &quot;&amp;[.J193]&amp;&quot;, &quot;&amp;[.K1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4]&amp;&quot;, &quot; &amp; [.H194]&amp;&quot;,  &quot;&amp;[.I194]&amp;&quot; &quot;&amp;[.J194]&amp;&quot;, &quot;&amp;[.K1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5]&amp;&quot;, &quot; &amp; [.H195]&amp;&quot;,  &quot;&amp;[.I195]&amp;&quot; &quot;&amp;[.J195]&amp;&quot;, &quot;&amp;[.K1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6]&amp;&quot;, &quot; &amp; [.H196]&amp;&quot;,  &quot;&amp;[.I196]&amp;&quot; &quot;&amp;[.J196]&amp;&quot;, &quot;&amp;[.K1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7]&amp;&quot;, &quot; &amp; [.H197]&amp;&quot;,  &quot;&amp;[.I197]&amp;&quot; &quot;&amp;[.J197]&amp;&quot;, &quot;&amp;[.K1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8]&amp;&quot;, &quot; &amp; [.H198]&amp;&quot;,  &quot;&amp;[.I198]&amp;&quot; &quot;&amp;[.J198]&amp;&quot;, &quot;&amp;[.K1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199]&amp;&quot;, &quot; &amp; [.H199]&amp;&quot;,  &quot;&amp;[.I199]&amp;&quot; &quot;&amp;[.J199]&amp;&quot;, &quot;&amp;[.K1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0]&amp;&quot;, &quot; &amp; [.H200]&amp;&quot;,  &quot;&amp;[.I200]&amp;&quot; &quot;&amp;[.J200]&amp;&quot;, &quot;&amp;[.K2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1]&amp;&quot;, &quot; &amp; [.H201]&amp;&quot;,  &quot;&amp;[.I201]&amp;&quot; &quot;&amp;[.J201]&amp;&quot;, &quot;&amp;[.K2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2]&amp;&quot;, &quot; &amp; [.H202]&amp;&quot;,  &quot;&amp;[.I202]&amp;&quot; &quot;&amp;[.J202]&amp;&quot;, &quot;&amp;[.K2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3]&amp;&quot;, &quot; &amp; [.H203]&amp;&quot;,  &quot;&amp;[.I203]&amp;&quot; &quot;&amp;[.J203]&amp;&quot;, &quot;&amp;[.K2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4]&amp;&quot;, &quot; &amp; [.H204]&amp;&quot;,  &quot;&amp;[.I204]&amp;&quot; &quot;&amp;[.J204]&amp;&quot;, &quot;&amp;[.K2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5]&amp;&quot;, &quot; &amp; [.H205]&amp;&quot;,  &quot;&amp;[.I205]&amp;&quot; &quot;&amp;[.J205]&amp;&quot;, &quot;&amp;[.K2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6]&amp;&quot;, &quot; &amp; [.H206]&amp;&quot;,  &quot;&amp;[.I206]&amp;&quot; &quot;&amp;[.J206]&amp;&quot;, &quot;&amp;[.K2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7]&amp;&quot;, &quot; &amp; [.H207]&amp;&quot;,  &quot;&amp;[.I207]&amp;&quot; &quot;&amp;[.J207]&amp;&quot;, &quot;&amp;[.K2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8]&amp;&quot;, &quot; &amp; [.H208]&amp;&quot;,  &quot;&amp;[.I208]&amp;&quot; &quot;&amp;[.J208]&amp;&quot;, &quot;&amp;[.K2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09]&amp;&quot;, &quot; &amp; [.H209]&amp;&quot;,  &quot;&amp;[.I209]&amp;&quot; &quot;&amp;[.J209]&amp;&quot;, &quot;&amp;[.K2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0]&amp;&quot;, &quot; &amp; [.H210]&amp;&quot;,  &quot;&amp;[.I210]&amp;&quot; &quot;&amp;[.J210]&amp;&quot;, &quot;&amp;[.K2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1]&amp;&quot;, &quot; &amp; [.H211]&amp;&quot;,  &quot;&amp;[.I211]&amp;&quot; &quot;&amp;[.J211]&amp;&quot;, &quot;&amp;[.K2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2]&amp;&quot;, &quot; &amp; [.H212]&amp;&quot;,  &quot;&amp;[.I212]&amp;&quot; &quot;&amp;[.J212]&amp;&quot;, &quot;&amp;[.K2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3]&amp;&quot;, &quot; &amp; [.H213]&amp;&quot;,  &quot;&amp;[.I213]&amp;&quot; &quot;&amp;[.J213]&amp;&quot;, &quot;&amp;[.K2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4]&amp;&quot;, &quot; &amp; [.H214]&amp;&quot;,  &quot;&amp;[.I214]&amp;&quot; &quot;&amp;[.J214]&amp;&quot;, &quot;&amp;[.K2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5]&amp;&quot;, &quot; &amp; [.H215]&amp;&quot;,  &quot;&amp;[.I215]&amp;&quot; &quot;&amp;[.J215]&amp;&quot;, &quot;&amp;[.K2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6]&amp;&quot;, &quot; &amp; [.H216]&amp;&quot;,  &quot;&amp;[.I216]&amp;&quot; &quot;&amp;[.J216]&amp;&quot;, &quot;&amp;[.K2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7]&amp;&quot;, &quot; &amp; [.H217]&amp;&quot;,  &quot;&amp;[.I217]&amp;&quot; &quot;&amp;[.J217]&amp;&quot;, &quot;&amp;[.K2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8]&amp;&quot;, &quot; &amp; [.H218]&amp;&quot;,  &quot;&amp;[.I218]&amp;&quot; &quot;&amp;[.J218]&amp;&quot;, &quot;&amp;[.K2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19]&amp;&quot;, &quot; &amp; [.H219]&amp;&quot;,  &quot;&amp;[.I219]&amp;&quot; &quot;&amp;[.J219]&amp;&quot;, &quot;&amp;[.K2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0]&amp;&quot;, &quot; &amp; [.H220]&amp;&quot;,  &quot;&amp;[.I220]&amp;&quot; &quot;&amp;[.J220]&amp;&quot;, &quot;&amp;[.K2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1]&amp;&quot;, &quot; &amp; [.H221]&amp;&quot;,  &quot;&amp;[.I221]&amp;&quot; &quot;&amp;[.J221]&amp;&quot;, &quot;&amp;[.K2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2]&amp;&quot;, &quot; &amp; [.H222]&amp;&quot;,  &quot;&amp;[.I222]&amp;&quot; &quot;&amp;[.J222]&amp;&quot;, &quot;&amp;[.K2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3]&amp;&quot;, &quot; &amp; [.H223]&amp;&quot;,  &quot;&amp;[.I223]&amp;&quot; &quot;&amp;[.J223]&amp;&quot;, &quot;&amp;[.K2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4]&amp;&quot;, &quot; &amp; [.H224]&amp;&quot;,  &quot;&amp;[.I224]&amp;&quot; &quot;&amp;[.J224]&amp;&quot;, &quot;&amp;[.K2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5]&amp;&quot;, &quot; &amp; [.H225]&amp;&quot;,  &quot;&amp;[.I225]&amp;&quot; &quot;&amp;[.J225]&amp;&quot;, &quot;&amp;[.K2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6]&amp;&quot;, &quot; &amp; [.H226]&amp;&quot;,  &quot;&amp;[.I226]&amp;&quot; &quot;&amp;[.J226]&amp;&quot;, &quot;&amp;[.K2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7]&amp;&quot;, &quot; &amp; [.H227]&amp;&quot;,  &quot;&amp;[.I227]&amp;&quot; &quot;&amp;[.J227]&amp;&quot;, &quot;&amp;[.K2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8]&amp;&quot;, &quot; &amp; [.H228]&amp;&quot;,  &quot;&amp;[.I228]&amp;&quot; &quot;&amp;[.J228]&amp;&quot;, &quot;&amp;[.K2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29]&amp;&quot;, &quot; &amp; [.H229]&amp;&quot;,  &quot;&amp;[.I229]&amp;&quot; &quot;&amp;[.J229]&amp;&quot;, &quot;&amp;[.K2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0]&amp;&quot;, &quot; &amp; [.H230]&amp;&quot;,  &quot;&amp;[.I230]&amp;&quot; &quot;&amp;[.J230]&amp;&quot;, &quot;&amp;[.K2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1]&amp;&quot;, &quot; &amp; [.H231]&amp;&quot;,  &quot;&amp;[.I231]&amp;&quot; &quot;&amp;[.J231]&amp;&quot;, &quot;&amp;[.K2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2]&amp;&quot;, &quot; &amp; [.H232]&amp;&quot;,  &quot;&amp;[.I232]&amp;&quot; &quot;&amp;[.J232]&amp;&quot;, &quot;&amp;[.K2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3]&amp;&quot;, &quot; &amp; [.H233]&amp;&quot;,  &quot;&amp;[.I233]&amp;&quot; &quot;&amp;[.J233]&amp;&quot;, &quot;&amp;[.K2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4]&amp;&quot;, &quot; &amp; [.H234]&amp;&quot;,  &quot;&amp;[.I234]&amp;&quot; &quot;&amp;[.J234]&amp;&quot;, &quot;&amp;[.K2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5]&amp;&quot;, &quot; &amp; [.H235]&amp;&quot;,  &quot;&amp;[.I235]&amp;&quot; &quot;&amp;[.J235]&amp;&quot;, &quot;&amp;[.K2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6]&amp;&quot;, &quot; &amp; [.H236]&amp;&quot;,  &quot;&amp;[.I236]&amp;&quot; &quot;&amp;[.J236]&amp;&quot;, &quot;&amp;[.K2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7]&amp;&quot;, &quot; &amp; [.H237]&amp;&quot;,  &quot;&amp;[.I237]&amp;&quot; &quot;&amp;[.J237]&amp;&quot;, &quot;&amp;[.K2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8]&amp;&quot;, &quot; &amp; [.H238]&amp;&quot;,  &quot;&amp;[.I238]&amp;&quot; &quot;&amp;[.J238]&amp;&quot;, &quot;&amp;[.K2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39]&amp;&quot;, &quot; &amp; [.H239]&amp;&quot;,  &quot;&amp;[.I239]&amp;&quot; &quot;&amp;[.J239]&amp;&quot;, &quot;&amp;[.K2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0]&amp;&quot;, &quot; &amp; [.H240]&amp;&quot;,  &quot;&amp;[.I240]&amp;&quot; &quot;&amp;[.J240]&amp;&quot;, &quot;&amp;[.K2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1]&amp;&quot;, &quot; &amp; [.H241]&amp;&quot;,  &quot;&amp;[.I241]&amp;&quot; &quot;&amp;[.J241]&amp;&quot;, &quot;&amp;[.K2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2]&amp;&quot;, &quot; &amp; [.H242]&amp;&quot;,  &quot;&amp;[.I242]&amp;&quot; &quot;&amp;[.J242]&amp;&quot;, &quot;&amp;[.K2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3]&amp;&quot;, &quot; &amp; [.H243]&amp;&quot;,  &quot;&amp;[.I243]&amp;&quot; &quot;&amp;[.J243]&amp;&quot;, &quot;&amp;[.K2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4]&amp;&quot;, &quot; &amp; [.H244]&amp;&quot;,  &quot;&amp;[.I244]&amp;&quot; &quot;&amp;[.J244]&amp;&quot;, &quot;&amp;[.K2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5]&amp;&quot;, &quot; &amp; [.H245]&amp;&quot;,  &quot;&amp;[.I245]&amp;&quot; &quot;&amp;[.J245]&amp;&quot;, &quot;&amp;[.K2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6]&amp;&quot;, &quot; &amp; [.H246]&amp;&quot;,  &quot;&amp;[.I246]&amp;&quot; &quot;&amp;[.J246]&amp;&quot;, &quot;&amp;[.K2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7]&amp;&quot;, &quot; &amp; [.H247]&amp;&quot;,  &quot;&amp;[.I247]&amp;&quot; &quot;&amp;[.J247]&amp;&quot;, &quot;&amp;[.K2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8]&amp;&quot;, &quot; &amp; [.H248]&amp;&quot;,  &quot;&amp;[.I248]&amp;&quot; &quot;&amp;[.J248]&amp;&quot;, &quot;&amp;[.K2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49]&amp;&quot;, &quot; &amp; [.H249]&amp;&quot;,  &quot;&amp;[.I249]&amp;&quot; &quot;&amp;[.J249]&amp;&quot;, &quot;&amp;[.K2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0]&amp;&quot;, &quot; &amp; [.H250]&amp;&quot;,  &quot;&amp;[.I250]&amp;&quot; &quot;&amp;[.J250]&amp;&quot;, &quot;&amp;[.K2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1]&amp;&quot;, &quot; &amp; [.H251]&amp;&quot;,  &quot;&amp;[.I251]&amp;&quot; &quot;&amp;[.J251]&amp;&quot;, &quot;&amp;[.K2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2]&amp;&quot;, &quot; &amp; [.H252]&amp;&quot;,  &quot;&amp;[.I252]&amp;&quot; &quot;&amp;[.J252]&amp;&quot;, &quot;&amp;[.K2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3]&amp;&quot;, &quot; &amp; [.H253]&amp;&quot;,  &quot;&amp;[.I253]&amp;&quot; &quot;&amp;[.J253]&amp;&quot;, &quot;&amp;[.K2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4]&amp;&quot;, &quot; &amp; [.H254]&amp;&quot;,  &quot;&amp;[.I254]&amp;&quot; &quot;&amp;[.J254]&amp;&quot;, &quot;&amp;[.K2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5]&amp;&quot;, &quot; &amp; [.H255]&amp;&quot;,  &quot;&amp;[.I255]&amp;&quot; &quot;&amp;[.J255]&amp;&quot;, &quot;&amp;[.K2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6]&amp;&quot;, &quot; &amp; [.H256]&amp;&quot;,  &quot;&amp;[.I256]&amp;&quot; &quot;&amp;[.J256]&amp;&quot;, &quot;&amp;[.K2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7]&amp;&quot;, &quot; &amp; [.H257]&amp;&quot;,  &quot;&amp;[.I257]&amp;&quot; &quot;&amp;[.J257]&amp;&quot;, &quot;&amp;[.K2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8]&amp;&quot;, &quot; &amp; [.H258]&amp;&quot;,  &quot;&amp;[.I258]&amp;&quot; &quot;&amp;[.J258]&amp;&quot;, &quot;&amp;[.K2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59]&amp;&quot;, &quot; &amp; [.H259]&amp;&quot;,  &quot;&amp;[.I259]&amp;&quot; &quot;&amp;[.J259]&amp;&quot;, &quot;&amp;[.K2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0]&amp;&quot;, &quot; &amp; [.H260]&amp;&quot;,  &quot;&amp;[.I260]&amp;&quot; &quot;&amp;[.J260]&amp;&quot;, &quot;&amp;[.K2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1]&amp;&quot;, &quot; &amp; [.H261]&amp;&quot;,  &quot;&amp;[.I261]&amp;&quot; &quot;&amp;[.J261]&amp;&quot;, &quot;&amp;[.K2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2]&amp;&quot;, &quot; &amp; [.H262]&amp;&quot;,  &quot;&amp;[.I262]&amp;&quot; &quot;&amp;[.J262]&amp;&quot;, &quot;&amp;[.K2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3]&amp;&quot;, &quot; &amp; [.H263]&amp;&quot;,  &quot;&amp;[.I263]&amp;&quot; &quot;&amp;[.J263]&amp;&quot;, &quot;&amp;[.K2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4]&amp;&quot;, &quot; &amp; [.H264]&amp;&quot;,  &quot;&amp;[.I264]&amp;&quot; &quot;&amp;[.J264]&amp;&quot;, &quot;&amp;[.K2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5]&amp;&quot;, &quot; &amp; [.H265]&amp;&quot;,  &quot;&amp;[.I265]&amp;&quot; &quot;&amp;[.J265]&amp;&quot;, &quot;&amp;[.K2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6]&amp;&quot;, &quot; &amp; [.H266]&amp;&quot;,  &quot;&amp;[.I266]&amp;&quot; &quot;&amp;[.J266]&amp;&quot;, &quot;&amp;[.K2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7]&amp;&quot;, &quot; &amp; [.H267]&amp;&quot;,  &quot;&amp;[.I267]&amp;&quot; &quot;&amp;[.J267]&amp;&quot;, &quot;&amp;[.K2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8]&amp;&quot;, &quot; &amp; [.H268]&amp;&quot;,  &quot;&amp;[.I268]&amp;&quot; &quot;&amp;[.J268]&amp;&quot;, &quot;&amp;[.K2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69]&amp;&quot;, &quot; &amp; [.H269]&amp;&quot;,  &quot;&amp;[.I269]&amp;&quot; &quot;&amp;[.J269]&amp;&quot;, &quot;&amp;[.K2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0]&amp;&quot;, &quot; &amp; [.H270]&amp;&quot;,  &quot;&amp;[.I270]&amp;&quot; &quot;&amp;[.J270]&amp;&quot;, &quot;&amp;[.K2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1]&amp;&quot;, &quot; &amp; [.H271]&amp;&quot;,  &quot;&amp;[.I271]&amp;&quot; &quot;&amp;[.J271]&amp;&quot;, &quot;&amp;[.K2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2]&amp;&quot;, &quot; &amp; [.H272]&amp;&quot;,  &quot;&amp;[.I272]&amp;&quot; &quot;&amp;[.J272]&amp;&quot;, &quot;&amp;[.K2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3]&amp;&quot;, &quot; &amp; [.H273]&amp;&quot;,  &quot;&amp;[.I273]&amp;&quot; &quot;&amp;[.J273]&amp;&quot;, &quot;&amp;[.K2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4]&amp;&quot;, &quot; &amp; [.H274]&amp;&quot;,  &quot;&amp;[.I274]&amp;&quot; &quot;&amp;[.J274]&amp;&quot;, &quot;&amp;[.K2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5]&amp;&quot;, &quot; &amp; [.H275]&amp;&quot;,  &quot;&amp;[.I275]&amp;&quot; &quot;&amp;[.J275]&amp;&quot;, &quot;&amp;[.K2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6]&amp;&quot;, &quot; &amp; [.H276]&amp;&quot;,  &quot;&amp;[.I276]&amp;&quot; &quot;&amp;[.J276]&amp;&quot;, &quot;&amp;[.K2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7]&amp;&quot;, &quot; &amp; [.H277]&amp;&quot;,  &quot;&amp;[.I277]&amp;&quot; &quot;&amp;[.J277]&amp;&quot;, &quot;&amp;[.K2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8]&amp;&quot;, &quot; &amp; [.H278]&amp;&quot;,  &quot;&amp;[.I278]&amp;&quot; &quot;&amp;[.J278]&amp;&quot;, &quot;&amp;[.K2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79]&amp;&quot;, &quot; &amp; [.H279]&amp;&quot;,  &quot;&amp;[.I279]&amp;&quot; &quot;&amp;[.J279]&amp;&quot;, &quot;&amp;[.K2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0]&amp;&quot;, &quot; &amp; [.H280]&amp;&quot;,  &quot;&amp;[.I280]&amp;&quot; &quot;&amp;[.J280]&amp;&quot;, &quot;&amp;[.K2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1]&amp;&quot;, &quot; &amp; [.H281]&amp;&quot;,  &quot;&amp;[.I281]&amp;&quot; &quot;&amp;[.J281]&amp;&quot;, &quot;&amp;[.K2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2]&amp;&quot;, &quot; &amp; [.H282]&amp;&quot;,  &quot;&amp;[.I282]&amp;&quot; &quot;&amp;[.J282]&amp;&quot;, &quot;&amp;[.K2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3]&amp;&quot;, &quot; &amp; [.H283]&amp;&quot;,  &quot;&amp;[.I283]&amp;&quot; &quot;&amp;[.J283]&amp;&quot;, &quot;&amp;[.K2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4]&amp;&quot;, &quot; &amp; [.H284]&amp;&quot;,  &quot;&amp;[.I284]&amp;&quot; &quot;&amp;[.J284]&amp;&quot;, &quot;&amp;[.K2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5]&amp;&quot;, &quot; &amp; [.H285]&amp;&quot;,  &quot;&amp;[.I285]&amp;&quot; &quot;&amp;[.J285]&amp;&quot;, &quot;&amp;[.K2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6]&amp;&quot;, &quot; &amp; [.H286]&amp;&quot;,  &quot;&amp;[.I286]&amp;&quot; &quot;&amp;[.J286]&amp;&quot;, &quot;&amp;[.K2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7]&amp;&quot;, &quot; &amp; [.H287]&amp;&quot;,  &quot;&amp;[.I287]&amp;&quot; &quot;&amp;[.J287]&amp;&quot;, &quot;&amp;[.K2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8]&amp;&quot;, &quot; &amp; [.H288]&amp;&quot;,  &quot;&amp;[.I288]&amp;&quot; &quot;&amp;[.J288]&amp;&quot;, &quot;&amp;[.K2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89]&amp;&quot;, &quot; &amp; [.H289]&amp;&quot;,  &quot;&amp;[.I289]&amp;&quot; &quot;&amp;[.J289]&amp;&quot;, &quot;&amp;[.K2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0]&amp;&quot;, &quot; &amp; [.H290]&amp;&quot;,  &quot;&amp;[.I290]&amp;&quot; &quot;&amp;[.J290]&amp;&quot;, &quot;&amp;[.K2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1]&amp;&quot;, &quot; &amp; [.H291]&amp;&quot;,  &quot;&amp;[.I291]&amp;&quot; &quot;&amp;[.J291]&amp;&quot;, &quot;&amp;[.K2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2]&amp;&quot;, &quot; &amp; [.H292]&amp;&quot;,  &quot;&amp;[.I292]&amp;&quot; &quot;&amp;[.J292]&amp;&quot;, &quot;&amp;[.K2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3]&amp;&quot;, &quot; &amp; [.H293]&amp;&quot;,  &quot;&amp;[.I293]&amp;&quot; &quot;&amp;[.J293]&amp;&quot;, &quot;&amp;[.K2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4]&amp;&quot;, &quot; &amp; [.H294]&amp;&quot;,  &quot;&amp;[.I294]&amp;&quot; &quot;&amp;[.J294]&amp;&quot;, &quot;&amp;[.K2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5]&amp;&quot;, &quot; &amp; [.H295]&amp;&quot;,  &quot;&amp;[.I295]&amp;&quot; &quot;&amp;[.J295]&amp;&quot;, &quot;&amp;[.K2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6]&amp;&quot;, &quot; &amp; [.H296]&amp;&quot;,  &quot;&amp;[.I296]&amp;&quot; &quot;&amp;[.J296]&amp;&quot;, &quot;&amp;[.K2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7]&amp;&quot;, &quot; &amp; [.H297]&amp;&quot;,  &quot;&amp;[.I297]&amp;&quot; &quot;&amp;[.J297]&amp;&quot;, &quot;&amp;[.K2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8]&amp;&quot;, &quot; &amp; [.H298]&amp;&quot;,  &quot;&amp;[.I298]&amp;&quot; &quot;&amp;[.J298]&amp;&quot;, &quot;&amp;[.K2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299]&amp;&quot;, &quot; &amp; [.H299]&amp;&quot;,  &quot;&amp;[.I299]&amp;&quot; &quot;&amp;[.J299]&amp;&quot;, &quot;&amp;[.K2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0]&amp;&quot;, &quot; &amp; [.H300]&amp;&quot;,  &quot;&amp;[.I300]&amp;&quot; &quot;&amp;[.J300]&amp;&quot;, &quot;&amp;[.K3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1]&amp;&quot;, &quot; &amp; [.H301]&amp;&quot;,  &quot;&amp;[.I301]&amp;&quot; &quot;&amp;[.J301]&amp;&quot;, &quot;&amp;[.K3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2]&amp;&quot;, &quot; &amp; [.H302]&amp;&quot;,  &quot;&amp;[.I302]&amp;&quot; &quot;&amp;[.J302]&amp;&quot;, &quot;&amp;[.K3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3]&amp;&quot;, &quot; &amp; [.H303]&amp;&quot;,  &quot;&amp;[.I303]&amp;&quot; &quot;&amp;[.J303]&amp;&quot;, &quot;&amp;[.K3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4]&amp;&quot;, &quot; &amp; [.H304]&amp;&quot;,  &quot;&amp;[.I304]&amp;&quot; &quot;&amp;[.J304]&amp;&quot;, &quot;&amp;[.K3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5]&amp;&quot;, &quot; &amp; [.H305]&amp;&quot;,  &quot;&amp;[.I305]&amp;&quot; &quot;&amp;[.J305]&amp;&quot;, &quot;&amp;[.K3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6]&amp;&quot;, &quot; &amp; [.H306]&amp;&quot;,  &quot;&amp;[.I306]&amp;&quot; &quot;&amp;[.J306]&amp;&quot;, &quot;&amp;[.K3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7]&amp;&quot;, &quot; &amp; [.H307]&amp;&quot;,  &quot;&amp;[.I307]&amp;&quot; &quot;&amp;[.J307]&amp;&quot;, &quot;&amp;[.K3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8]&amp;&quot;, &quot; &amp; [.H308]&amp;&quot;,  &quot;&amp;[.I308]&amp;&quot; &quot;&amp;[.J308]&amp;&quot;, &quot;&amp;[.K3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09]&amp;&quot;, &quot; &amp; [.H309]&amp;&quot;,  &quot;&amp;[.I309]&amp;&quot; &quot;&amp;[.J309]&amp;&quot;, &quot;&amp;[.K3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0]&amp;&quot;, &quot; &amp; [.H310]&amp;&quot;,  &quot;&amp;[.I310]&amp;&quot; &quot;&amp;[.J310]&amp;&quot;, &quot;&amp;[.K3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1]&amp;&quot;, &quot; &amp; [.H311]&amp;&quot;,  &quot;&amp;[.I311]&amp;&quot; &quot;&amp;[.J311]&amp;&quot;, &quot;&amp;[.K3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2]&amp;&quot;, &quot; &amp; [.H312]&amp;&quot;,  &quot;&amp;[.I312]&amp;&quot; &quot;&amp;[.J312]&amp;&quot;, &quot;&amp;[.K3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3]&amp;&quot;, &quot; &amp; [.H313]&amp;&quot;,  &quot;&amp;[.I313]&amp;&quot; &quot;&amp;[.J313]&amp;&quot;, &quot;&amp;[.K3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4]&amp;&quot;, &quot; &amp; [.H314]&amp;&quot;,  &quot;&amp;[.I314]&amp;&quot; &quot;&amp;[.J314]&amp;&quot;, &quot;&amp;[.K3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5]&amp;&quot;, &quot; &amp; [.H315]&amp;&quot;,  &quot;&amp;[.I315]&amp;&quot; &quot;&amp;[.J315]&amp;&quot;, &quot;&amp;[.K3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6]&amp;&quot;, &quot; &amp; [.H316]&amp;&quot;,  &quot;&amp;[.I316]&amp;&quot; &quot;&amp;[.J316]&amp;&quot;, &quot;&amp;[.K3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7]&amp;&quot;, &quot; &amp; [.H317]&amp;&quot;,  &quot;&amp;[.I317]&amp;&quot; &quot;&amp;[.J317]&amp;&quot;, &quot;&amp;[.K3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8]&amp;&quot;, &quot; &amp; [.H318]&amp;&quot;,  &quot;&amp;[.I318]&amp;&quot; &quot;&amp;[.J318]&amp;&quot;, &quot;&amp;[.K3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19]&amp;&quot;, &quot; &amp; [.H319]&amp;&quot;,  &quot;&amp;[.I319]&amp;&quot; &quot;&amp;[.J319]&amp;&quot;, &quot;&amp;[.K3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0]&amp;&quot;, &quot; &amp; [.H320]&amp;&quot;,  &quot;&amp;[.I320]&amp;&quot; &quot;&amp;[.J320]&amp;&quot;, &quot;&amp;[.K3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1]&amp;&quot;, &quot; &amp; [.H321]&amp;&quot;,  &quot;&amp;[.I321]&amp;&quot; &quot;&amp;[.J321]&amp;&quot;, &quot;&amp;[.K3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2]&amp;&quot;, &quot; &amp; [.H322]&amp;&quot;,  &quot;&amp;[.I322]&amp;&quot; &quot;&amp;[.J322]&amp;&quot;, &quot;&amp;[.K3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3]&amp;&quot;, &quot; &amp; [.H323]&amp;&quot;,  &quot;&amp;[.I323]&amp;&quot; &quot;&amp;[.J323]&amp;&quot;, &quot;&amp;[.K3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4]&amp;&quot;, &quot; &amp; [.H324]&amp;&quot;,  &quot;&amp;[.I324]&amp;&quot; &quot;&amp;[.J324]&amp;&quot;, &quot;&amp;[.K3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5]&amp;&quot;, &quot; &amp; [.H325]&amp;&quot;,  &quot;&amp;[.I325]&amp;&quot; &quot;&amp;[.J325]&amp;&quot;, &quot;&amp;[.K3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6]&amp;&quot;, &quot; &amp; [.H326]&amp;&quot;,  &quot;&amp;[.I326]&amp;&quot; &quot;&amp;[.J326]&amp;&quot;, &quot;&amp;[.K3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7]&amp;&quot;, &quot; &amp; [.H327]&amp;&quot;,  &quot;&amp;[.I327]&amp;&quot; &quot;&amp;[.J327]&amp;&quot;, &quot;&amp;[.K3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8]&amp;&quot;, &quot; &amp; [.H328]&amp;&quot;,  &quot;&amp;[.I328]&amp;&quot; &quot;&amp;[.J328]&amp;&quot;, &quot;&amp;[.K3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29]&amp;&quot;, &quot; &amp; [.H329]&amp;&quot;,  &quot;&amp;[.I329]&amp;&quot; &quot;&amp;[.J329]&amp;&quot;, &quot;&amp;[.K3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0]&amp;&quot;, &quot; &amp; [.H330]&amp;&quot;,  &quot;&amp;[.I330]&amp;&quot; &quot;&amp;[.J330]&amp;&quot;, &quot;&amp;[.K3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1]&amp;&quot;, &quot; &amp; [.H331]&amp;&quot;,  &quot;&amp;[.I331]&amp;&quot; &quot;&amp;[.J331]&amp;&quot;, &quot;&amp;[.K3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2]&amp;&quot;, &quot; &amp; [.H332]&amp;&quot;,  &quot;&amp;[.I332]&amp;&quot; &quot;&amp;[.J332]&amp;&quot;, &quot;&amp;[.K3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3]&amp;&quot;, &quot; &amp; [.H333]&amp;&quot;,  &quot;&amp;[.I333]&amp;&quot; &quot;&amp;[.J333]&amp;&quot;, &quot;&amp;[.K3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4]&amp;&quot;, &quot; &amp; [.H334]&amp;&quot;,  &quot;&amp;[.I334]&amp;&quot; &quot;&amp;[.J334]&amp;&quot;, &quot;&amp;[.K3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5]&amp;&quot;, &quot; &amp; [.H335]&amp;&quot;,  &quot;&amp;[.I335]&amp;&quot; &quot;&amp;[.J335]&amp;&quot;, &quot;&amp;[.K3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6]&amp;&quot;, &quot; &amp; [.H336]&amp;&quot;,  &quot;&amp;[.I336]&amp;&quot; &quot;&amp;[.J336]&amp;&quot;, &quot;&amp;[.K3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7]&amp;&quot;, &quot; &amp; [.H337]&amp;&quot;,  &quot;&amp;[.I337]&amp;&quot; &quot;&amp;[.J337]&amp;&quot;, &quot;&amp;[.K3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8]&amp;&quot;, &quot; &amp; [.H338]&amp;&quot;,  &quot;&amp;[.I338]&amp;&quot; &quot;&amp;[.J338]&amp;&quot;, &quot;&amp;[.K3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39]&amp;&quot;, &quot; &amp; [.H339]&amp;&quot;,  &quot;&amp;[.I339]&amp;&quot; &quot;&amp;[.J339]&amp;&quot;, &quot;&amp;[.K3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0]&amp;&quot;, &quot; &amp; [.H340]&amp;&quot;,  &quot;&amp;[.I340]&amp;&quot; &quot;&amp;[.J340]&amp;&quot;, &quot;&amp;[.K3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1]&amp;&quot;, &quot; &amp; [.H341]&amp;&quot;,  &quot;&amp;[.I341]&amp;&quot; &quot;&amp;[.J341]&amp;&quot;, &quot;&amp;[.K3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2]&amp;&quot;, &quot; &amp; [.H342]&amp;&quot;,  &quot;&amp;[.I342]&amp;&quot; &quot;&amp;[.J342]&amp;&quot;, &quot;&amp;[.K3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3]&amp;&quot;, &quot; &amp; [.H343]&amp;&quot;,  &quot;&amp;[.I343]&amp;&quot; &quot;&amp;[.J343]&amp;&quot;, &quot;&amp;[.K3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4]&amp;&quot;, &quot; &amp; [.H344]&amp;&quot;,  &quot;&amp;[.I344]&amp;&quot; &quot;&amp;[.J344]&amp;&quot;, &quot;&amp;[.K3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5]&amp;&quot;, &quot; &amp; [.H345]&amp;&quot;,  &quot;&amp;[.I345]&amp;&quot; &quot;&amp;[.J345]&amp;&quot;, &quot;&amp;[.K3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6]&amp;&quot;, &quot; &amp; [.H346]&amp;&quot;,  &quot;&amp;[.I346]&amp;&quot; &quot;&amp;[.J346]&amp;&quot;, &quot;&amp;[.K3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7]&amp;&quot;, &quot; &amp; [.H347]&amp;&quot;,  &quot;&amp;[.I347]&amp;&quot; &quot;&amp;[.J347]&amp;&quot;, &quot;&amp;[.K3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8]&amp;&quot;, &quot; &amp; [.H348]&amp;&quot;,  &quot;&amp;[.I348]&amp;&quot; &quot;&amp;[.J348]&amp;&quot;, &quot;&amp;[.K3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49]&amp;&quot;, &quot; &amp; [.H349]&amp;&quot;,  &quot;&amp;[.I349]&amp;&quot; &quot;&amp;[.J349]&amp;&quot;, &quot;&amp;[.K3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0]&amp;&quot;, &quot; &amp; [.H350]&amp;&quot;,  &quot;&amp;[.I350]&amp;&quot; &quot;&amp;[.J350]&amp;&quot;, &quot;&amp;[.K3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1]&amp;&quot;, &quot; &amp; [.H351]&amp;&quot;,  &quot;&amp;[.I351]&amp;&quot; &quot;&amp;[.J351]&amp;&quot;, &quot;&amp;[.K3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2]&amp;&quot;, &quot; &amp; [.H352]&amp;&quot;,  &quot;&amp;[.I352]&amp;&quot; &quot;&amp;[.J352]&amp;&quot;, &quot;&amp;[.K3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3]&amp;&quot;, &quot; &amp; [.H353]&amp;&quot;,  &quot;&amp;[.I353]&amp;&quot; &quot;&amp;[.J353]&amp;&quot;, &quot;&amp;[.K3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4]&amp;&quot;, &quot; &amp; [.H354]&amp;&quot;,  &quot;&amp;[.I354]&amp;&quot; &quot;&amp;[.J354]&amp;&quot;, &quot;&amp;[.K3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5]&amp;&quot;, &quot; &amp; [.H355]&amp;&quot;,  &quot;&amp;[.I355]&amp;&quot; &quot;&amp;[.J355]&amp;&quot;, &quot;&amp;[.K3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6]&amp;&quot;, &quot; &amp; [.H356]&amp;&quot;,  &quot;&amp;[.I356]&amp;&quot; &quot;&amp;[.J356]&amp;&quot;, &quot;&amp;[.K3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7]&amp;&quot;, &quot; &amp; [.H357]&amp;&quot;,  &quot;&amp;[.I357]&amp;&quot; &quot;&amp;[.J357]&amp;&quot;, &quot;&amp;[.K3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8]&amp;&quot;, &quot; &amp; [.H358]&amp;&quot;,  &quot;&amp;[.I358]&amp;&quot; &quot;&amp;[.J358]&amp;&quot;, &quot;&amp;[.K3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59]&amp;&quot;, &quot; &amp; [.H359]&amp;&quot;,  &quot;&amp;[.I359]&amp;&quot; &quot;&amp;[.J359]&amp;&quot;, &quot;&amp;[.K3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0]&amp;&quot;, &quot; &amp; [.H360]&amp;&quot;,  &quot;&amp;[.I360]&amp;&quot; &quot;&amp;[.J360]&amp;&quot;, &quot;&amp;[.K3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1]&amp;&quot;, &quot; &amp; [.H361]&amp;&quot;,  &quot;&amp;[.I361]&amp;&quot; &quot;&amp;[.J361]&amp;&quot;, &quot;&amp;[.K3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2]&amp;&quot;, &quot; &amp; [.H362]&amp;&quot;,  &quot;&amp;[.I362]&amp;&quot; &quot;&amp;[.J362]&amp;&quot;, &quot;&amp;[.K3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3]&amp;&quot;, &quot; &amp; [.H363]&amp;&quot;,  &quot;&amp;[.I363]&amp;&quot; &quot;&amp;[.J363]&amp;&quot;, &quot;&amp;[.K3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4]&amp;&quot;, &quot; &amp; [.H364]&amp;&quot;,  &quot;&amp;[.I364]&amp;&quot; &quot;&amp;[.J364]&amp;&quot;, &quot;&amp;[.K3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5]&amp;&quot;, &quot; &amp; [.H365]&amp;&quot;,  &quot;&amp;[.I365]&amp;&quot; &quot;&amp;[.J365]&amp;&quot;, &quot;&amp;[.K3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6]&amp;&quot;, &quot; &amp; [.H366]&amp;&quot;,  &quot;&amp;[.I366]&amp;&quot; &quot;&amp;[.J366]&amp;&quot;, &quot;&amp;[.K3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7]&amp;&quot;, &quot; &amp; [.H367]&amp;&quot;,  &quot;&amp;[.I367]&amp;&quot; &quot;&amp;[.J367]&amp;&quot;, &quot;&amp;[.K3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8]&amp;&quot;, &quot; &amp; [.H368]&amp;&quot;,  &quot;&amp;[.I368]&amp;&quot; &quot;&amp;[.J368]&amp;&quot;, &quot;&amp;[.K3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69]&amp;&quot;, &quot; &amp; [.H369]&amp;&quot;,  &quot;&amp;[.I369]&amp;&quot; &quot;&amp;[.J369]&amp;&quot;, &quot;&amp;[.K3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0]&amp;&quot;, &quot; &amp; [.H370]&amp;&quot;,  &quot;&amp;[.I370]&amp;&quot; &quot;&amp;[.J370]&amp;&quot;, &quot;&amp;[.K3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1]&amp;&quot;, &quot; &amp; [.H371]&amp;&quot;,  &quot;&amp;[.I371]&amp;&quot; &quot;&amp;[.J371]&amp;&quot;, &quot;&amp;[.K3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2]&amp;&quot;, &quot; &amp; [.H372]&amp;&quot;,  &quot;&amp;[.I372]&amp;&quot; &quot;&amp;[.J372]&amp;&quot;, &quot;&amp;[.K3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3]&amp;&quot;, &quot; &amp; [.H373]&amp;&quot;,  &quot;&amp;[.I373]&amp;&quot; &quot;&amp;[.J373]&amp;&quot;, &quot;&amp;[.K3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4]&amp;&quot;, &quot; &amp; [.H374]&amp;&quot;,  &quot;&amp;[.I374]&amp;&quot; &quot;&amp;[.J374]&amp;&quot;, &quot;&amp;[.K3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5]&amp;&quot;, &quot; &amp; [.H375]&amp;&quot;,  &quot;&amp;[.I375]&amp;&quot; &quot;&amp;[.J375]&amp;&quot;, &quot;&amp;[.K3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6]&amp;&quot;, &quot; &amp; [.H376]&amp;&quot;,  &quot;&amp;[.I376]&amp;&quot; &quot;&amp;[.J376]&amp;&quot;, &quot;&amp;[.K3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7]&amp;&quot;, &quot; &amp; [.H377]&amp;&quot;,  &quot;&amp;[.I377]&amp;&quot; &quot;&amp;[.J377]&amp;&quot;, &quot;&amp;[.K3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8]&amp;&quot;, &quot; &amp; [.H378]&amp;&quot;,  &quot;&amp;[.I378]&amp;&quot; &quot;&amp;[.J378]&amp;&quot;, &quot;&amp;[.K3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79]&amp;&quot;, &quot; &amp; [.H379]&amp;&quot;,  &quot;&amp;[.I379]&amp;&quot; &quot;&amp;[.J379]&amp;&quot;, &quot;&amp;[.K3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0]&amp;&quot;, &quot; &amp; [.H380]&amp;&quot;,  &quot;&amp;[.I380]&amp;&quot; &quot;&amp;[.J380]&amp;&quot;, &quot;&amp;[.K3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1]&amp;&quot;, &quot; &amp; [.H381]&amp;&quot;,  &quot;&amp;[.I381]&amp;&quot; &quot;&amp;[.J381]&amp;&quot;, &quot;&amp;[.K3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2]&amp;&quot;, &quot; &amp; [.H382]&amp;&quot;,  &quot;&amp;[.I382]&amp;&quot; &quot;&amp;[.J382]&amp;&quot;, &quot;&amp;[.K3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3]&amp;&quot;, &quot; &amp; [.H383]&amp;&quot;,  &quot;&amp;[.I383]&amp;&quot; &quot;&amp;[.J383]&amp;&quot;, &quot;&amp;[.K3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4]&amp;&quot;, &quot; &amp; [.H384]&amp;&quot;,  &quot;&amp;[.I384]&amp;&quot; &quot;&amp;[.J384]&amp;&quot;, &quot;&amp;[.K3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5]&amp;&quot;, &quot; &amp; [.H385]&amp;&quot;,  &quot;&amp;[.I385]&amp;&quot; &quot;&amp;[.J385]&amp;&quot;, &quot;&amp;[.K3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6]&amp;&quot;, &quot; &amp; [.H386]&amp;&quot;,  &quot;&amp;[.I386]&amp;&quot; &quot;&amp;[.J386]&amp;&quot;, &quot;&amp;[.K3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7]&amp;&quot;, &quot; &amp; [.H387]&amp;&quot;,  &quot;&amp;[.I387]&amp;&quot; &quot;&amp;[.J387]&amp;&quot;, &quot;&amp;[.K3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8]&amp;&quot;, &quot; &amp; [.H388]&amp;&quot;,  &quot;&amp;[.I388]&amp;&quot; &quot;&amp;[.J388]&amp;&quot;, &quot;&amp;[.K3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89]&amp;&quot;, &quot; &amp; [.H389]&amp;&quot;,  &quot;&amp;[.I389]&amp;&quot; &quot;&amp;[.J389]&amp;&quot;, &quot;&amp;[.K3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0]&amp;&quot;, &quot; &amp; [.H390]&amp;&quot;,  &quot;&amp;[.I390]&amp;&quot; &quot;&amp;[.J390]&amp;&quot;, &quot;&amp;[.K3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1]&amp;&quot;, &quot; &amp; [.H391]&amp;&quot;,  &quot;&amp;[.I391]&amp;&quot; &quot;&amp;[.J391]&amp;&quot;, &quot;&amp;[.K3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2]&amp;&quot;, &quot; &amp; [.H392]&amp;&quot;,  &quot;&amp;[.I392]&amp;&quot; &quot;&amp;[.J392]&amp;&quot;, &quot;&amp;[.K3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3]&amp;&quot;, &quot; &amp; [.H393]&amp;&quot;,  &quot;&amp;[.I393]&amp;&quot; &quot;&amp;[.J393]&amp;&quot;, &quot;&amp;[.K3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4]&amp;&quot;, &quot; &amp; [.H394]&amp;&quot;,  &quot;&amp;[.I394]&amp;&quot; &quot;&amp;[.J394]&amp;&quot;, &quot;&amp;[.K3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5]&amp;&quot;, &quot; &amp; [.H395]&amp;&quot;,  &quot;&amp;[.I395]&amp;&quot; &quot;&amp;[.J395]&amp;&quot;, &quot;&amp;[.K3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6]&amp;&quot;, &quot; &amp; [.H396]&amp;&quot;,  &quot;&amp;[.I396]&amp;&quot; &quot;&amp;[.J396]&amp;&quot;, &quot;&amp;[.K3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7]&amp;&quot;, &quot; &amp; [.H397]&amp;&quot;,  &quot;&amp;[.I397]&amp;&quot; &quot;&amp;[.J397]&amp;&quot;, &quot;&amp;[.K3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8]&amp;&quot;, &quot; &amp; [.H398]&amp;&quot;,  &quot;&amp;[.I398]&amp;&quot; &quot;&amp;[.J398]&amp;&quot;, &quot;&amp;[.K3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399]&amp;&quot;, &quot; &amp; [.H399]&amp;&quot;,  &quot;&amp;[.I399]&amp;&quot; &quot;&amp;[.J399]&amp;&quot;, &quot;&amp;[.K3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0]&amp;&quot;, &quot; &amp; [.H400]&amp;&quot;,  &quot;&amp;[.I400]&amp;&quot; &quot;&amp;[.J400]&amp;&quot;, &quot;&amp;[.K4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1]&amp;&quot;, &quot; &amp; [.H401]&amp;&quot;,  &quot;&amp;[.I401]&amp;&quot; &quot;&amp;[.J401]&amp;&quot;, &quot;&amp;[.K4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2]&amp;&quot;, &quot; &amp; [.H402]&amp;&quot;,  &quot;&amp;[.I402]&amp;&quot; &quot;&amp;[.J402]&amp;&quot;, &quot;&amp;[.K4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3]&amp;&quot;, &quot; &amp; [.H403]&amp;&quot;,  &quot;&amp;[.I403]&amp;&quot; &quot;&amp;[.J403]&amp;&quot;, &quot;&amp;[.K4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4]&amp;&quot;, &quot; &amp; [.H404]&amp;&quot;,  &quot;&amp;[.I404]&amp;&quot; &quot;&amp;[.J404]&amp;&quot;, &quot;&amp;[.K4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5]&amp;&quot;, &quot; &amp; [.H405]&amp;&quot;,  &quot;&amp;[.I405]&amp;&quot; &quot;&amp;[.J405]&amp;&quot;, &quot;&amp;[.K4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6]&amp;&quot;, &quot; &amp; [.H406]&amp;&quot;,  &quot;&amp;[.I406]&amp;&quot; &quot;&amp;[.J406]&amp;&quot;, &quot;&amp;[.K4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7]&amp;&quot;, &quot; &amp; [.H407]&amp;&quot;,  &quot;&amp;[.I407]&amp;&quot; &quot;&amp;[.J407]&amp;&quot;, &quot;&amp;[.K4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8]&amp;&quot;, &quot; &amp; [.H408]&amp;&quot;,  &quot;&amp;[.I408]&amp;&quot; &quot;&amp;[.J408]&amp;&quot;, &quot;&amp;[.K4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09]&amp;&quot;, &quot; &amp; [.H409]&amp;&quot;,  &quot;&amp;[.I409]&amp;&quot; &quot;&amp;[.J409]&amp;&quot;, &quot;&amp;[.K4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0]&amp;&quot;, &quot; &amp; [.H410]&amp;&quot;,  &quot;&amp;[.I410]&amp;&quot; &quot;&amp;[.J410]&amp;&quot;, &quot;&amp;[.K4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1]&amp;&quot;, &quot; &amp; [.H411]&amp;&quot;,  &quot;&amp;[.I411]&amp;&quot; &quot;&amp;[.J411]&amp;&quot;, &quot;&amp;[.K4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2]&amp;&quot;, &quot; &amp; [.H412]&amp;&quot;,  &quot;&amp;[.I412]&amp;&quot; &quot;&amp;[.J412]&amp;&quot;, &quot;&amp;[.K4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3]&amp;&quot;, &quot; &amp; [.H413]&amp;&quot;,  &quot;&amp;[.I413]&amp;&quot; &quot;&amp;[.J413]&amp;&quot;, &quot;&amp;[.K4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4]&amp;&quot;, &quot; &amp; [.H414]&amp;&quot;,  &quot;&amp;[.I414]&amp;&quot; &quot;&amp;[.J414]&amp;&quot;, &quot;&amp;[.K4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5]&amp;&quot;, &quot; &amp; [.H415]&amp;&quot;,  &quot;&amp;[.I415]&amp;&quot; &quot;&amp;[.J415]&amp;&quot;, &quot;&amp;[.K4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6]&amp;&quot;, &quot; &amp; [.H416]&amp;&quot;,  &quot;&amp;[.I416]&amp;&quot; &quot;&amp;[.J416]&amp;&quot;, &quot;&amp;[.K4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7]&amp;&quot;, &quot; &amp; [.H417]&amp;&quot;,  &quot;&amp;[.I417]&amp;&quot; &quot;&amp;[.J417]&amp;&quot;, &quot;&amp;[.K4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8]&amp;&quot;, &quot; &amp; [.H418]&amp;&quot;,  &quot;&amp;[.I418]&amp;&quot; &quot;&amp;[.J418]&amp;&quot;, &quot;&amp;[.K4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19]&amp;&quot;, &quot; &amp; [.H419]&amp;&quot;,  &quot;&amp;[.I419]&amp;&quot; &quot;&amp;[.J419]&amp;&quot;, &quot;&amp;[.K4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0]&amp;&quot;, &quot; &amp; [.H420]&amp;&quot;,  &quot;&amp;[.I420]&amp;&quot; &quot;&amp;[.J420]&amp;&quot;, &quot;&amp;[.K4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1]&amp;&quot;, &quot; &amp; [.H421]&amp;&quot;,  &quot;&amp;[.I421]&amp;&quot; &quot;&amp;[.J421]&amp;&quot;, &quot;&amp;[.K4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2]&amp;&quot;, &quot; &amp; [.H422]&amp;&quot;,  &quot;&amp;[.I422]&amp;&quot; &quot;&amp;[.J422]&amp;&quot;, &quot;&amp;[.K4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3]&amp;&quot;, &quot; &amp; [.H423]&amp;&quot;,  &quot;&amp;[.I423]&amp;&quot; &quot;&amp;[.J423]&amp;&quot;, &quot;&amp;[.K4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4]&amp;&quot;, &quot; &amp; [.H424]&amp;&quot;,  &quot;&amp;[.I424]&amp;&quot; &quot;&amp;[.J424]&amp;&quot;, &quot;&amp;[.K4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5]&amp;&quot;, &quot; &amp; [.H425]&amp;&quot;,  &quot;&amp;[.I425]&amp;&quot; &quot;&amp;[.J425]&amp;&quot;, &quot;&amp;[.K4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6]&amp;&quot;, &quot; &amp; [.H426]&amp;&quot;,  &quot;&amp;[.I426]&amp;&quot; &quot;&amp;[.J426]&amp;&quot;, &quot;&amp;[.K4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7]&amp;&quot;, &quot; &amp; [.H427]&amp;&quot;,  &quot;&amp;[.I427]&amp;&quot; &quot;&amp;[.J427]&amp;&quot;, &quot;&amp;[.K4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8]&amp;&quot;, &quot; &amp; [.H428]&amp;&quot;,  &quot;&amp;[.I428]&amp;&quot; &quot;&amp;[.J428]&amp;&quot;, &quot;&amp;[.K4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29]&amp;&quot;, &quot; &amp; [.H429]&amp;&quot;,  &quot;&amp;[.I429]&amp;&quot; &quot;&amp;[.J429]&amp;&quot;, &quot;&amp;[.K4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0]&amp;&quot;, &quot; &amp; [.H430]&amp;&quot;,  &quot;&amp;[.I430]&amp;&quot; &quot;&amp;[.J430]&amp;&quot;, &quot;&amp;[.K4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1]&amp;&quot;, &quot; &amp; [.H431]&amp;&quot;,  &quot;&amp;[.I431]&amp;&quot; &quot;&amp;[.J431]&amp;&quot;, &quot;&amp;[.K4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2]&amp;&quot;, &quot; &amp; [.H432]&amp;&quot;,  &quot;&amp;[.I432]&amp;&quot; &quot;&amp;[.J432]&amp;&quot;, &quot;&amp;[.K4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3]&amp;&quot;, &quot; &amp; [.H433]&amp;&quot;,  &quot;&amp;[.I433]&amp;&quot; &quot;&amp;[.J433]&amp;&quot;, &quot;&amp;[.K4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4]&amp;&quot;, &quot; &amp; [.H434]&amp;&quot;,  &quot;&amp;[.I434]&amp;&quot; &quot;&amp;[.J434]&amp;&quot;, &quot;&amp;[.K4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5]&amp;&quot;, &quot; &amp; [.H435]&amp;&quot;,  &quot;&amp;[.I435]&amp;&quot; &quot;&amp;[.J435]&amp;&quot;, &quot;&amp;[.K4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6]&amp;&quot;, &quot; &amp; [.H436]&amp;&quot;,  &quot;&amp;[.I436]&amp;&quot; &quot;&amp;[.J436]&amp;&quot;, &quot;&amp;[.K4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7]&amp;&quot;, &quot; &amp; [.H437]&amp;&quot;,  &quot;&amp;[.I437]&amp;&quot; &quot;&amp;[.J437]&amp;&quot;, &quot;&amp;[.K4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8]&amp;&quot;, &quot; &amp; [.H438]&amp;&quot;,  &quot;&amp;[.I438]&amp;&quot; &quot;&amp;[.J438]&amp;&quot;, &quot;&amp;[.K4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39]&amp;&quot;, &quot; &amp; [.H439]&amp;&quot;,  &quot;&amp;[.I439]&amp;&quot; &quot;&amp;[.J439]&amp;&quot;, &quot;&amp;[.K4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0]&amp;&quot;, &quot; &amp; [.H440]&amp;&quot;,  &quot;&amp;[.I440]&amp;&quot; &quot;&amp;[.J440]&amp;&quot;, &quot;&amp;[.K4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1]&amp;&quot;, &quot; &amp; [.H441]&amp;&quot;,  &quot;&amp;[.I441]&amp;&quot; &quot;&amp;[.J441]&amp;&quot;, &quot;&amp;[.K4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2]&amp;&quot;, &quot; &amp; [.H442]&amp;&quot;,  &quot;&amp;[.I442]&amp;&quot; &quot;&amp;[.J442]&amp;&quot;, &quot;&amp;[.K4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3]&amp;&quot;, &quot; &amp; [.H443]&amp;&quot;,  &quot;&amp;[.I443]&amp;&quot; &quot;&amp;[.J443]&amp;&quot;, &quot;&amp;[.K4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4]&amp;&quot;, &quot; &amp; [.H444]&amp;&quot;,  &quot;&amp;[.I444]&amp;&quot; &quot;&amp;[.J444]&amp;&quot;, &quot;&amp;[.K4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5]&amp;&quot;, &quot; &amp; [.H445]&amp;&quot;,  &quot;&amp;[.I445]&amp;&quot; &quot;&amp;[.J445]&amp;&quot;, &quot;&amp;[.K4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6]&amp;&quot;, &quot; &amp; [.H446]&amp;&quot;,  &quot;&amp;[.I446]&amp;&quot; &quot;&amp;[.J446]&amp;&quot;, &quot;&amp;[.K4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7]&amp;&quot;, &quot; &amp; [.H447]&amp;&quot;,  &quot;&amp;[.I447]&amp;&quot; &quot;&amp;[.J447]&amp;&quot;, &quot;&amp;[.K4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8]&amp;&quot;, &quot; &amp; [.H448]&amp;&quot;,  &quot;&amp;[.I448]&amp;&quot; &quot;&amp;[.J448]&amp;&quot;, &quot;&amp;[.K4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49]&amp;&quot;, &quot; &amp; [.H449]&amp;&quot;,  &quot;&amp;[.I449]&amp;&quot; &quot;&amp;[.J449]&amp;&quot;, &quot;&amp;[.K4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0]&amp;&quot;, &quot; &amp; [.H450]&amp;&quot;,  &quot;&amp;[.I450]&amp;&quot; &quot;&amp;[.J450]&amp;&quot;, &quot;&amp;[.K4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1]&amp;&quot;, &quot; &amp; [.H451]&amp;&quot;,  &quot;&amp;[.I451]&amp;&quot; &quot;&amp;[.J451]&amp;&quot;, &quot;&amp;[.K4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2]&amp;&quot;, &quot; &amp; [.H452]&amp;&quot;,  &quot;&amp;[.I452]&amp;&quot; &quot;&amp;[.J452]&amp;&quot;, &quot;&amp;[.K4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3]&amp;&quot;, &quot; &amp; [.H453]&amp;&quot;,  &quot;&amp;[.I453]&amp;&quot; &quot;&amp;[.J453]&amp;&quot;, &quot;&amp;[.K4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4]&amp;&quot;, &quot; &amp; [.H454]&amp;&quot;,  &quot;&amp;[.I454]&amp;&quot; &quot;&amp;[.J454]&amp;&quot;, &quot;&amp;[.K4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5]&amp;&quot;, &quot; &amp; [.H455]&amp;&quot;,  &quot;&amp;[.I455]&amp;&quot; &quot;&amp;[.J455]&amp;&quot;, &quot;&amp;[.K4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6]&amp;&quot;, &quot; &amp; [.H456]&amp;&quot;,  &quot;&amp;[.I456]&amp;&quot; &quot;&amp;[.J456]&amp;&quot;, &quot;&amp;[.K4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7]&amp;&quot;, &quot; &amp; [.H457]&amp;&quot;,  &quot;&amp;[.I457]&amp;&quot; &quot;&amp;[.J457]&amp;&quot;, &quot;&amp;[.K4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8]&amp;&quot;, &quot; &amp; [.H458]&amp;&quot;,  &quot;&amp;[.I458]&amp;&quot; &quot;&amp;[.J458]&amp;&quot;, &quot;&amp;[.K4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59]&amp;&quot;, &quot; &amp; [.H459]&amp;&quot;,  &quot;&amp;[.I459]&amp;&quot; &quot;&amp;[.J459]&amp;&quot;, &quot;&amp;[.K4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0]&amp;&quot;, &quot; &amp; [.H460]&amp;&quot;,  &quot;&amp;[.I460]&amp;&quot; &quot;&amp;[.J460]&amp;&quot;, &quot;&amp;[.K4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1]&amp;&quot;, &quot; &amp; [.H461]&amp;&quot;,  &quot;&amp;[.I461]&amp;&quot; &quot;&amp;[.J461]&amp;&quot;, &quot;&amp;[.K4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2]&amp;&quot;, &quot; &amp; [.H462]&amp;&quot;,  &quot;&amp;[.I462]&amp;&quot; &quot;&amp;[.J462]&amp;&quot;, &quot;&amp;[.K4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3]&amp;&quot;, &quot; &amp; [.H463]&amp;&quot;,  &quot;&amp;[.I463]&amp;&quot; &quot;&amp;[.J463]&amp;&quot;, &quot;&amp;[.K4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4]&amp;&quot;, &quot; &amp; [.H464]&amp;&quot;,  &quot;&amp;[.I464]&amp;&quot; &quot;&amp;[.J464]&amp;&quot;, &quot;&amp;[.K4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5]&amp;&quot;, &quot; &amp; [.H465]&amp;&quot;,  &quot;&amp;[.I465]&amp;&quot; &quot;&amp;[.J465]&amp;&quot;, &quot;&amp;[.K4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6]&amp;&quot;, &quot; &amp; [.H466]&amp;&quot;,  &quot;&amp;[.I466]&amp;&quot; &quot;&amp;[.J466]&amp;&quot;, &quot;&amp;[.K4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7]&amp;&quot;, &quot; &amp; [.H467]&amp;&quot;,  &quot;&amp;[.I467]&amp;&quot; &quot;&amp;[.J467]&amp;&quot;, &quot;&amp;[.K4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8]&amp;&quot;, &quot; &amp; [.H468]&amp;&quot;,  &quot;&amp;[.I468]&amp;&quot; &quot;&amp;[.J468]&amp;&quot;, &quot;&amp;[.K4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69]&amp;&quot;, &quot; &amp; [.H469]&amp;&quot;,  &quot;&amp;[.I469]&amp;&quot; &quot;&amp;[.J469]&amp;&quot;, &quot;&amp;[.K4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0]&amp;&quot;, &quot; &amp; [.H470]&amp;&quot;,  &quot;&amp;[.I470]&amp;&quot; &quot;&amp;[.J470]&amp;&quot;, &quot;&amp;[.K4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1]&amp;&quot;, &quot; &amp; [.H471]&amp;&quot;,  &quot;&amp;[.I471]&amp;&quot; &quot;&amp;[.J471]&amp;&quot;, &quot;&amp;[.K4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2]&amp;&quot;, &quot; &amp; [.H472]&amp;&quot;,  &quot;&amp;[.I472]&amp;&quot; &quot;&amp;[.J472]&amp;&quot;, &quot;&amp;[.K4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3]&amp;&quot;, &quot; &amp; [.H473]&amp;&quot;,  &quot;&amp;[.I473]&amp;&quot; &quot;&amp;[.J473]&amp;&quot;, &quot;&amp;[.K4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4]&amp;&quot;, &quot; &amp; [.H474]&amp;&quot;,  &quot;&amp;[.I474]&amp;&quot; &quot;&amp;[.J474]&amp;&quot;, &quot;&amp;[.K4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5]&amp;&quot;, &quot; &amp; [.H475]&amp;&quot;,  &quot;&amp;[.I475]&amp;&quot; &quot;&amp;[.J475]&amp;&quot;, &quot;&amp;[.K4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6]&amp;&quot;, &quot; &amp; [.H476]&amp;&quot;,  &quot;&amp;[.I476]&amp;&quot; &quot;&amp;[.J476]&amp;&quot;, &quot;&amp;[.K4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7]&amp;&quot;, &quot; &amp; [.H477]&amp;&quot;,  &quot;&amp;[.I477]&amp;&quot; &quot;&amp;[.J477]&amp;&quot;, &quot;&amp;[.K4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8]&amp;&quot;, &quot; &amp; [.H478]&amp;&quot;,  &quot;&amp;[.I478]&amp;&quot; &quot;&amp;[.J478]&amp;&quot;, &quot;&amp;[.K4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79]&amp;&quot;, &quot; &amp; [.H479]&amp;&quot;,  &quot;&amp;[.I479]&amp;&quot; &quot;&amp;[.J479]&amp;&quot;, &quot;&amp;[.K4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0]&amp;&quot;, &quot; &amp; [.H480]&amp;&quot;,  &quot;&amp;[.I480]&amp;&quot; &quot;&amp;[.J480]&amp;&quot;, &quot;&amp;[.K4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1]&amp;&quot;, &quot; &amp; [.H481]&amp;&quot;,  &quot;&amp;[.I481]&amp;&quot; &quot;&amp;[.J481]&amp;&quot;, &quot;&amp;[.K4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2]&amp;&quot;, &quot; &amp; [.H482]&amp;&quot;,  &quot;&amp;[.I482]&amp;&quot; &quot;&amp;[.J482]&amp;&quot;, &quot;&amp;[.K4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3]&amp;&quot;, &quot; &amp; [.H483]&amp;&quot;,  &quot;&amp;[.I483]&amp;&quot; &quot;&amp;[.J483]&amp;&quot;, &quot;&amp;[.K4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4]&amp;&quot;, &quot; &amp; [.H484]&amp;&quot;,  &quot;&amp;[.I484]&amp;&quot; &quot;&amp;[.J484]&amp;&quot;, &quot;&amp;[.K4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5]&amp;&quot;, &quot; &amp; [.H485]&amp;&quot;,  &quot;&amp;[.I485]&amp;&quot; &quot;&amp;[.J485]&amp;&quot;, &quot;&amp;[.K4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6]&amp;&quot;, &quot; &amp; [.H486]&amp;&quot;,  &quot;&amp;[.I486]&amp;&quot; &quot;&amp;[.J486]&amp;&quot;, &quot;&amp;[.K4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7]&amp;&quot;, &quot; &amp; [.H487]&amp;&quot;,  &quot;&amp;[.I487]&amp;&quot; &quot;&amp;[.J487]&amp;&quot;, &quot;&amp;[.K4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8]&amp;&quot;, &quot; &amp; [.H488]&amp;&quot;,  &quot;&amp;[.I488]&amp;&quot; &quot;&amp;[.J488]&amp;&quot;, &quot;&amp;[.K4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89]&amp;&quot;, &quot; &amp; [.H489]&amp;&quot;,  &quot;&amp;[.I489]&amp;&quot; &quot;&amp;[.J489]&amp;&quot;, &quot;&amp;[.K4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0]&amp;&quot;, &quot; &amp; [.H490]&amp;&quot;,  &quot;&amp;[.I490]&amp;&quot; &quot;&amp;[.J490]&amp;&quot;, &quot;&amp;[.K4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1]&amp;&quot;, &quot; &amp; [.H491]&amp;&quot;,  &quot;&amp;[.I491]&amp;&quot; &quot;&amp;[.J491]&amp;&quot;, &quot;&amp;[.K4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2]&amp;&quot;, &quot; &amp; [.H492]&amp;&quot;,  &quot;&amp;[.I492]&amp;&quot; &quot;&amp;[.J492]&amp;&quot;, &quot;&amp;[.K4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3]&amp;&quot;, &quot; &amp; [.H493]&amp;&quot;,  &quot;&amp;[.I493]&amp;&quot; &quot;&amp;[.J493]&amp;&quot;, &quot;&amp;[.K4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4]&amp;&quot;, &quot; &amp; [.H494]&amp;&quot;,  &quot;&amp;[.I494]&amp;&quot; &quot;&amp;[.J494]&amp;&quot;, &quot;&amp;[.K4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5]&amp;&quot;, &quot; &amp; [.H495]&amp;&quot;,  &quot;&amp;[.I495]&amp;&quot; &quot;&amp;[.J495]&amp;&quot;, &quot;&amp;[.K4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6]&amp;&quot;, &quot; &amp; [.H496]&amp;&quot;,  &quot;&amp;[.I496]&amp;&quot; &quot;&amp;[.J496]&amp;&quot;, &quot;&amp;[.K4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7]&amp;&quot;, &quot; &amp; [.H497]&amp;&quot;,  &quot;&amp;[.I497]&amp;&quot; &quot;&amp;[.J497]&amp;&quot;, &quot;&amp;[.K4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8]&amp;&quot;, &quot; &amp; [.H498]&amp;&quot;,  &quot;&amp;[.I498]&amp;&quot; &quot;&amp;[.J498]&amp;&quot;, &quot;&amp;[.K4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499]&amp;&quot;, &quot; &amp; [.H499]&amp;&quot;,  &quot;&amp;[.I499]&amp;&quot; &quot;&amp;[.J499]&amp;&quot;, &quot;&amp;[.K4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0]&amp;&quot;, &quot; &amp; [.H500]&amp;&quot;,  &quot;&amp;[.I500]&amp;&quot; &quot;&amp;[.J500]&amp;&quot;, &quot;&amp;[.K5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1]&amp;&quot;, &quot; &amp; [.H501]&amp;&quot;,  &quot;&amp;[.I501]&amp;&quot; &quot;&amp;[.J501]&amp;&quot;, &quot;&amp;[.K5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2]&amp;&quot;, &quot; &amp; [.H502]&amp;&quot;,  &quot;&amp;[.I502]&amp;&quot; &quot;&amp;[.J502]&amp;&quot;, &quot;&amp;[.K5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3]&amp;&quot;, &quot; &amp; [.H503]&amp;&quot;,  &quot;&amp;[.I503]&amp;&quot; &quot;&amp;[.J503]&amp;&quot;, &quot;&amp;[.K5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4]&amp;&quot;, &quot; &amp; [.H504]&amp;&quot;,  &quot;&amp;[.I504]&amp;&quot; &quot;&amp;[.J504]&amp;&quot;, &quot;&amp;[.K5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5]&amp;&quot;, &quot; &amp; [.H505]&amp;&quot;,  &quot;&amp;[.I505]&amp;&quot; &quot;&amp;[.J505]&amp;&quot;, &quot;&amp;[.K5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6]&amp;&quot;, &quot; &amp; [.H506]&amp;&quot;,  &quot;&amp;[.I506]&amp;&quot; &quot;&amp;[.J506]&amp;&quot;, &quot;&amp;[.K5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7]&amp;&quot;, &quot; &amp; [.H507]&amp;&quot;,  &quot;&amp;[.I507]&amp;&quot; &quot;&amp;[.J507]&amp;&quot;, &quot;&amp;[.K5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8]&amp;&quot;, &quot; &amp; [.H508]&amp;&quot;,  &quot;&amp;[.I508]&amp;&quot; &quot;&amp;[.J508]&amp;&quot;, &quot;&amp;[.K5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09]&amp;&quot;, &quot; &amp; [.H509]&amp;&quot;,  &quot;&amp;[.I509]&amp;&quot; &quot;&amp;[.J509]&amp;&quot;, &quot;&amp;[.K5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0]&amp;&quot;, &quot; &amp; [.H510]&amp;&quot;,  &quot;&amp;[.I510]&amp;&quot; &quot;&amp;[.J510]&amp;&quot;, &quot;&amp;[.K5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1]&amp;&quot;, &quot; &amp; [.H511]&amp;&quot;,  &quot;&amp;[.I511]&amp;&quot; &quot;&amp;[.J511]&amp;&quot;, &quot;&amp;[.K5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2]&amp;&quot;, &quot; &amp; [.H512]&amp;&quot;,  &quot;&amp;[.I512]&amp;&quot; &quot;&amp;[.J512]&amp;&quot;, &quot;&amp;[.K5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3]&amp;&quot;, &quot; &amp; [.H513]&amp;&quot;,  &quot;&amp;[.I513]&amp;&quot; &quot;&amp;[.J513]&amp;&quot;, &quot;&amp;[.K5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4]&amp;&quot;, &quot; &amp; [.H514]&amp;&quot;,  &quot;&amp;[.I514]&amp;&quot; &quot;&amp;[.J514]&amp;&quot;, &quot;&amp;[.K5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5]&amp;&quot;, &quot; &amp; [.H515]&amp;&quot;,  &quot;&amp;[.I515]&amp;&quot; &quot;&amp;[.J515]&amp;&quot;, &quot;&amp;[.K5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6]&amp;&quot;, &quot; &amp; [.H516]&amp;&quot;,  &quot;&amp;[.I516]&amp;&quot; &quot;&amp;[.J516]&amp;&quot;, &quot;&amp;[.K5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7]&amp;&quot;, &quot; &amp; [.H517]&amp;&quot;,  &quot;&amp;[.I517]&amp;&quot; &quot;&amp;[.J517]&amp;&quot;, &quot;&amp;[.K5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8]&amp;&quot;, &quot; &amp; [.H518]&amp;&quot;,  &quot;&amp;[.I518]&amp;&quot; &quot;&amp;[.J518]&amp;&quot;, &quot;&amp;[.K5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19]&amp;&quot;, &quot; &amp; [.H519]&amp;&quot;,  &quot;&amp;[.I519]&amp;&quot; &quot;&amp;[.J519]&amp;&quot;, &quot;&amp;[.K5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0]&amp;&quot;, &quot; &amp; [.H520]&amp;&quot;,  &quot;&amp;[.I520]&amp;&quot; &quot;&amp;[.J520]&amp;&quot;, &quot;&amp;[.K5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1]&amp;&quot;, &quot; &amp; [.H521]&amp;&quot;,  &quot;&amp;[.I521]&amp;&quot; &quot;&amp;[.J521]&amp;&quot;, &quot;&amp;[.K5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2]&amp;&quot;, &quot; &amp; [.H522]&amp;&quot;,  &quot;&amp;[.I522]&amp;&quot; &quot;&amp;[.J522]&amp;&quot;, &quot;&amp;[.K5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3]&amp;&quot;, &quot; &amp; [.H523]&amp;&quot;,  &quot;&amp;[.I523]&amp;&quot; &quot;&amp;[.J523]&amp;&quot;, &quot;&amp;[.K5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4]&amp;&quot;, &quot; &amp; [.H524]&amp;&quot;,  &quot;&amp;[.I524]&amp;&quot; &quot;&amp;[.J524]&amp;&quot;, &quot;&amp;[.K5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5]&amp;&quot;, &quot; &amp; [.H525]&amp;&quot;,  &quot;&amp;[.I525]&amp;&quot; &quot;&amp;[.J525]&amp;&quot;, &quot;&amp;[.K5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6]&amp;&quot;, &quot; &amp; [.H526]&amp;&quot;,  &quot;&amp;[.I526]&amp;&quot; &quot;&amp;[.J526]&amp;&quot;, &quot;&amp;[.K5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7]&amp;&quot;, &quot; &amp; [.H527]&amp;&quot;,  &quot;&amp;[.I527]&amp;&quot; &quot;&amp;[.J527]&amp;&quot;, &quot;&amp;[.K5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8]&amp;&quot;, &quot; &amp; [.H528]&amp;&quot;,  &quot;&amp;[.I528]&amp;&quot; &quot;&amp;[.J528]&amp;&quot;, &quot;&amp;[.K5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29]&amp;&quot;, &quot; &amp; [.H529]&amp;&quot;,  &quot;&amp;[.I529]&amp;&quot; &quot;&amp;[.J529]&amp;&quot;, &quot;&amp;[.K5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0]&amp;&quot;, &quot; &amp; [.H530]&amp;&quot;,  &quot;&amp;[.I530]&amp;&quot; &quot;&amp;[.J530]&amp;&quot;, &quot;&amp;[.K5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1]&amp;&quot;, &quot; &amp; [.H531]&amp;&quot;,  &quot;&amp;[.I531]&amp;&quot; &quot;&amp;[.J531]&amp;&quot;, &quot;&amp;[.K5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2]&amp;&quot;, &quot; &amp; [.H532]&amp;&quot;,  &quot;&amp;[.I532]&amp;&quot; &quot;&amp;[.J532]&amp;&quot;, &quot;&amp;[.K5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3]&amp;&quot;, &quot; &amp; [.H533]&amp;&quot;,  &quot;&amp;[.I533]&amp;&quot; &quot;&amp;[.J533]&amp;&quot;, &quot;&amp;[.K5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4]&amp;&quot;, &quot; &amp; [.H534]&amp;&quot;,  &quot;&amp;[.I534]&amp;&quot; &quot;&amp;[.J534]&amp;&quot;, &quot;&amp;[.K5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5]&amp;&quot;, &quot; &amp; [.H535]&amp;&quot;,  &quot;&amp;[.I535]&amp;&quot; &quot;&amp;[.J535]&amp;&quot;, &quot;&amp;[.K5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6]&amp;&quot;, &quot; &amp; [.H536]&amp;&quot;,  &quot;&amp;[.I536]&amp;&quot; &quot;&amp;[.J536]&amp;&quot;, &quot;&amp;[.K5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7]&amp;&quot;, &quot; &amp; [.H537]&amp;&quot;,  &quot;&amp;[.I537]&amp;&quot; &quot;&amp;[.J537]&amp;&quot;, &quot;&amp;[.K5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8]&amp;&quot;, &quot; &amp; [.H538]&amp;&quot;,  &quot;&amp;[.I538]&amp;&quot; &quot;&amp;[.J538]&amp;&quot;, &quot;&amp;[.K5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39]&amp;&quot;, &quot; &amp; [.H539]&amp;&quot;,  &quot;&amp;[.I539]&amp;&quot; &quot;&amp;[.J539]&amp;&quot;, &quot;&amp;[.K5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0]&amp;&quot;, &quot; &amp; [.H540]&amp;&quot;,  &quot;&amp;[.I540]&amp;&quot; &quot;&amp;[.J540]&amp;&quot;, &quot;&amp;[.K5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1]&amp;&quot;, &quot; &amp; [.H541]&amp;&quot;,  &quot;&amp;[.I541]&amp;&quot; &quot;&amp;[.J541]&amp;&quot;, &quot;&amp;[.K5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2]&amp;&quot;, &quot; &amp; [.H542]&amp;&quot;,  &quot;&amp;[.I542]&amp;&quot; &quot;&amp;[.J542]&amp;&quot;, &quot;&amp;[.K5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3]&amp;&quot;, &quot; &amp; [.H543]&amp;&quot;,  &quot;&amp;[.I543]&amp;&quot; &quot;&amp;[.J543]&amp;&quot;, &quot;&amp;[.K5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4]&amp;&quot;, &quot; &amp; [.H544]&amp;&quot;,  &quot;&amp;[.I544]&amp;&quot; &quot;&amp;[.J544]&amp;&quot;, &quot;&amp;[.K5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5]&amp;&quot;, &quot; &amp; [.H545]&amp;&quot;,  &quot;&amp;[.I545]&amp;&quot; &quot;&amp;[.J545]&amp;&quot;, &quot;&amp;[.K5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6]&amp;&quot;, &quot; &amp; [.H546]&amp;&quot;,  &quot;&amp;[.I546]&amp;&quot; &quot;&amp;[.J546]&amp;&quot;, &quot;&amp;[.K5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7]&amp;&quot;, &quot; &amp; [.H547]&amp;&quot;,  &quot;&amp;[.I547]&amp;&quot; &quot;&amp;[.J547]&amp;&quot;, &quot;&amp;[.K5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8]&amp;&quot;, &quot; &amp; [.H548]&amp;&quot;,  &quot;&amp;[.I548]&amp;&quot; &quot;&amp;[.J548]&amp;&quot;, &quot;&amp;[.K5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49]&amp;&quot;, &quot; &amp; [.H549]&amp;&quot;,  &quot;&amp;[.I549]&amp;&quot; &quot;&amp;[.J549]&amp;&quot;, &quot;&amp;[.K5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0]&amp;&quot;, &quot; &amp; [.H550]&amp;&quot;,  &quot;&amp;[.I550]&amp;&quot; &quot;&amp;[.J550]&amp;&quot;, &quot;&amp;[.K5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1]&amp;&quot;, &quot; &amp; [.H551]&amp;&quot;,  &quot;&amp;[.I551]&amp;&quot; &quot;&amp;[.J551]&amp;&quot;, &quot;&amp;[.K5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2]&amp;&quot;, &quot; &amp; [.H552]&amp;&quot;,  &quot;&amp;[.I552]&amp;&quot; &quot;&amp;[.J552]&amp;&quot;, &quot;&amp;[.K5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3]&amp;&quot;, &quot; &amp; [.H553]&amp;&quot;,  &quot;&amp;[.I553]&amp;&quot; &quot;&amp;[.J553]&amp;&quot;, &quot;&amp;[.K5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4]&amp;&quot;, &quot; &amp; [.H554]&amp;&quot;,  &quot;&amp;[.I554]&amp;&quot; &quot;&amp;[.J554]&amp;&quot;, &quot;&amp;[.K5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5]&amp;&quot;, &quot; &amp; [.H555]&amp;&quot;,  &quot;&amp;[.I555]&amp;&quot; &quot;&amp;[.J555]&amp;&quot;, &quot;&amp;[.K5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6]&amp;&quot;, &quot; &amp; [.H556]&amp;&quot;,  &quot;&amp;[.I556]&amp;&quot; &quot;&amp;[.J556]&amp;&quot;, &quot;&amp;[.K5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7]&amp;&quot;, &quot; &amp; [.H557]&amp;&quot;,  &quot;&amp;[.I557]&amp;&quot; &quot;&amp;[.J557]&amp;&quot;, &quot;&amp;[.K5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8]&amp;&quot;, &quot; &amp; [.H558]&amp;&quot;,  &quot;&amp;[.I558]&amp;&quot; &quot;&amp;[.J558]&amp;&quot;, &quot;&amp;[.K5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59]&amp;&quot;, &quot; &amp; [.H559]&amp;&quot;,  &quot;&amp;[.I559]&amp;&quot; &quot;&amp;[.J559]&amp;&quot;, &quot;&amp;[.K5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0]&amp;&quot;, &quot; &amp; [.H560]&amp;&quot;,  &quot;&amp;[.I560]&amp;&quot; &quot;&amp;[.J560]&amp;&quot;, &quot;&amp;[.K5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1]&amp;&quot;, &quot; &amp; [.H561]&amp;&quot;,  &quot;&amp;[.I561]&amp;&quot; &quot;&amp;[.J561]&amp;&quot;, &quot;&amp;[.K5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2]&amp;&quot;, &quot; &amp; [.H562]&amp;&quot;,  &quot;&amp;[.I562]&amp;&quot; &quot;&amp;[.J562]&amp;&quot;, &quot;&amp;[.K5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3]&amp;&quot;, &quot; &amp; [.H563]&amp;&quot;,  &quot;&amp;[.I563]&amp;&quot; &quot;&amp;[.J563]&amp;&quot;, &quot;&amp;[.K5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4]&amp;&quot;, &quot; &amp; [.H564]&amp;&quot;,  &quot;&amp;[.I564]&amp;&quot; &quot;&amp;[.J564]&amp;&quot;, &quot;&amp;[.K5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5]&amp;&quot;, &quot; &amp; [.H565]&amp;&quot;,  &quot;&amp;[.I565]&amp;&quot; &quot;&amp;[.J565]&amp;&quot;, &quot;&amp;[.K5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6]&amp;&quot;, &quot; &amp; [.H566]&amp;&quot;,  &quot;&amp;[.I566]&amp;&quot; &quot;&amp;[.J566]&amp;&quot;, &quot;&amp;[.K5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7]&amp;&quot;, &quot; &amp; [.H567]&amp;&quot;,  &quot;&amp;[.I567]&amp;&quot; &quot;&amp;[.J567]&amp;&quot;, &quot;&amp;[.K5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8]&amp;&quot;, &quot; &amp; [.H568]&amp;&quot;,  &quot;&amp;[.I568]&amp;&quot; &quot;&amp;[.J568]&amp;&quot;, &quot;&amp;[.K5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69]&amp;&quot;, &quot; &amp; [.H569]&amp;&quot;,  &quot;&amp;[.I569]&amp;&quot; &quot;&amp;[.J569]&amp;&quot;, &quot;&amp;[.K5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0]&amp;&quot;, &quot; &amp; [.H570]&amp;&quot;,  &quot;&amp;[.I570]&amp;&quot; &quot;&amp;[.J570]&amp;&quot;, &quot;&amp;[.K5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1]&amp;&quot;, &quot; &amp; [.H571]&amp;&quot;,  &quot;&amp;[.I571]&amp;&quot; &quot;&amp;[.J571]&amp;&quot;, &quot;&amp;[.K5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2]&amp;&quot;, &quot; &amp; [.H572]&amp;&quot;,  &quot;&amp;[.I572]&amp;&quot; &quot;&amp;[.J572]&amp;&quot;, &quot;&amp;[.K5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3]&amp;&quot;, &quot; &amp; [.H573]&amp;&quot;,  &quot;&amp;[.I573]&amp;&quot; &quot;&amp;[.J573]&amp;&quot;, &quot;&amp;[.K5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4]&amp;&quot;, &quot; &amp; [.H574]&amp;&quot;,  &quot;&amp;[.I574]&amp;&quot; &quot;&amp;[.J574]&amp;&quot;, &quot;&amp;[.K5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5]&amp;&quot;, &quot; &amp; [.H575]&amp;&quot;,  &quot;&amp;[.I575]&amp;&quot; &quot;&amp;[.J575]&amp;&quot;, &quot;&amp;[.K5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6]&amp;&quot;, &quot; &amp; [.H576]&amp;&quot;,  &quot;&amp;[.I576]&amp;&quot; &quot;&amp;[.J576]&amp;&quot;, &quot;&amp;[.K5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7]&amp;&quot;, &quot; &amp; [.H577]&amp;&quot;,  &quot;&amp;[.I577]&amp;&quot; &quot;&amp;[.J577]&amp;&quot;, &quot;&amp;[.K5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8]&amp;&quot;, &quot; &amp; [.H578]&amp;&quot;,  &quot;&amp;[.I578]&amp;&quot; &quot;&amp;[.J578]&amp;&quot;, &quot;&amp;[.K5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79]&amp;&quot;, &quot; &amp; [.H579]&amp;&quot;,  &quot;&amp;[.I579]&amp;&quot; &quot;&amp;[.J579]&amp;&quot;, &quot;&amp;[.K5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0]&amp;&quot;, &quot; &amp; [.H580]&amp;&quot;,  &quot;&amp;[.I580]&amp;&quot; &quot;&amp;[.J580]&amp;&quot;, &quot;&amp;[.K5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1]&amp;&quot;, &quot; &amp; [.H581]&amp;&quot;,  &quot;&amp;[.I581]&amp;&quot; &quot;&amp;[.J581]&amp;&quot;, &quot;&amp;[.K5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2]&amp;&quot;, &quot; &amp; [.H582]&amp;&quot;,  &quot;&amp;[.I582]&amp;&quot; &quot;&amp;[.J582]&amp;&quot;, &quot;&amp;[.K5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3]&amp;&quot;, &quot; &amp; [.H583]&amp;&quot;,  &quot;&amp;[.I583]&amp;&quot; &quot;&amp;[.J583]&amp;&quot;, &quot;&amp;[.K5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4]&amp;&quot;, &quot; &amp; [.H584]&amp;&quot;,  &quot;&amp;[.I584]&amp;&quot; &quot;&amp;[.J584]&amp;&quot;, &quot;&amp;[.K5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5]&amp;&quot;, &quot; &amp; [.H585]&amp;&quot;,  &quot;&amp;[.I585]&amp;&quot; &quot;&amp;[.J585]&amp;&quot;, &quot;&amp;[.K5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6]&amp;&quot;, &quot; &amp; [.H586]&amp;&quot;,  &quot;&amp;[.I586]&amp;&quot; &quot;&amp;[.J586]&amp;&quot;, &quot;&amp;[.K5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7]&amp;&quot;, &quot; &amp; [.H587]&amp;&quot;,  &quot;&amp;[.I587]&amp;&quot; &quot;&amp;[.J587]&amp;&quot;, &quot;&amp;[.K5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8]&amp;&quot;, &quot; &amp; [.H588]&amp;&quot;,  &quot;&amp;[.I588]&amp;&quot; &quot;&amp;[.J588]&amp;&quot;, &quot;&amp;[.K5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89]&amp;&quot;, &quot; &amp; [.H589]&amp;&quot;,  &quot;&amp;[.I589]&amp;&quot; &quot;&amp;[.J589]&amp;&quot;, &quot;&amp;[.K5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0]&amp;&quot;, &quot; &amp; [.H590]&amp;&quot;,  &quot;&amp;[.I590]&amp;&quot; &quot;&amp;[.J590]&amp;&quot;, &quot;&amp;[.K5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1]&amp;&quot;, &quot; &amp; [.H591]&amp;&quot;,  &quot;&amp;[.I591]&amp;&quot; &quot;&amp;[.J591]&amp;&quot;, &quot;&amp;[.K5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2]&amp;&quot;, &quot; &amp; [.H592]&amp;&quot;,  &quot;&amp;[.I592]&amp;&quot; &quot;&amp;[.J592]&amp;&quot;, &quot;&amp;[.K5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3]&amp;&quot;, &quot; &amp; [.H593]&amp;&quot;,  &quot;&amp;[.I593]&amp;&quot; &quot;&amp;[.J593]&amp;&quot;, &quot;&amp;[.K5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4]&amp;&quot;, &quot; &amp; [.H594]&amp;&quot;,  &quot;&amp;[.I594]&amp;&quot; &quot;&amp;[.J594]&amp;&quot;, &quot;&amp;[.K5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5]&amp;&quot;, &quot; &amp; [.H595]&amp;&quot;,  &quot;&amp;[.I595]&amp;&quot; &quot;&amp;[.J595]&amp;&quot;, &quot;&amp;[.K5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6]&amp;&quot;, &quot; &amp; [.H596]&amp;&quot;,  &quot;&amp;[.I596]&amp;&quot; &quot;&amp;[.J596]&amp;&quot;, &quot;&amp;[.K5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7]&amp;&quot;, &quot; &amp; [.H597]&amp;&quot;,  &quot;&amp;[.I597]&amp;&quot; &quot;&amp;[.J597]&amp;&quot;, &quot;&amp;[.K5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8]&amp;&quot;, &quot; &amp; [.H598]&amp;&quot;,  &quot;&amp;[.I598]&amp;&quot; &quot;&amp;[.J598]&amp;&quot;, &quot;&amp;[.K5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599]&amp;&quot;, &quot; &amp; [.H599]&amp;&quot;,  &quot;&amp;[.I599]&amp;&quot; &quot;&amp;[.J599]&amp;&quot;, &quot;&amp;[.K5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0]&amp;&quot;, &quot; &amp; [.H600]&amp;&quot;,  &quot;&amp;[.I600]&amp;&quot; &quot;&amp;[.J600]&amp;&quot;, &quot;&amp;[.K6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1]&amp;&quot;, &quot; &amp; [.H601]&amp;&quot;,  &quot;&amp;[.I601]&amp;&quot; &quot;&amp;[.J601]&amp;&quot;, &quot;&amp;[.K6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2]&amp;&quot;, &quot; &amp; [.H602]&amp;&quot;,  &quot;&amp;[.I602]&amp;&quot; &quot;&amp;[.J602]&amp;&quot;, &quot;&amp;[.K6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3]&amp;&quot;, &quot; &amp; [.H603]&amp;&quot;,  &quot;&amp;[.I603]&amp;&quot; &quot;&amp;[.J603]&amp;&quot;, &quot;&amp;[.K6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4]&amp;&quot;, &quot; &amp; [.H604]&amp;&quot;,  &quot;&amp;[.I604]&amp;&quot; &quot;&amp;[.J604]&amp;&quot;, &quot;&amp;[.K6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5]&amp;&quot;, &quot; &amp; [.H605]&amp;&quot;,  &quot;&amp;[.I605]&amp;&quot; &quot;&amp;[.J605]&amp;&quot;, &quot;&amp;[.K6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6]&amp;&quot;, &quot; &amp; [.H606]&amp;&quot;,  &quot;&amp;[.I606]&amp;&quot; &quot;&amp;[.J606]&amp;&quot;, &quot;&amp;[.K6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7]&amp;&quot;, &quot; &amp; [.H607]&amp;&quot;,  &quot;&amp;[.I607]&amp;&quot; &quot;&amp;[.J607]&amp;&quot;, &quot;&amp;[.K6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8]&amp;&quot;, &quot; &amp; [.H608]&amp;&quot;,  &quot;&amp;[.I608]&amp;&quot; &quot;&amp;[.J608]&amp;&quot;, &quot;&amp;[.K6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09]&amp;&quot;, &quot; &amp; [.H609]&amp;&quot;,  &quot;&amp;[.I609]&amp;&quot; &quot;&amp;[.J609]&amp;&quot;, &quot;&amp;[.K6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0]&amp;&quot;, &quot; &amp; [.H610]&amp;&quot;,  &quot;&amp;[.I610]&amp;&quot; &quot;&amp;[.J610]&amp;&quot;, &quot;&amp;[.K6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1]&amp;&quot;, &quot; &amp; [.H611]&amp;&quot;,  &quot;&amp;[.I611]&amp;&quot; &quot;&amp;[.J611]&amp;&quot;, &quot;&amp;[.K6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2]&amp;&quot;, &quot; &amp; [.H612]&amp;&quot;,  &quot;&amp;[.I612]&amp;&quot; &quot;&amp;[.J612]&amp;&quot;, &quot;&amp;[.K6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3]&amp;&quot;, &quot; &amp; [.H613]&amp;&quot;,  &quot;&amp;[.I613]&amp;&quot; &quot;&amp;[.J613]&amp;&quot;, &quot;&amp;[.K6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4]&amp;&quot;, &quot; &amp; [.H614]&amp;&quot;,  &quot;&amp;[.I614]&amp;&quot; &quot;&amp;[.J614]&amp;&quot;, &quot;&amp;[.K6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5]&amp;&quot;, &quot; &amp; [.H615]&amp;&quot;,  &quot;&amp;[.I615]&amp;&quot; &quot;&amp;[.J615]&amp;&quot;, &quot;&amp;[.K6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6]&amp;&quot;, &quot; &amp; [.H616]&amp;&quot;,  &quot;&amp;[.I616]&amp;&quot; &quot;&amp;[.J616]&amp;&quot;, &quot;&amp;[.K6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7]&amp;&quot;, &quot; &amp; [.H617]&amp;&quot;,  &quot;&amp;[.I617]&amp;&quot; &quot;&amp;[.J617]&amp;&quot;, &quot;&amp;[.K6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8]&amp;&quot;, &quot; &amp; [.H618]&amp;&quot;,  &quot;&amp;[.I618]&amp;&quot; &quot;&amp;[.J618]&amp;&quot;, &quot;&amp;[.K6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19]&amp;&quot;, &quot; &amp; [.H619]&amp;&quot;,  &quot;&amp;[.I619]&amp;&quot; &quot;&amp;[.J619]&amp;&quot;, &quot;&amp;[.K6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0]&amp;&quot;, &quot; &amp; [.H620]&amp;&quot;,  &quot;&amp;[.I620]&amp;&quot; &quot;&amp;[.J620]&amp;&quot;, &quot;&amp;[.K6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1]&amp;&quot;, &quot; &amp; [.H621]&amp;&quot;,  &quot;&amp;[.I621]&amp;&quot; &quot;&amp;[.J621]&amp;&quot;, &quot;&amp;[.K6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2]&amp;&quot;, &quot; &amp; [.H622]&amp;&quot;,  &quot;&amp;[.I622]&amp;&quot; &quot;&amp;[.J622]&amp;&quot;, &quot;&amp;[.K6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3]&amp;&quot;, &quot; &amp; [.H623]&amp;&quot;,  &quot;&amp;[.I623]&amp;&quot; &quot;&amp;[.J623]&amp;&quot;, &quot;&amp;[.K6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4]&amp;&quot;, &quot; &amp; [.H624]&amp;&quot;,  &quot;&amp;[.I624]&amp;&quot; &quot;&amp;[.J624]&amp;&quot;, &quot;&amp;[.K6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5]&amp;&quot;, &quot; &amp; [.H625]&amp;&quot;,  &quot;&amp;[.I625]&amp;&quot; &quot;&amp;[.J625]&amp;&quot;, &quot;&amp;[.K6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6]&amp;&quot;, &quot; &amp; [.H626]&amp;&quot;,  &quot;&amp;[.I626]&amp;&quot; &quot;&amp;[.J626]&amp;&quot;, &quot;&amp;[.K6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7]&amp;&quot;, &quot; &amp; [.H627]&amp;&quot;,  &quot;&amp;[.I627]&amp;&quot; &quot;&amp;[.J627]&amp;&quot;, &quot;&amp;[.K6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8]&amp;&quot;, &quot; &amp; [.H628]&amp;&quot;,  &quot;&amp;[.I628]&amp;&quot; &quot;&amp;[.J628]&amp;&quot;, &quot;&amp;[.K6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29]&amp;&quot;, &quot; &amp; [.H629]&amp;&quot;,  &quot;&amp;[.I629]&amp;&quot; &quot;&amp;[.J629]&amp;&quot;, &quot;&amp;[.K6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0]&amp;&quot;, &quot; &amp; [.H630]&amp;&quot;,  &quot;&amp;[.I630]&amp;&quot; &quot;&amp;[.J630]&amp;&quot;, &quot;&amp;[.K6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1]&amp;&quot;, &quot; &amp; [.H631]&amp;&quot;,  &quot;&amp;[.I631]&amp;&quot; &quot;&amp;[.J631]&amp;&quot;, &quot;&amp;[.K6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2]&amp;&quot;, &quot; &amp; [.H632]&amp;&quot;,  &quot;&amp;[.I632]&amp;&quot; &quot;&amp;[.J632]&amp;&quot;, &quot;&amp;[.K6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3]&amp;&quot;, &quot; &amp; [.H633]&amp;&quot;,  &quot;&amp;[.I633]&amp;&quot; &quot;&amp;[.J633]&amp;&quot;, &quot;&amp;[.K6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4]&amp;&quot;, &quot; &amp; [.H634]&amp;&quot;,  &quot;&amp;[.I634]&amp;&quot; &quot;&amp;[.J634]&amp;&quot;, &quot;&amp;[.K6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5]&amp;&quot;, &quot; &amp; [.H635]&amp;&quot;,  &quot;&amp;[.I635]&amp;&quot; &quot;&amp;[.J635]&amp;&quot;, &quot;&amp;[.K6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6]&amp;&quot;, &quot; &amp; [.H636]&amp;&quot;,  &quot;&amp;[.I636]&amp;&quot; &quot;&amp;[.J636]&amp;&quot;, &quot;&amp;[.K6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7]&amp;&quot;, &quot; &amp; [.H637]&amp;&quot;,  &quot;&amp;[.I637]&amp;&quot; &quot;&amp;[.J637]&amp;&quot;, &quot;&amp;[.K6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8]&amp;&quot;, &quot; &amp; [.H638]&amp;&quot;,  &quot;&amp;[.I638]&amp;&quot; &quot;&amp;[.J638]&amp;&quot;, &quot;&amp;[.K6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39]&amp;&quot;, &quot; &amp; [.H639]&amp;&quot;,  &quot;&amp;[.I639]&amp;&quot; &quot;&amp;[.J639]&amp;&quot;, &quot;&amp;[.K6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0]&amp;&quot;, &quot; &amp; [.H640]&amp;&quot;,  &quot;&amp;[.I640]&amp;&quot; &quot;&amp;[.J640]&amp;&quot;, &quot;&amp;[.K6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1]&amp;&quot;, &quot; &amp; [.H641]&amp;&quot;,  &quot;&amp;[.I641]&amp;&quot; &quot;&amp;[.J641]&amp;&quot;, &quot;&amp;[.K6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2]&amp;&quot;, &quot; &amp; [.H642]&amp;&quot;,  &quot;&amp;[.I642]&amp;&quot; &quot;&amp;[.J642]&amp;&quot;, &quot;&amp;[.K6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3]&amp;&quot;, &quot; &amp; [.H643]&amp;&quot;,  &quot;&amp;[.I643]&amp;&quot; &quot;&amp;[.J643]&amp;&quot;, &quot;&amp;[.K6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4]&amp;&quot;, &quot; &amp; [.H644]&amp;&quot;,  &quot;&amp;[.I644]&amp;&quot; &quot;&amp;[.J644]&amp;&quot;, &quot;&amp;[.K6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5]&amp;&quot;, &quot; &amp; [.H645]&amp;&quot;,  &quot;&amp;[.I645]&amp;&quot; &quot;&amp;[.J645]&amp;&quot;, &quot;&amp;[.K6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6]&amp;&quot;, &quot; &amp; [.H646]&amp;&quot;,  &quot;&amp;[.I646]&amp;&quot; &quot;&amp;[.J646]&amp;&quot;, &quot;&amp;[.K6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7]&amp;&quot;, &quot; &amp; [.H647]&amp;&quot;,  &quot;&amp;[.I647]&amp;&quot; &quot;&amp;[.J647]&amp;&quot;, &quot;&amp;[.K6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8]&amp;&quot;, &quot; &amp; [.H648]&amp;&quot;,  &quot;&amp;[.I648]&amp;&quot; &quot;&amp;[.J648]&amp;&quot;, &quot;&amp;[.K6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49]&amp;&quot;, &quot; &amp; [.H649]&amp;&quot;,  &quot;&amp;[.I649]&amp;&quot; &quot;&amp;[.J649]&amp;&quot;, &quot;&amp;[.K6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0]&amp;&quot;, &quot; &amp; [.H650]&amp;&quot;,  &quot;&amp;[.I650]&amp;&quot; &quot;&amp;[.J650]&amp;&quot;, &quot;&amp;[.K6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1]&amp;&quot;, &quot; &amp; [.H651]&amp;&quot;,  &quot;&amp;[.I651]&amp;&quot; &quot;&amp;[.J651]&amp;&quot;, &quot;&amp;[.K6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2]&amp;&quot;, &quot; &amp; [.H652]&amp;&quot;,  &quot;&amp;[.I652]&amp;&quot; &quot;&amp;[.J652]&amp;&quot;, &quot;&amp;[.K6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3]&amp;&quot;, &quot; &amp; [.H653]&amp;&quot;,  &quot;&amp;[.I653]&amp;&quot; &quot;&amp;[.J653]&amp;&quot;, &quot;&amp;[.K6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4]&amp;&quot;, &quot; &amp; [.H654]&amp;&quot;,  &quot;&amp;[.I654]&amp;&quot; &quot;&amp;[.J654]&amp;&quot;, &quot;&amp;[.K6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5]&amp;&quot;, &quot; &amp; [.H655]&amp;&quot;,  &quot;&amp;[.I655]&amp;&quot; &quot;&amp;[.J655]&amp;&quot;, &quot;&amp;[.K6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6]&amp;&quot;, &quot; &amp; [.H656]&amp;&quot;,  &quot;&amp;[.I656]&amp;&quot; &quot;&amp;[.J656]&amp;&quot;, &quot;&amp;[.K6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7]&amp;&quot;, &quot; &amp; [.H657]&amp;&quot;,  &quot;&amp;[.I657]&amp;&quot; &quot;&amp;[.J657]&amp;&quot;, &quot;&amp;[.K6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8]&amp;&quot;, &quot; &amp; [.H658]&amp;&quot;,  &quot;&amp;[.I658]&amp;&quot; &quot;&amp;[.J658]&amp;&quot;, &quot;&amp;[.K6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59]&amp;&quot;, &quot; &amp; [.H659]&amp;&quot;,  &quot;&amp;[.I659]&amp;&quot; &quot;&amp;[.J659]&amp;&quot;, &quot;&amp;[.K6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0]&amp;&quot;, &quot; &amp; [.H660]&amp;&quot;,  &quot;&amp;[.I660]&amp;&quot; &quot;&amp;[.J660]&amp;&quot;, &quot;&amp;[.K6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1]&amp;&quot;, &quot; &amp; [.H661]&amp;&quot;,  &quot;&amp;[.I661]&amp;&quot; &quot;&amp;[.J661]&amp;&quot;, &quot;&amp;[.K6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2]&amp;&quot;, &quot; &amp; [.H662]&amp;&quot;,  &quot;&amp;[.I662]&amp;&quot; &quot;&amp;[.J662]&amp;&quot;, &quot;&amp;[.K6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3]&amp;&quot;, &quot; &amp; [.H663]&amp;&quot;,  &quot;&amp;[.I663]&amp;&quot; &quot;&amp;[.J663]&amp;&quot;, &quot;&amp;[.K6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4]&amp;&quot;, &quot; &amp; [.H664]&amp;&quot;,  &quot;&amp;[.I664]&amp;&quot; &quot;&amp;[.J664]&amp;&quot;, &quot;&amp;[.K6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5]&amp;&quot;, &quot; &amp; [.H665]&amp;&quot;,  &quot;&amp;[.I665]&amp;&quot; &quot;&amp;[.J665]&amp;&quot;, &quot;&amp;[.K6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6]&amp;&quot;, &quot; &amp; [.H666]&amp;&quot;,  &quot;&amp;[.I666]&amp;&quot; &quot;&amp;[.J666]&amp;&quot;, &quot;&amp;[.K6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7]&amp;&quot;, &quot; &amp; [.H667]&amp;&quot;,  &quot;&amp;[.I667]&amp;&quot; &quot;&amp;[.J667]&amp;&quot;, &quot;&amp;[.K6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8]&amp;&quot;, &quot; &amp; [.H668]&amp;&quot;,  &quot;&amp;[.I668]&amp;&quot; &quot;&amp;[.J668]&amp;&quot;, &quot;&amp;[.K6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69]&amp;&quot;, &quot; &amp; [.H669]&amp;&quot;,  &quot;&amp;[.I669]&amp;&quot; &quot;&amp;[.J669]&amp;&quot;, &quot;&amp;[.K6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0]&amp;&quot;, &quot; &amp; [.H670]&amp;&quot;,  &quot;&amp;[.I670]&amp;&quot; &quot;&amp;[.J670]&amp;&quot;, &quot;&amp;[.K6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1]&amp;&quot;, &quot; &amp; [.H671]&amp;&quot;,  &quot;&amp;[.I671]&amp;&quot; &quot;&amp;[.J671]&amp;&quot;, &quot;&amp;[.K6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2]&amp;&quot;, &quot; &amp; [.H672]&amp;&quot;,  &quot;&amp;[.I672]&amp;&quot; &quot;&amp;[.J672]&amp;&quot;, &quot;&amp;[.K6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3]&amp;&quot;, &quot; &amp; [.H673]&amp;&quot;,  &quot;&amp;[.I673]&amp;&quot; &quot;&amp;[.J673]&amp;&quot;, &quot;&amp;[.K6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4]&amp;&quot;, &quot; &amp; [.H674]&amp;&quot;,  &quot;&amp;[.I674]&amp;&quot; &quot;&amp;[.J674]&amp;&quot;, &quot;&amp;[.K6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5]&amp;&quot;, &quot; &amp; [.H675]&amp;&quot;,  &quot;&amp;[.I675]&amp;&quot; &quot;&amp;[.J675]&amp;&quot;, &quot;&amp;[.K6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6]&amp;&quot;, &quot; &amp; [.H676]&amp;&quot;,  &quot;&amp;[.I676]&amp;&quot; &quot;&amp;[.J676]&amp;&quot;, &quot;&amp;[.K6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7]&amp;&quot;, &quot; &amp; [.H677]&amp;&quot;,  &quot;&amp;[.I677]&amp;&quot; &quot;&amp;[.J677]&amp;&quot;, &quot;&amp;[.K6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8]&amp;&quot;, &quot; &amp; [.H678]&amp;&quot;,  &quot;&amp;[.I678]&amp;&quot; &quot;&amp;[.J678]&amp;&quot;, &quot;&amp;[.K6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79]&amp;&quot;, &quot; &amp; [.H679]&amp;&quot;,  &quot;&amp;[.I679]&amp;&quot; &quot;&amp;[.J679]&amp;&quot;, &quot;&amp;[.K6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0]&amp;&quot;, &quot; &amp; [.H680]&amp;&quot;,  &quot;&amp;[.I680]&amp;&quot; &quot;&amp;[.J680]&amp;&quot;, &quot;&amp;[.K6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1]&amp;&quot;, &quot; &amp; [.H681]&amp;&quot;,  &quot;&amp;[.I681]&amp;&quot; &quot;&amp;[.J681]&amp;&quot;, &quot;&amp;[.K6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2]&amp;&quot;, &quot; &amp; [.H682]&amp;&quot;,  &quot;&amp;[.I682]&amp;&quot; &quot;&amp;[.J682]&amp;&quot;, &quot;&amp;[.K6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3]&amp;&quot;, &quot; &amp; [.H683]&amp;&quot;,  &quot;&amp;[.I683]&amp;&quot; &quot;&amp;[.J683]&amp;&quot;, &quot;&amp;[.K6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4]&amp;&quot;, &quot; &amp; [.H684]&amp;&quot;,  &quot;&amp;[.I684]&amp;&quot; &quot;&amp;[.J684]&amp;&quot;, &quot;&amp;[.K6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5]&amp;&quot;, &quot; &amp; [.H685]&amp;&quot;,  &quot;&amp;[.I685]&amp;&quot; &quot;&amp;[.J685]&amp;&quot;, &quot;&amp;[.K6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6]&amp;&quot;, &quot; &amp; [.H686]&amp;&quot;,  &quot;&amp;[.I686]&amp;&quot; &quot;&amp;[.J686]&amp;&quot;, &quot;&amp;[.K6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7]&amp;&quot;, &quot; &amp; [.H687]&amp;&quot;,  &quot;&amp;[.I687]&amp;&quot; &quot;&amp;[.J687]&amp;&quot;, &quot;&amp;[.K6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8]&amp;&quot;, &quot; &amp; [.H688]&amp;&quot;,  &quot;&amp;[.I688]&amp;&quot; &quot;&amp;[.J688]&amp;&quot;, &quot;&amp;[.K6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89]&amp;&quot;, &quot; &amp; [.H689]&amp;&quot;,  &quot;&amp;[.I689]&amp;&quot; &quot;&amp;[.J689]&amp;&quot;, &quot;&amp;[.K6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0]&amp;&quot;, &quot; &amp; [.H690]&amp;&quot;,  &quot;&amp;[.I690]&amp;&quot; &quot;&amp;[.J690]&amp;&quot;, &quot;&amp;[.K6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1]&amp;&quot;, &quot; &amp; [.H691]&amp;&quot;,  &quot;&amp;[.I691]&amp;&quot; &quot;&amp;[.J691]&amp;&quot;, &quot;&amp;[.K6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2]&amp;&quot;, &quot; &amp; [.H692]&amp;&quot;,  &quot;&amp;[.I692]&amp;&quot; &quot;&amp;[.J692]&amp;&quot;, &quot;&amp;[.K6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3]&amp;&quot;, &quot; &amp; [.H693]&amp;&quot;,  &quot;&amp;[.I693]&amp;&quot; &quot;&amp;[.J693]&amp;&quot;, &quot;&amp;[.K6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4]&amp;&quot;, &quot; &amp; [.H694]&amp;&quot;,  &quot;&amp;[.I694]&amp;&quot; &quot;&amp;[.J694]&amp;&quot;, &quot;&amp;[.K6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5]&amp;&quot;, &quot; &amp; [.H695]&amp;&quot;,  &quot;&amp;[.I695]&amp;&quot; &quot;&amp;[.J695]&amp;&quot;, &quot;&amp;[.K6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6]&amp;&quot;, &quot; &amp; [.H696]&amp;&quot;,  &quot;&amp;[.I696]&amp;&quot; &quot;&amp;[.J696]&amp;&quot;, &quot;&amp;[.K6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7]&amp;&quot;, &quot; &amp; [.H697]&amp;&quot;,  &quot;&amp;[.I697]&amp;&quot; &quot;&amp;[.J697]&amp;&quot;, &quot;&amp;[.K6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8]&amp;&quot;, &quot; &amp; [.H698]&amp;&quot;,  &quot;&amp;[.I698]&amp;&quot; &quot;&amp;[.J698]&amp;&quot;, &quot;&amp;[.K6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699]&amp;&quot;, &quot; &amp; [.H699]&amp;&quot;,  &quot;&amp;[.I699]&amp;&quot; &quot;&amp;[.J699]&amp;&quot;, &quot;&amp;[.K6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0]&amp;&quot;, &quot; &amp; [.H700]&amp;&quot;,  &quot;&amp;[.I700]&amp;&quot; &quot;&amp;[.J700]&amp;&quot;, &quot;&amp;[.K7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1]&amp;&quot;, &quot; &amp; [.H701]&amp;&quot;,  &quot;&amp;[.I701]&amp;&quot; &quot;&amp;[.J701]&amp;&quot;, &quot;&amp;[.K7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2]&amp;&quot;, &quot; &amp; [.H702]&amp;&quot;,  &quot;&amp;[.I702]&amp;&quot; &quot;&amp;[.J702]&amp;&quot;, &quot;&amp;[.K7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3]&amp;&quot;, &quot; &amp; [.H703]&amp;&quot;,  &quot;&amp;[.I703]&amp;&quot; &quot;&amp;[.J703]&amp;&quot;, &quot;&amp;[.K7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4]&amp;&quot;, &quot; &amp; [.H704]&amp;&quot;,  &quot;&amp;[.I704]&amp;&quot; &quot;&amp;[.J704]&amp;&quot;, &quot;&amp;[.K7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5]&amp;&quot;, &quot; &amp; [.H705]&amp;&quot;,  &quot;&amp;[.I705]&amp;&quot; &quot;&amp;[.J705]&amp;&quot;, &quot;&amp;[.K7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6]&amp;&quot;, &quot; &amp; [.H706]&amp;&quot;,  &quot;&amp;[.I706]&amp;&quot; &quot;&amp;[.J706]&amp;&quot;, &quot;&amp;[.K7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7]&amp;&quot;, &quot; &amp; [.H707]&amp;&quot;,  &quot;&amp;[.I707]&amp;&quot; &quot;&amp;[.J707]&amp;&quot;, &quot;&amp;[.K7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8]&amp;&quot;, &quot; &amp; [.H708]&amp;&quot;,  &quot;&amp;[.I708]&amp;&quot; &quot;&amp;[.J708]&amp;&quot;, &quot;&amp;[.K7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09]&amp;&quot;, &quot; &amp; [.H709]&amp;&quot;,  &quot;&amp;[.I709]&amp;&quot; &quot;&amp;[.J709]&amp;&quot;, &quot;&amp;[.K7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0]&amp;&quot;, &quot; &amp; [.H710]&amp;&quot;,  &quot;&amp;[.I710]&amp;&quot; &quot;&amp;[.J710]&amp;&quot;, &quot;&amp;[.K7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1]&amp;&quot;, &quot; &amp; [.H711]&amp;&quot;,  &quot;&amp;[.I711]&amp;&quot; &quot;&amp;[.J711]&amp;&quot;, &quot;&amp;[.K7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2]&amp;&quot;, &quot; &amp; [.H712]&amp;&quot;,  &quot;&amp;[.I712]&amp;&quot; &quot;&amp;[.J712]&amp;&quot;, &quot;&amp;[.K7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3]&amp;&quot;, &quot; &amp; [.H713]&amp;&quot;,  &quot;&amp;[.I713]&amp;&quot; &quot;&amp;[.J713]&amp;&quot;, &quot;&amp;[.K7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4]&amp;&quot;, &quot; &amp; [.H714]&amp;&quot;,  &quot;&amp;[.I714]&amp;&quot; &quot;&amp;[.J714]&amp;&quot;, &quot;&amp;[.K7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5]&amp;&quot;, &quot; &amp; [.H715]&amp;&quot;,  &quot;&amp;[.I715]&amp;&quot; &quot;&amp;[.J715]&amp;&quot;, &quot;&amp;[.K7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6]&amp;&quot;, &quot; &amp; [.H716]&amp;&quot;,  &quot;&amp;[.I716]&amp;&quot; &quot;&amp;[.J716]&amp;&quot;, &quot;&amp;[.K7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7]&amp;&quot;, &quot; &amp; [.H717]&amp;&quot;,  &quot;&amp;[.I717]&amp;&quot; &quot;&amp;[.J717]&amp;&quot;, &quot;&amp;[.K7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8]&amp;&quot;, &quot; &amp; [.H718]&amp;&quot;,  &quot;&amp;[.I718]&amp;&quot; &quot;&amp;[.J718]&amp;&quot;, &quot;&amp;[.K7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19]&amp;&quot;, &quot; &amp; [.H719]&amp;&quot;,  &quot;&amp;[.I719]&amp;&quot; &quot;&amp;[.J719]&amp;&quot;, &quot;&amp;[.K7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0]&amp;&quot;, &quot; &amp; [.H720]&amp;&quot;,  &quot;&amp;[.I720]&amp;&quot; &quot;&amp;[.J720]&amp;&quot;, &quot;&amp;[.K7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1]&amp;&quot;, &quot; &amp; [.H721]&amp;&quot;,  &quot;&amp;[.I721]&amp;&quot; &quot;&amp;[.J721]&amp;&quot;, &quot;&amp;[.K7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2]&amp;&quot;, &quot; &amp; [.H722]&amp;&quot;,  &quot;&amp;[.I722]&amp;&quot; &quot;&amp;[.J722]&amp;&quot;, &quot;&amp;[.K7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3]&amp;&quot;, &quot; &amp; [.H723]&amp;&quot;,  &quot;&amp;[.I723]&amp;&quot; &quot;&amp;[.J723]&amp;&quot;, &quot;&amp;[.K7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4]&amp;&quot;, &quot; &amp; [.H724]&amp;&quot;,  &quot;&amp;[.I724]&amp;&quot; &quot;&amp;[.J724]&amp;&quot;, &quot;&amp;[.K7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5]&amp;&quot;, &quot; &amp; [.H725]&amp;&quot;,  &quot;&amp;[.I725]&amp;&quot; &quot;&amp;[.J725]&amp;&quot;, &quot;&amp;[.K7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6]&amp;&quot;, &quot; &amp; [.H726]&amp;&quot;,  &quot;&amp;[.I726]&amp;&quot; &quot;&amp;[.J726]&amp;&quot;, &quot;&amp;[.K7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7]&amp;&quot;, &quot; &amp; [.H727]&amp;&quot;,  &quot;&amp;[.I727]&amp;&quot; &quot;&amp;[.J727]&amp;&quot;, &quot;&amp;[.K7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8]&amp;&quot;, &quot; &amp; [.H728]&amp;&quot;,  &quot;&amp;[.I728]&amp;&quot; &quot;&amp;[.J728]&amp;&quot;, &quot;&amp;[.K7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29]&amp;&quot;, &quot; &amp; [.H729]&amp;&quot;,  &quot;&amp;[.I729]&amp;&quot; &quot;&amp;[.J729]&amp;&quot;, &quot;&amp;[.K7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0]&amp;&quot;, &quot; &amp; [.H730]&amp;&quot;,  &quot;&amp;[.I730]&amp;&quot; &quot;&amp;[.J730]&amp;&quot;, &quot;&amp;[.K7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1]&amp;&quot;, &quot; &amp; [.H731]&amp;&quot;,  &quot;&amp;[.I731]&amp;&quot; &quot;&amp;[.J731]&amp;&quot;, &quot;&amp;[.K7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2]&amp;&quot;, &quot; &amp; [.H732]&amp;&quot;,  &quot;&amp;[.I732]&amp;&quot; &quot;&amp;[.J732]&amp;&quot;, &quot;&amp;[.K7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3]&amp;&quot;, &quot; &amp; [.H733]&amp;&quot;,  &quot;&amp;[.I733]&amp;&quot; &quot;&amp;[.J733]&amp;&quot;, &quot;&amp;[.K7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4]&amp;&quot;, &quot; &amp; [.H734]&amp;&quot;,  &quot;&amp;[.I734]&amp;&quot; &quot;&amp;[.J734]&amp;&quot;, &quot;&amp;[.K7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5]&amp;&quot;, &quot; &amp; [.H735]&amp;&quot;,  &quot;&amp;[.I735]&amp;&quot; &quot;&amp;[.J735]&amp;&quot;, &quot;&amp;[.K7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6]&amp;&quot;, &quot; &amp; [.H736]&amp;&quot;,  &quot;&amp;[.I736]&amp;&quot; &quot;&amp;[.J736]&amp;&quot;, &quot;&amp;[.K7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7]&amp;&quot;, &quot; &amp; [.H737]&amp;&quot;,  &quot;&amp;[.I737]&amp;&quot; &quot;&amp;[.J737]&amp;&quot;, &quot;&amp;[.K7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8]&amp;&quot;, &quot; &amp; [.H738]&amp;&quot;,  &quot;&amp;[.I738]&amp;&quot; &quot;&amp;[.J738]&amp;&quot;, &quot;&amp;[.K7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39]&amp;&quot;, &quot; &amp; [.H739]&amp;&quot;,  &quot;&amp;[.I739]&amp;&quot; &quot;&amp;[.J739]&amp;&quot;, &quot;&amp;[.K7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0]&amp;&quot;, &quot; &amp; [.H740]&amp;&quot;,  &quot;&amp;[.I740]&amp;&quot; &quot;&amp;[.J740]&amp;&quot;, &quot;&amp;[.K7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1]&amp;&quot;, &quot; &amp; [.H741]&amp;&quot;,  &quot;&amp;[.I741]&amp;&quot; &quot;&amp;[.J741]&amp;&quot;, &quot;&amp;[.K7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2]&amp;&quot;, &quot; &amp; [.H742]&amp;&quot;,  &quot;&amp;[.I742]&amp;&quot; &quot;&amp;[.J742]&amp;&quot;, &quot;&amp;[.K7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3]&amp;&quot;, &quot; &amp; [.H743]&amp;&quot;,  &quot;&amp;[.I743]&amp;&quot; &quot;&amp;[.J743]&amp;&quot;, &quot;&amp;[.K7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4]&amp;&quot;, &quot; &amp; [.H744]&amp;&quot;,  &quot;&amp;[.I744]&amp;&quot; &quot;&amp;[.J744]&amp;&quot;, &quot;&amp;[.K7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5]&amp;&quot;, &quot; &amp; [.H745]&amp;&quot;,  &quot;&amp;[.I745]&amp;&quot; &quot;&amp;[.J745]&amp;&quot;, &quot;&amp;[.K7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6]&amp;&quot;, &quot; &amp; [.H746]&amp;&quot;,  &quot;&amp;[.I746]&amp;&quot; &quot;&amp;[.J746]&amp;&quot;, &quot;&amp;[.K7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7]&amp;&quot;, &quot; &amp; [.H747]&amp;&quot;,  &quot;&amp;[.I747]&amp;&quot; &quot;&amp;[.J747]&amp;&quot;, &quot;&amp;[.K7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8]&amp;&quot;, &quot; &amp; [.H748]&amp;&quot;,  &quot;&amp;[.I748]&amp;&quot; &quot;&amp;[.J748]&amp;&quot;, &quot;&amp;[.K7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49]&amp;&quot;, &quot; &amp; [.H749]&amp;&quot;,  &quot;&amp;[.I749]&amp;&quot; &quot;&amp;[.J749]&amp;&quot;, &quot;&amp;[.K7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0]&amp;&quot;, &quot; &amp; [.H750]&amp;&quot;,  &quot;&amp;[.I750]&amp;&quot; &quot;&amp;[.J750]&amp;&quot;, &quot;&amp;[.K7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1]&amp;&quot;, &quot; &amp; [.H751]&amp;&quot;,  &quot;&amp;[.I751]&amp;&quot; &quot;&amp;[.J751]&amp;&quot;, &quot;&amp;[.K7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2]&amp;&quot;, &quot; &amp; [.H752]&amp;&quot;,  &quot;&amp;[.I752]&amp;&quot; &quot;&amp;[.J752]&amp;&quot;, &quot;&amp;[.K7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3]&amp;&quot;, &quot; &amp; [.H753]&amp;&quot;,  &quot;&amp;[.I753]&amp;&quot; &quot;&amp;[.J753]&amp;&quot;, &quot;&amp;[.K7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4]&amp;&quot;, &quot; &amp; [.H754]&amp;&quot;,  &quot;&amp;[.I754]&amp;&quot; &quot;&amp;[.J754]&amp;&quot;, &quot;&amp;[.K7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5]&amp;&quot;, &quot; &amp; [.H755]&amp;&quot;,  &quot;&amp;[.I755]&amp;&quot; &quot;&amp;[.J755]&amp;&quot;, &quot;&amp;[.K7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6]&amp;&quot;, &quot; &amp; [.H756]&amp;&quot;,  &quot;&amp;[.I756]&amp;&quot; &quot;&amp;[.J756]&amp;&quot;, &quot;&amp;[.K7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7]&amp;&quot;, &quot; &amp; [.H757]&amp;&quot;,  &quot;&amp;[.I757]&amp;&quot; &quot;&amp;[.J757]&amp;&quot;, &quot;&amp;[.K7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8]&amp;&quot;, &quot; &amp; [.H758]&amp;&quot;,  &quot;&amp;[.I758]&amp;&quot; &quot;&amp;[.J758]&amp;&quot;, &quot;&amp;[.K7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59]&amp;&quot;, &quot; &amp; [.H759]&amp;&quot;,  &quot;&amp;[.I759]&amp;&quot; &quot;&amp;[.J759]&amp;&quot;, &quot;&amp;[.K7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0]&amp;&quot;, &quot; &amp; [.H760]&amp;&quot;,  &quot;&amp;[.I760]&amp;&quot; &quot;&amp;[.J760]&amp;&quot;, &quot;&amp;[.K7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1]&amp;&quot;, &quot; &amp; [.H761]&amp;&quot;,  &quot;&amp;[.I761]&amp;&quot; &quot;&amp;[.J761]&amp;&quot;, &quot;&amp;[.K7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2]&amp;&quot;, &quot; &amp; [.H762]&amp;&quot;,  &quot;&amp;[.I762]&amp;&quot; &quot;&amp;[.J762]&amp;&quot;, &quot;&amp;[.K7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3]&amp;&quot;, &quot; &amp; [.H763]&amp;&quot;,  &quot;&amp;[.I763]&amp;&quot; &quot;&amp;[.J763]&amp;&quot;, &quot;&amp;[.K7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4]&amp;&quot;, &quot; &amp; [.H764]&amp;&quot;,  &quot;&amp;[.I764]&amp;&quot; &quot;&amp;[.J764]&amp;&quot;, &quot;&amp;[.K7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5]&amp;&quot;, &quot; &amp; [.H765]&amp;&quot;,  &quot;&amp;[.I765]&amp;&quot; &quot;&amp;[.J765]&amp;&quot;, &quot;&amp;[.K7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6]&amp;&quot;, &quot; &amp; [.H766]&amp;&quot;,  &quot;&amp;[.I766]&amp;&quot; &quot;&amp;[.J766]&amp;&quot;, &quot;&amp;[.K7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7]&amp;&quot;, &quot; &amp; [.H767]&amp;&quot;,  &quot;&amp;[.I767]&amp;&quot; &quot;&amp;[.J767]&amp;&quot;, &quot;&amp;[.K7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8]&amp;&quot;, &quot; &amp; [.H768]&amp;&quot;,  &quot;&amp;[.I768]&amp;&quot; &quot;&amp;[.J768]&amp;&quot;, &quot;&amp;[.K7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69]&amp;&quot;, &quot; &amp; [.H769]&amp;&quot;,  &quot;&amp;[.I769]&amp;&quot; &quot;&amp;[.J769]&amp;&quot;, &quot;&amp;[.K7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0]&amp;&quot;, &quot; &amp; [.H770]&amp;&quot;,  &quot;&amp;[.I770]&amp;&quot; &quot;&amp;[.J770]&amp;&quot;, &quot;&amp;[.K7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1]&amp;&quot;, &quot; &amp; [.H771]&amp;&quot;,  &quot;&amp;[.I771]&amp;&quot; &quot;&amp;[.J771]&amp;&quot;, &quot;&amp;[.K7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2]&amp;&quot;, &quot; &amp; [.H772]&amp;&quot;,  &quot;&amp;[.I772]&amp;&quot; &quot;&amp;[.J772]&amp;&quot;, &quot;&amp;[.K7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3]&amp;&quot;, &quot; &amp; [.H773]&amp;&quot;,  &quot;&amp;[.I773]&amp;&quot; &quot;&amp;[.J773]&amp;&quot;, &quot;&amp;[.K7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4]&amp;&quot;, &quot; &amp; [.H774]&amp;&quot;,  &quot;&amp;[.I774]&amp;&quot; &quot;&amp;[.J774]&amp;&quot;, &quot;&amp;[.K7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5]&amp;&quot;, &quot; &amp; [.H775]&amp;&quot;,  &quot;&amp;[.I775]&amp;&quot; &quot;&amp;[.J775]&amp;&quot;, &quot;&amp;[.K7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6]&amp;&quot;, &quot; &amp; [.H776]&amp;&quot;,  &quot;&amp;[.I776]&amp;&quot; &quot;&amp;[.J776]&amp;&quot;, &quot;&amp;[.K7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7]&amp;&quot;, &quot; &amp; [.H777]&amp;&quot;,  &quot;&amp;[.I777]&amp;&quot; &quot;&amp;[.J777]&amp;&quot;, &quot;&amp;[.K7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8]&amp;&quot;, &quot; &amp; [.H778]&amp;&quot;,  &quot;&amp;[.I778]&amp;&quot; &quot;&amp;[.J778]&amp;&quot;, &quot;&amp;[.K7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79]&amp;&quot;, &quot; &amp; [.H779]&amp;&quot;,  &quot;&amp;[.I779]&amp;&quot; &quot;&amp;[.J779]&amp;&quot;, &quot;&amp;[.K7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0]&amp;&quot;, &quot; &amp; [.H780]&amp;&quot;,  &quot;&amp;[.I780]&amp;&quot; &quot;&amp;[.J780]&amp;&quot;, &quot;&amp;[.K7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1]&amp;&quot;, &quot; &amp; [.H781]&amp;&quot;,  &quot;&amp;[.I781]&amp;&quot; &quot;&amp;[.J781]&amp;&quot;, &quot;&amp;[.K7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2]&amp;&quot;, &quot; &amp; [.H782]&amp;&quot;,  &quot;&amp;[.I782]&amp;&quot; &quot;&amp;[.J782]&amp;&quot;, &quot;&amp;[.K7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3]&amp;&quot;, &quot; &amp; [.H783]&amp;&quot;,  &quot;&amp;[.I783]&amp;&quot; &quot;&amp;[.J783]&amp;&quot;, &quot;&amp;[.K7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4]&amp;&quot;, &quot; &amp; [.H784]&amp;&quot;,  &quot;&amp;[.I784]&amp;&quot; &quot;&amp;[.J784]&amp;&quot;, &quot;&amp;[.K7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5]&amp;&quot;, &quot; &amp; [.H785]&amp;&quot;,  &quot;&amp;[.I785]&amp;&quot; &quot;&amp;[.J785]&amp;&quot;, &quot;&amp;[.K7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6]&amp;&quot;, &quot; &amp; [.H786]&amp;&quot;,  &quot;&amp;[.I786]&amp;&quot; &quot;&amp;[.J786]&amp;&quot;, &quot;&amp;[.K7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7]&amp;&quot;, &quot; &amp; [.H787]&amp;&quot;,  &quot;&amp;[.I787]&amp;&quot; &quot;&amp;[.J787]&amp;&quot;, &quot;&amp;[.K7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8]&amp;&quot;, &quot; &amp; [.H788]&amp;&quot;,  &quot;&amp;[.I788]&amp;&quot; &quot;&amp;[.J788]&amp;&quot;, &quot;&amp;[.K7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89]&amp;&quot;, &quot; &amp; [.H789]&amp;&quot;,  &quot;&amp;[.I789]&amp;&quot; &quot;&amp;[.J789]&amp;&quot;, &quot;&amp;[.K7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0]&amp;&quot;, &quot; &amp; [.H790]&amp;&quot;,  &quot;&amp;[.I790]&amp;&quot; &quot;&amp;[.J790]&amp;&quot;, &quot;&amp;[.K7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1]&amp;&quot;, &quot; &amp; [.H791]&amp;&quot;,  &quot;&amp;[.I791]&amp;&quot; &quot;&amp;[.J791]&amp;&quot;, &quot;&amp;[.K7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2]&amp;&quot;, &quot; &amp; [.H792]&amp;&quot;,  &quot;&amp;[.I792]&amp;&quot; &quot;&amp;[.J792]&amp;&quot;, &quot;&amp;[.K7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3]&amp;&quot;, &quot; &amp; [.H793]&amp;&quot;,  &quot;&amp;[.I793]&amp;&quot; &quot;&amp;[.J793]&amp;&quot;, &quot;&amp;[.K7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4]&amp;&quot;, &quot; &amp; [.H794]&amp;&quot;,  &quot;&amp;[.I794]&amp;&quot; &quot;&amp;[.J794]&amp;&quot;, &quot;&amp;[.K7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5]&amp;&quot;, &quot; &amp; [.H795]&amp;&quot;,  &quot;&amp;[.I795]&amp;&quot; &quot;&amp;[.J795]&amp;&quot;, &quot;&amp;[.K7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6]&amp;&quot;, &quot; &amp; [.H796]&amp;&quot;,  &quot;&amp;[.I796]&amp;&quot; &quot;&amp;[.J796]&amp;&quot;, &quot;&amp;[.K7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7]&amp;&quot;, &quot; &amp; [.H797]&amp;&quot;,  &quot;&amp;[.I797]&amp;&quot; &quot;&amp;[.J797]&amp;&quot;, &quot;&amp;[.K7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8]&amp;&quot;, &quot; &amp; [.H798]&amp;&quot;,  &quot;&amp;[.I798]&amp;&quot; &quot;&amp;[.J798]&amp;&quot;, &quot;&amp;[.K7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799]&amp;&quot;, &quot; &amp; [.H799]&amp;&quot;,  &quot;&amp;[.I799]&amp;&quot; &quot;&amp;[.J799]&amp;&quot;, &quot;&amp;[.K7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0]&amp;&quot;, &quot; &amp; [.H800]&amp;&quot;,  &quot;&amp;[.I800]&amp;&quot; &quot;&amp;[.J800]&amp;&quot;, &quot;&amp;[.K8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1]&amp;&quot;, &quot; &amp; [.H801]&amp;&quot;,  &quot;&amp;[.I801]&amp;&quot; &quot;&amp;[.J801]&amp;&quot;, &quot;&amp;[.K8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2]&amp;&quot;, &quot; &amp; [.H802]&amp;&quot;,  &quot;&amp;[.I802]&amp;&quot; &quot;&amp;[.J802]&amp;&quot;, &quot;&amp;[.K8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3]&amp;&quot;, &quot; &amp; [.H803]&amp;&quot;,  &quot;&amp;[.I803]&amp;&quot; &quot;&amp;[.J803]&amp;&quot;, &quot;&amp;[.K8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4]&amp;&quot;, &quot; &amp; [.H804]&amp;&quot;,  &quot;&amp;[.I804]&amp;&quot; &quot;&amp;[.J804]&amp;&quot;, &quot;&amp;[.K8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5]&amp;&quot;, &quot; &amp; [.H805]&amp;&quot;,  &quot;&amp;[.I805]&amp;&quot; &quot;&amp;[.J805]&amp;&quot;, &quot;&amp;[.K8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6]&amp;&quot;, &quot; &amp; [.H806]&amp;&quot;,  &quot;&amp;[.I806]&amp;&quot; &quot;&amp;[.J806]&amp;&quot;, &quot;&amp;[.K8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7]&amp;&quot;, &quot; &amp; [.H807]&amp;&quot;,  &quot;&amp;[.I807]&amp;&quot; &quot;&amp;[.J807]&amp;&quot;, &quot;&amp;[.K8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8]&amp;&quot;, &quot; &amp; [.H808]&amp;&quot;,  &quot;&amp;[.I808]&amp;&quot; &quot;&amp;[.J808]&amp;&quot;, &quot;&amp;[.K8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09]&amp;&quot;, &quot; &amp; [.H809]&amp;&quot;,  &quot;&amp;[.I809]&amp;&quot; &quot;&amp;[.J809]&amp;&quot;, &quot;&amp;[.K8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0]&amp;&quot;, &quot; &amp; [.H810]&amp;&quot;,  &quot;&amp;[.I810]&amp;&quot; &quot;&amp;[.J810]&amp;&quot;, &quot;&amp;[.K8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1]&amp;&quot;, &quot; &amp; [.H811]&amp;&quot;,  &quot;&amp;[.I811]&amp;&quot; &quot;&amp;[.J811]&amp;&quot;, &quot;&amp;[.K8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2]&amp;&quot;, &quot; &amp; [.H812]&amp;&quot;,  &quot;&amp;[.I812]&amp;&quot; &quot;&amp;[.J812]&amp;&quot;, &quot;&amp;[.K8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3]&amp;&quot;, &quot; &amp; [.H813]&amp;&quot;,  &quot;&amp;[.I813]&amp;&quot; &quot;&amp;[.J813]&amp;&quot;, &quot;&amp;[.K8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4]&amp;&quot;, &quot; &amp; [.H814]&amp;&quot;,  &quot;&amp;[.I814]&amp;&quot; &quot;&amp;[.J814]&amp;&quot;, &quot;&amp;[.K8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5]&amp;&quot;, &quot; &amp; [.H815]&amp;&quot;,  &quot;&amp;[.I815]&amp;&quot; &quot;&amp;[.J815]&amp;&quot;, &quot;&amp;[.K8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6]&amp;&quot;, &quot; &amp; [.H816]&amp;&quot;,  &quot;&amp;[.I816]&amp;&quot; &quot;&amp;[.J816]&amp;&quot;, &quot;&amp;[.K8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7]&amp;&quot;, &quot; &amp; [.H817]&amp;&quot;,  &quot;&amp;[.I817]&amp;&quot; &quot;&amp;[.J817]&amp;&quot;, &quot;&amp;[.K8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8]&amp;&quot;, &quot; &amp; [.H818]&amp;&quot;,  &quot;&amp;[.I818]&amp;&quot; &quot;&amp;[.J818]&amp;&quot;, &quot;&amp;[.K8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19]&amp;&quot;, &quot; &amp; [.H819]&amp;&quot;,  &quot;&amp;[.I819]&amp;&quot; &quot;&amp;[.J819]&amp;&quot;, &quot;&amp;[.K8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0]&amp;&quot;, &quot; &amp; [.H820]&amp;&quot;,  &quot;&amp;[.I820]&amp;&quot; &quot;&amp;[.J820]&amp;&quot;, &quot;&amp;[.K8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1]&amp;&quot;, &quot; &amp; [.H821]&amp;&quot;,  &quot;&amp;[.I821]&amp;&quot; &quot;&amp;[.J821]&amp;&quot;, &quot;&amp;[.K8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2]&amp;&quot;, &quot; &amp; [.H822]&amp;&quot;,  &quot;&amp;[.I822]&amp;&quot; &quot;&amp;[.J822]&amp;&quot;, &quot;&amp;[.K8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3]&amp;&quot;, &quot; &amp; [.H823]&amp;&quot;,  &quot;&amp;[.I823]&amp;&quot; &quot;&amp;[.J823]&amp;&quot;, &quot;&amp;[.K8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4]&amp;&quot;, &quot; &amp; [.H824]&amp;&quot;,  &quot;&amp;[.I824]&amp;&quot; &quot;&amp;[.J824]&amp;&quot;, &quot;&amp;[.K8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5]&amp;&quot;, &quot; &amp; [.H825]&amp;&quot;,  &quot;&amp;[.I825]&amp;&quot; &quot;&amp;[.J825]&amp;&quot;, &quot;&amp;[.K8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6]&amp;&quot;, &quot; &amp; [.H826]&amp;&quot;,  &quot;&amp;[.I826]&amp;&quot; &quot;&amp;[.J826]&amp;&quot;, &quot;&amp;[.K8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7]&amp;&quot;, &quot; &amp; [.H827]&amp;&quot;,  &quot;&amp;[.I827]&amp;&quot; &quot;&amp;[.J827]&amp;&quot;, &quot;&amp;[.K8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8]&amp;&quot;, &quot; &amp; [.H828]&amp;&quot;,  &quot;&amp;[.I828]&amp;&quot; &quot;&amp;[.J828]&amp;&quot;, &quot;&amp;[.K8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29]&amp;&quot;, &quot; &amp; [.H829]&amp;&quot;,  &quot;&amp;[.I829]&amp;&quot; &quot;&amp;[.J829]&amp;&quot;, &quot;&amp;[.K8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0]&amp;&quot;, &quot; &amp; [.H830]&amp;&quot;,  &quot;&amp;[.I830]&amp;&quot; &quot;&amp;[.J830]&amp;&quot;, &quot;&amp;[.K8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1]&amp;&quot;, &quot; &amp; [.H831]&amp;&quot;,  &quot;&amp;[.I831]&amp;&quot; &quot;&amp;[.J831]&amp;&quot;, &quot;&amp;[.K8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2]&amp;&quot;, &quot; &amp; [.H832]&amp;&quot;,  &quot;&amp;[.I832]&amp;&quot; &quot;&amp;[.J832]&amp;&quot;, &quot;&amp;[.K8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3]&amp;&quot;, &quot; &amp; [.H833]&amp;&quot;,  &quot;&amp;[.I833]&amp;&quot; &quot;&amp;[.J833]&amp;&quot;, &quot;&amp;[.K8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4]&amp;&quot;, &quot; &amp; [.H834]&amp;&quot;,  &quot;&amp;[.I834]&amp;&quot; &quot;&amp;[.J834]&amp;&quot;, &quot;&amp;[.K8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5]&amp;&quot;, &quot; &amp; [.H835]&amp;&quot;,  &quot;&amp;[.I835]&amp;&quot; &quot;&amp;[.J835]&amp;&quot;, &quot;&amp;[.K8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6]&amp;&quot;, &quot; &amp; [.H836]&amp;&quot;,  &quot;&amp;[.I836]&amp;&quot; &quot;&amp;[.J836]&amp;&quot;, &quot;&amp;[.K8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7]&amp;&quot;, &quot; &amp; [.H837]&amp;&quot;,  &quot;&amp;[.I837]&amp;&quot; &quot;&amp;[.J837]&amp;&quot;, &quot;&amp;[.K8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8]&amp;&quot;, &quot; &amp; [.H838]&amp;&quot;,  &quot;&amp;[.I838]&amp;&quot; &quot;&amp;[.J838]&amp;&quot;, &quot;&amp;[.K8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39]&amp;&quot;, &quot; &amp; [.H839]&amp;&quot;,  &quot;&amp;[.I839]&amp;&quot; &quot;&amp;[.J839]&amp;&quot;, &quot;&amp;[.K8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0]&amp;&quot;, &quot; &amp; [.H840]&amp;&quot;,  &quot;&amp;[.I840]&amp;&quot; &quot;&amp;[.J840]&amp;&quot;, &quot;&amp;[.K8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1]&amp;&quot;, &quot; &amp; [.H841]&amp;&quot;,  &quot;&amp;[.I841]&amp;&quot; &quot;&amp;[.J841]&amp;&quot;, &quot;&amp;[.K8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2]&amp;&quot;, &quot; &amp; [.H842]&amp;&quot;,  &quot;&amp;[.I842]&amp;&quot; &quot;&amp;[.J842]&amp;&quot;, &quot;&amp;[.K8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3]&amp;&quot;, &quot; &amp; [.H843]&amp;&quot;,  &quot;&amp;[.I843]&amp;&quot; &quot;&amp;[.J843]&amp;&quot;, &quot;&amp;[.K8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4]&amp;&quot;, &quot; &amp; [.H844]&amp;&quot;,  &quot;&amp;[.I844]&amp;&quot; &quot;&amp;[.J844]&amp;&quot;, &quot;&amp;[.K8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5]&amp;&quot;, &quot; &amp; [.H845]&amp;&quot;,  &quot;&amp;[.I845]&amp;&quot; &quot;&amp;[.J845]&amp;&quot;, &quot;&amp;[.K8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6]&amp;&quot;, &quot; &amp; [.H846]&amp;&quot;,  &quot;&amp;[.I846]&amp;&quot; &quot;&amp;[.J846]&amp;&quot;, &quot;&amp;[.K8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7]&amp;&quot;, &quot; &amp; [.H847]&amp;&quot;,  &quot;&amp;[.I847]&amp;&quot; &quot;&amp;[.J847]&amp;&quot;, &quot;&amp;[.K8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8]&amp;&quot;, &quot; &amp; [.H848]&amp;&quot;,  &quot;&amp;[.I848]&amp;&quot; &quot;&amp;[.J848]&amp;&quot;, &quot;&amp;[.K8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49]&amp;&quot;, &quot; &amp; [.H849]&amp;&quot;,  &quot;&amp;[.I849]&amp;&quot; &quot;&amp;[.J849]&amp;&quot;, &quot;&amp;[.K8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0]&amp;&quot;, &quot; &amp; [.H850]&amp;&quot;,  &quot;&amp;[.I850]&amp;&quot; &quot;&amp;[.J850]&amp;&quot;, &quot;&amp;[.K8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1]&amp;&quot;, &quot; &amp; [.H851]&amp;&quot;,  &quot;&amp;[.I851]&amp;&quot; &quot;&amp;[.J851]&amp;&quot;, &quot;&amp;[.K8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2]&amp;&quot;, &quot; &amp; [.H852]&amp;&quot;,  &quot;&amp;[.I852]&amp;&quot; &quot;&amp;[.J852]&amp;&quot;, &quot;&amp;[.K8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3]&amp;&quot;, &quot; &amp; [.H853]&amp;&quot;,  &quot;&amp;[.I853]&amp;&quot; &quot;&amp;[.J853]&amp;&quot;, &quot;&amp;[.K8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4]&amp;&quot;, &quot; &amp; [.H854]&amp;&quot;,  &quot;&amp;[.I854]&amp;&quot; &quot;&amp;[.J854]&amp;&quot;, &quot;&amp;[.K8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5]&amp;&quot;, &quot; &amp; [.H855]&amp;&quot;,  &quot;&amp;[.I855]&amp;&quot; &quot;&amp;[.J855]&amp;&quot;, &quot;&amp;[.K8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6]&amp;&quot;, &quot; &amp; [.H856]&amp;&quot;,  &quot;&amp;[.I856]&amp;&quot; &quot;&amp;[.J856]&amp;&quot;, &quot;&amp;[.K8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7]&amp;&quot;, &quot; &amp; [.H857]&amp;&quot;,  &quot;&amp;[.I857]&amp;&quot; &quot;&amp;[.J857]&amp;&quot;, &quot;&amp;[.K8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8]&amp;&quot;, &quot; &amp; [.H858]&amp;&quot;,  &quot;&amp;[.I858]&amp;&quot; &quot;&amp;[.J858]&amp;&quot;, &quot;&amp;[.K8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59]&amp;&quot;, &quot; &amp; [.H859]&amp;&quot;,  &quot;&amp;[.I859]&amp;&quot; &quot;&amp;[.J859]&amp;&quot;, &quot;&amp;[.K8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0]&amp;&quot;, &quot; &amp; [.H860]&amp;&quot;,  &quot;&amp;[.I860]&amp;&quot; &quot;&amp;[.J860]&amp;&quot;, &quot;&amp;[.K8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1]&amp;&quot;, &quot; &amp; [.H861]&amp;&quot;,  &quot;&amp;[.I861]&amp;&quot; &quot;&amp;[.J861]&amp;&quot;, &quot;&amp;[.K8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2]&amp;&quot;, &quot; &amp; [.H862]&amp;&quot;,  &quot;&amp;[.I862]&amp;&quot; &quot;&amp;[.J862]&amp;&quot;, &quot;&amp;[.K8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3]&amp;&quot;, &quot; &amp; [.H863]&amp;&quot;,  &quot;&amp;[.I863]&amp;&quot; &quot;&amp;[.J863]&amp;&quot;, &quot;&amp;[.K8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4]&amp;&quot;, &quot; &amp; [.H864]&amp;&quot;,  &quot;&amp;[.I864]&amp;&quot; &quot;&amp;[.J864]&amp;&quot;, &quot;&amp;[.K8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5]&amp;&quot;, &quot; &amp; [.H865]&amp;&quot;,  &quot;&amp;[.I865]&amp;&quot; &quot;&amp;[.J865]&amp;&quot;, &quot;&amp;[.K8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6]&amp;&quot;, &quot; &amp; [.H866]&amp;&quot;,  &quot;&amp;[.I866]&amp;&quot; &quot;&amp;[.J866]&amp;&quot;, &quot;&amp;[.K8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7]&amp;&quot;, &quot; &amp; [.H867]&amp;&quot;,  &quot;&amp;[.I867]&amp;&quot; &quot;&amp;[.J867]&amp;&quot;, &quot;&amp;[.K8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8]&amp;&quot;, &quot; &amp; [.H868]&amp;&quot;,  &quot;&amp;[.I868]&amp;&quot; &quot;&amp;[.J868]&amp;&quot;, &quot;&amp;[.K8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69]&amp;&quot;, &quot; &amp; [.H869]&amp;&quot;,  &quot;&amp;[.I869]&amp;&quot; &quot;&amp;[.J869]&amp;&quot;, &quot;&amp;[.K8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0]&amp;&quot;, &quot; &amp; [.H870]&amp;&quot;,  &quot;&amp;[.I870]&amp;&quot; &quot;&amp;[.J870]&amp;&quot;, &quot;&amp;[.K8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1]&amp;&quot;, &quot; &amp; [.H871]&amp;&quot;,  &quot;&amp;[.I871]&amp;&quot; &quot;&amp;[.J871]&amp;&quot;, &quot;&amp;[.K8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2]&amp;&quot;, &quot; &amp; [.H872]&amp;&quot;,  &quot;&amp;[.I872]&amp;&quot; &quot;&amp;[.J872]&amp;&quot;, &quot;&amp;[.K8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3]&amp;&quot;, &quot; &amp; [.H873]&amp;&quot;,  &quot;&amp;[.I873]&amp;&quot; &quot;&amp;[.J873]&amp;&quot;, &quot;&amp;[.K8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4]&amp;&quot;, &quot; &amp; [.H874]&amp;&quot;,  &quot;&amp;[.I874]&amp;&quot; &quot;&amp;[.J874]&amp;&quot;, &quot;&amp;[.K8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5]&amp;&quot;, &quot; &amp; [.H875]&amp;&quot;,  &quot;&amp;[.I875]&amp;&quot; &quot;&amp;[.J875]&amp;&quot;, &quot;&amp;[.K8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6]&amp;&quot;, &quot; &amp; [.H876]&amp;&quot;,  &quot;&amp;[.I876]&amp;&quot; &quot;&amp;[.J876]&amp;&quot;, &quot;&amp;[.K8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7]&amp;&quot;, &quot; &amp; [.H877]&amp;&quot;,  &quot;&amp;[.I877]&amp;&quot; &quot;&amp;[.J877]&amp;&quot;, &quot;&amp;[.K8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8]&amp;&quot;, &quot; &amp; [.H878]&amp;&quot;,  &quot;&amp;[.I878]&amp;&quot; &quot;&amp;[.J878]&amp;&quot;, &quot;&amp;[.K8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79]&amp;&quot;, &quot; &amp; [.H879]&amp;&quot;,  &quot;&amp;[.I879]&amp;&quot; &quot;&amp;[.J879]&amp;&quot;, &quot;&amp;[.K8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0]&amp;&quot;, &quot; &amp; [.H880]&amp;&quot;,  &quot;&amp;[.I880]&amp;&quot; &quot;&amp;[.J880]&amp;&quot;, &quot;&amp;[.K8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1]&amp;&quot;, &quot; &amp; [.H881]&amp;&quot;,  &quot;&amp;[.I881]&amp;&quot; &quot;&amp;[.J881]&amp;&quot;, &quot;&amp;[.K8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2]&amp;&quot;, &quot; &amp; [.H882]&amp;&quot;,  &quot;&amp;[.I882]&amp;&quot; &quot;&amp;[.J882]&amp;&quot;, &quot;&amp;[.K8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3]&amp;&quot;, &quot; &amp; [.H883]&amp;&quot;,  &quot;&amp;[.I883]&amp;&quot; &quot;&amp;[.J883]&amp;&quot;, &quot;&amp;[.K8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4]&amp;&quot;, &quot; &amp; [.H884]&amp;&quot;,  &quot;&amp;[.I884]&amp;&quot; &quot;&amp;[.J884]&amp;&quot;, &quot;&amp;[.K8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5]&amp;&quot;, &quot; &amp; [.H885]&amp;&quot;,  &quot;&amp;[.I885]&amp;&quot; &quot;&amp;[.J885]&amp;&quot;, &quot;&amp;[.K8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6]&amp;&quot;, &quot; &amp; [.H886]&amp;&quot;,  &quot;&amp;[.I886]&amp;&quot; &quot;&amp;[.J886]&amp;&quot;, &quot;&amp;[.K8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7]&amp;&quot;, &quot; &amp; [.H887]&amp;&quot;,  &quot;&amp;[.I887]&amp;&quot; &quot;&amp;[.J887]&amp;&quot;, &quot;&amp;[.K8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8]&amp;&quot;, &quot; &amp; [.H888]&amp;&quot;,  &quot;&amp;[.I888]&amp;&quot; &quot;&amp;[.J888]&amp;&quot;, &quot;&amp;[.K8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89]&amp;&quot;, &quot; &amp; [.H889]&amp;&quot;,  &quot;&amp;[.I889]&amp;&quot; &quot;&amp;[.J889]&amp;&quot;, &quot;&amp;[.K8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0]&amp;&quot;, &quot; &amp; [.H890]&amp;&quot;,  &quot;&amp;[.I890]&amp;&quot; &quot;&amp;[.J890]&amp;&quot;, &quot;&amp;[.K89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1]&amp;&quot;, &quot; &amp; [.H891]&amp;&quot;,  &quot;&amp;[.I891]&amp;&quot; &quot;&amp;[.J891]&amp;&quot;, &quot;&amp;[.K89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2]&amp;&quot;, &quot; &amp; [.H892]&amp;&quot;,  &quot;&amp;[.I892]&amp;&quot; &quot;&amp;[.J892]&amp;&quot;, &quot;&amp;[.K89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3]&amp;&quot;, &quot; &amp; [.H893]&amp;&quot;,  &quot;&amp;[.I893]&amp;&quot; &quot;&amp;[.J893]&amp;&quot;, &quot;&amp;[.K89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4]&amp;&quot;, &quot; &amp; [.H894]&amp;&quot;,  &quot;&amp;[.I894]&amp;&quot; &quot;&amp;[.J894]&amp;&quot;, &quot;&amp;[.K89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5]&amp;&quot;, &quot; &amp; [.H895]&amp;&quot;,  &quot;&amp;[.I895]&amp;&quot; &quot;&amp;[.J895]&amp;&quot;, &quot;&amp;[.K89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6]&amp;&quot;, &quot; &amp; [.H896]&amp;&quot;,  &quot;&amp;[.I896]&amp;&quot; &quot;&amp;[.J896]&amp;&quot;, &quot;&amp;[.K89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7]&amp;&quot;, &quot; &amp; [.H897]&amp;&quot;,  &quot;&amp;[.I897]&amp;&quot; &quot;&amp;[.J897]&amp;&quot;, &quot;&amp;[.K89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8]&amp;&quot;, &quot; &amp; [.H898]&amp;&quot;,  &quot;&amp;[.I898]&amp;&quot; &quot;&amp;[.J898]&amp;&quot;, &quot;&amp;[.K89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899]&amp;&quot;, &quot; &amp; [.H899]&amp;&quot;,  &quot;&amp;[.I899]&amp;&quot; &quot;&amp;[.J899]&amp;&quot;, &quot;&amp;[.K89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0]&amp;&quot;, &quot; &amp; [.H900]&amp;&quot;,  &quot;&amp;[.I900]&amp;&quot; &quot;&amp;[.J900]&amp;&quot;, &quot;&amp;[.K90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1]&amp;&quot;, &quot; &amp; [.H901]&amp;&quot;,  &quot;&amp;[.I901]&amp;&quot; &quot;&amp;[.J901]&amp;&quot;, &quot;&amp;[.K90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2]&amp;&quot;, &quot; &amp; [.H902]&amp;&quot;,  &quot;&amp;[.I902]&amp;&quot; &quot;&amp;[.J902]&amp;&quot;, &quot;&amp;[.K90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3]&amp;&quot;, &quot; &amp; [.H903]&amp;&quot;,  &quot;&amp;[.I903]&amp;&quot; &quot;&amp;[.J903]&amp;&quot;, &quot;&amp;[.K90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4]&amp;&quot;, &quot; &amp; [.H904]&amp;&quot;,  &quot;&amp;[.I904]&amp;&quot; &quot;&amp;[.J904]&amp;&quot;, &quot;&amp;[.K90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5]&amp;&quot;, &quot; &amp; [.H905]&amp;&quot;,  &quot;&amp;[.I905]&amp;&quot; &quot;&amp;[.J905]&amp;&quot;, &quot;&amp;[.K90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6]&amp;&quot;, &quot; &amp; [.H906]&amp;&quot;,  &quot;&amp;[.I906]&amp;&quot; &quot;&amp;[.J906]&amp;&quot;, &quot;&amp;[.K90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7]&amp;&quot;, &quot; &amp; [.H907]&amp;&quot;,  &quot;&amp;[.I907]&amp;&quot; &quot;&amp;[.J907]&amp;&quot;, &quot;&amp;[.K90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8]&amp;&quot;, &quot; &amp; [.H908]&amp;&quot;,  &quot;&amp;[.I908]&amp;&quot; &quot;&amp;[.J908]&amp;&quot;, &quot;&amp;[.K90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09]&amp;&quot;, &quot; &amp; [.H909]&amp;&quot;,  &quot;&amp;[.I909]&amp;&quot; &quot;&amp;[.J909]&amp;&quot;, &quot;&amp;[.K90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0]&amp;&quot;, &quot; &amp; [.H910]&amp;&quot;,  &quot;&amp;[.I910]&amp;&quot; &quot;&amp;[.J910]&amp;&quot;, &quot;&amp;[.K91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1]&amp;&quot;, &quot; &amp; [.H911]&amp;&quot;,  &quot;&amp;[.I911]&amp;&quot; &quot;&amp;[.J911]&amp;&quot;, &quot;&amp;[.K91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2]&amp;&quot;, &quot; &amp; [.H912]&amp;&quot;,  &quot;&amp;[.I912]&amp;&quot; &quot;&amp;[.J912]&amp;&quot;, &quot;&amp;[.K91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3]&amp;&quot;, &quot; &amp; [.H913]&amp;&quot;,  &quot;&amp;[.I913]&amp;&quot; &quot;&amp;[.J913]&amp;&quot;, &quot;&amp;[.K91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4]&amp;&quot;, &quot; &amp; [.H914]&amp;&quot;,  &quot;&amp;[.I914]&amp;&quot; &quot;&amp;[.J914]&amp;&quot;, &quot;&amp;[.K91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5]&amp;&quot;, &quot; &amp; [.H915]&amp;&quot;,  &quot;&amp;[.I915]&amp;&quot; &quot;&amp;[.J915]&amp;&quot;, &quot;&amp;[.K91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6]&amp;&quot;, &quot; &amp; [.H916]&amp;&quot;,  &quot;&amp;[.I916]&amp;&quot; &quot;&amp;[.J916]&amp;&quot;, &quot;&amp;[.K91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7]&amp;&quot;, &quot; &amp; [.H917]&amp;&quot;,  &quot;&amp;[.I917]&amp;&quot; &quot;&amp;[.J917]&amp;&quot;, &quot;&amp;[.K91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8]&amp;&quot;, &quot; &amp; [.H918]&amp;&quot;,  &quot;&amp;[.I918]&amp;&quot; &quot;&amp;[.J918]&amp;&quot;, &quot;&amp;[.K91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19]&amp;&quot;, &quot; &amp; [.H919]&amp;&quot;,  &quot;&amp;[.I919]&amp;&quot; &quot;&amp;[.J919]&amp;&quot;, &quot;&amp;[.K91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0]&amp;&quot;, &quot; &amp; [.H920]&amp;&quot;,  &quot;&amp;[.I920]&amp;&quot; &quot;&amp;[.J920]&amp;&quot;, &quot;&amp;[.K92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1]&amp;&quot;, &quot; &amp; [.H921]&amp;&quot;,  &quot;&amp;[.I921]&amp;&quot; &quot;&amp;[.J921]&amp;&quot;, &quot;&amp;[.K92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2]&amp;&quot;, &quot; &amp; [.H922]&amp;&quot;,  &quot;&amp;[.I922]&amp;&quot; &quot;&amp;[.J922]&amp;&quot;, &quot;&amp;[.K92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3]&amp;&quot;, &quot; &amp; [.H923]&amp;&quot;,  &quot;&amp;[.I923]&amp;&quot; &quot;&amp;[.J923]&amp;&quot;, &quot;&amp;[.K92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4]&amp;&quot;, &quot; &amp; [.H924]&amp;&quot;,  &quot;&amp;[.I924]&amp;&quot; &quot;&amp;[.J924]&amp;&quot;, &quot;&amp;[.K92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5]&amp;&quot;, &quot; &amp; [.H925]&amp;&quot;,  &quot;&amp;[.I925]&amp;&quot; &quot;&amp;[.J925]&amp;&quot;, &quot;&amp;[.K92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6]&amp;&quot;, &quot; &amp; [.H926]&amp;&quot;,  &quot;&amp;[.I926]&amp;&quot; &quot;&amp;[.J926]&amp;&quot;, &quot;&amp;[.K92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7]&amp;&quot;, &quot; &amp; [.H927]&amp;&quot;,  &quot;&amp;[.I927]&amp;&quot; &quot;&amp;[.J927]&amp;&quot;, &quot;&amp;[.K92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8]&amp;&quot;, &quot; &amp; [.H928]&amp;&quot;,  &quot;&amp;[.I928]&amp;&quot; &quot;&amp;[.J928]&amp;&quot;, &quot;&amp;[.K92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29]&amp;&quot;, &quot; &amp; [.H929]&amp;&quot;,  &quot;&amp;[.I929]&amp;&quot; &quot;&amp;[.J929]&amp;&quot;, &quot;&amp;[.K92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0]&amp;&quot;, &quot; &amp; [.H930]&amp;&quot;,  &quot;&amp;[.I930]&amp;&quot; &quot;&amp;[.J930]&amp;&quot;, &quot;&amp;[.K93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1]&amp;&quot;, &quot; &amp; [.H931]&amp;&quot;,  &quot;&amp;[.I931]&amp;&quot; &quot;&amp;[.J931]&amp;&quot;, &quot;&amp;[.K93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2]&amp;&quot;, &quot; &amp; [.H932]&amp;&quot;,  &quot;&amp;[.I932]&amp;&quot; &quot;&amp;[.J932]&amp;&quot;, &quot;&amp;[.K93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3]&amp;&quot;, &quot; &amp; [.H933]&amp;&quot;,  &quot;&amp;[.I933]&amp;&quot; &quot;&amp;[.J933]&amp;&quot;, &quot;&amp;[.K93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4]&amp;&quot;, &quot; &amp; [.H934]&amp;&quot;,  &quot;&amp;[.I934]&amp;&quot; &quot;&amp;[.J934]&amp;&quot;, &quot;&amp;[.K93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5]&amp;&quot;, &quot; &amp; [.H935]&amp;&quot;,  &quot;&amp;[.I935]&amp;&quot; &quot;&amp;[.J935]&amp;&quot;, &quot;&amp;[.K93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6]&amp;&quot;, &quot; &amp; [.H936]&amp;&quot;,  &quot;&amp;[.I936]&amp;&quot; &quot;&amp;[.J936]&amp;&quot;, &quot;&amp;[.K93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7]&amp;&quot;, &quot; &amp; [.H937]&amp;&quot;,  &quot;&amp;[.I937]&amp;&quot; &quot;&amp;[.J937]&amp;&quot;, &quot;&amp;[.K93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8]&amp;&quot;, &quot; &amp; [.H938]&amp;&quot;,  &quot;&amp;[.I938]&amp;&quot; &quot;&amp;[.J938]&amp;&quot;, &quot;&amp;[.K93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39]&amp;&quot;, &quot; &amp; [.H939]&amp;&quot;,  &quot;&amp;[.I939]&amp;&quot; &quot;&amp;[.J939]&amp;&quot;, &quot;&amp;[.K93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0]&amp;&quot;, &quot; &amp; [.H940]&amp;&quot;,  &quot;&amp;[.I940]&amp;&quot; &quot;&amp;[.J940]&amp;&quot;, &quot;&amp;[.K94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1]&amp;&quot;, &quot; &amp; [.H941]&amp;&quot;,  &quot;&amp;[.I941]&amp;&quot; &quot;&amp;[.J941]&amp;&quot;, &quot;&amp;[.K94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2]&amp;&quot;, &quot; &amp; [.H942]&amp;&quot;,  &quot;&amp;[.I942]&amp;&quot; &quot;&amp;[.J942]&amp;&quot;, &quot;&amp;[.K94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3]&amp;&quot;, &quot; &amp; [.H943]&amp;&quot;,  &quot;&amp;[.I943]&amp;&quot; &quot;&amp;[.J943]&amp;&quot;, &quot;&amp;[.K94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4]&amp;&quot;, &quot; &amp; [.H944]&amp;&quot;,  &quot;&amp;[.I944]&amp;&quot; &quot;&amp;[.J944]&amp;&quot;, &quot;&amp;[.K94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5]&amp;&quot;, &quot; &amp; [.H945]&amp;&quot;,  &quot;&amp;[.I945]&amp;&quot; &quot;&amp;[.J945]&amp;&quot;, &quot;&amp;[.K94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6]&amp;&quot;, &quot; &amp; [.H946]&amp;&quot;,  &quot;&amp;[.I946]&amp;&quot; &quot;&amp;[.J946]&amp;&quot;, &quot;&amp;[.K94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7]&amp;&quot;, &quot; &amp; [.H947]&amp;&quot;,  &quot;&amp;[.I947]&amp;&quot; &quot;&amp;[.J947]&amp;&quot;, &quot;&amp;[.K94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8]&amp;&quot;, &quot; &amp; [.H948]&amp;&quot;,  &quot;&amp;[.I948]&amp;&quot; &quot;&amp;[.J948]&amp;&quot;, &quot;&amp;[.K94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49]&amp;&quot;, &quot; &amp; [.H949]&amp;&quot;,  &quot;&amp;[.I949]&amp;&quot; &quot;&amp;[.J949]&amp;&quot;, &quot;&amp;[.K94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0]&amp;&quot;, &quot; &amp; [.H950]&amp;&quot;,  &quot;&amp;[.I950]&amp;&quot; &quot;&amp;[.J950]&amp;&quot;, &quot;&amp;[.K95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1]&amp;&quot;, &quot; &amp; [.H951]&amp;&quot;,  &quot;&amp;[.I951]&amp;&quot; &quot;&amp;[.J951]&amp;&quot;, &quot;&amp;[.K95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2]&amp;&quot;, &quot; &amp; [.H952]&amp;&quot;,  &quot;&amp;[.I952]&amp;&quot; &quot;&amp;[.J952]&amp;&quot;, &quot;&amp;[.K95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3]&amp;&quot;, &quot; &amp; [.H953]&amp;&quot;,  &quot;&amp;[.I953]&amp;&quot; &quot;&amp;[.J953]&amp;&quot;, &quot;&amp;[.K95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4]&amp;&quot;, &quot; &amp; [.H954]&amp;&quot;,  &quot;&amp;[.I954]&amp;&quot; &quot;&amp;[.J954]&amp;&quot;, &quot;&amp;[.K95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5]&amp;&quot;, &quot; &amp; [.H955]&amp;&quot;,  &quot;&amp;[.I955]&amp;&quot; &quot;&amp;[.J955]&amp;&quot;, &quot;&amp;[.K95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6]&amp;&quot;, &quot; &amp; [.H956]&amp;&quot;,  &quot;&amp;[.I956]&amp;&quot; &quot;&amp;[.J956]&amp;&quot;, &quot;&amp;[.K95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7]&amp;&quot;, &quot; &amp; [.H957]&amp;&quot;,  &quot;&amp;[.I957]&amp;&quot; &quot;&amp;[.J957]&amp;&quot;, &quot;&amp;[.K95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8]&amp;&quot;, &quot; &amp; [.H958]&amp;&quot;,  &quot;&amp;[.I958]&amp;&quot; &quot;&amp;[.J958]&amp;&quot;, &quot;&amp;[.K95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59]&amp;&quot;, &quot; &amp; [.H959]&amp;&quot;,  &quot;&amp;[.I959]&amp;&quot; &quot;&amp;[.J959]&amp;&quot;, &quot;&amp;[.K95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0]&amp;&quot;, &quot; &amp; [.H960]&amp;&quot;,  &quot;&amp;[.I960]&amp;&quot; &quot;&amp;[.J960]&amp;&quot;, &quot;&amp;[.K96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1]&amp;&quot;, &quot; &amp; [.H961]&amp;&quot;,  &quot;&amp;[.I961]&amp;&quot; &quot;&amp;[.J961]&amp;&quot;, &quot;&amp;[.K96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2]&amp;&quot;, &quot; &amp; [.H962]&amp;&quot;,  &quot;&amp;[.I962]&amp;&quot; &quot;&amp;[.J962]&amp;&quot;, &quot;&amp;[.K96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3]&amp;&quot;, &quot; &amp; [.H963]&amp;&quot;,  &quot;&amp;[.I963]&amp;&quot; &quot;&amp;[.J963]&amp;&quot;, &quot;&amp;[.K96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4]&amp;&quot;, &quot; &amp; [.H964]&amp;&quot;,  &quot;&amp;[.I964]&amp;&quot; &quot;&amp;[.J964]&amp;&quot;, &quot;&amp;[.K96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5]&amp;&quot;, &quot; &amp; [.H965]&amp;&quot;,  &quot;&amp;[.I965]&amp;&quot; &quot;&amp;[.J965]&amp;&quot;, &quot;&amp;[.K96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6]&amp;&quot;, &quot; &amp; [.H966]&amp;&quot;,  &quot;&amp;[.I966]&amp;&quot; &quot;&amp;[.J966]&amp;&quot;, &quot;&amp;[.K96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7]&amp;&quot;, &quot; &amp; [.H967]&amp;&quot;,  &quot;&amp;[.I967]&amp;&quot; &quot;&amp;[.J967]&amp;&quot;, &quot;&amp;[.K96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8]&amp;&quot;, &quot; &amp; [.H968]&amp;&quot;,  &quot;&amp;[.I968]&amp;&quot; &quot;&amp;[.J968]&amp;&quot;, &quot;&amp;[.K96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69]&amp;&quot;, &quot; &amp; [.H969]&amp;&quot;,  &quot;&amp;[.I969]&amp;&quot; &quot;&amp;[.J969]&amp;&quot;, &quot;&amp;[.K96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0]&amp;&quot;, &quot; &amp; [.H970]&amp;&quot;,  &quot;&amp;[.I970]&amp;&quot; &quot;&amp;[.J970]&amp;&quot;, &quot;&amp;[.K97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1]&amp;&quot;, &quot; &amp; [.H971]&amp;&quot;,  &quot;&amp;[.I971]&amp;&quot; &quot;&amp;[.J971]&amp;&quot;, &quot;&amp;[.K97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2]&amp;&quot;, &quot; &amp; [.H972]&amp;&quot;,  &quot;&amp;[.I972]&amp;&quot; &quot;&amp;[.J972]&amp;&quot;, &quot;&amp;[.K97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3]&amp;&quot;, &quot; &amp; [.H973]&amp;&quot;,  &quot;&amp;[.I973]&amp;&quot; &quot;&amp;[.J973]&amp;&quot;, &quot;&amp;[.K97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4]&amp;&quot;, &quot; &amp; [.H974]&amp;&quot;,  &quot;&amp;[.I974]&amp;&quot; &quot;&amp;[.J974]&amp;&quot;, &quot;&amp;[.K97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5]&amp;&quot;, &quot; &amp; [.H975]&amp;&quot;,  &quot;&amp;[.I975]&amp;&quot; &quot;&amp;[.J975]&amp;&quot;, &quot;&amp;[.K97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6]&amp;&quot;, &quot; &amp; [.H976]&amp;&quot;,  &quot;&amp;[.I976]&amp;&quot; &quot;&amp;[.J976]&amp;&quot;, &quot;&amp;[.K97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7]&amp;&quot;, &quot; &amp; [.H977]&amp;&quot;,  &quot;&amp;[.I977]&amp;&quot; &quot;&amp;[.J977]&amp;&quot;, &quot;&amp;[.K97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8]&amp;&quot;, &quot; &amp; [.H978]&amp;&quot;,  &quot;&amp;[.I978]&amp;&quot; &quot;&amp;[.J978]&amp;&quot;, &quot;&amp;[.K97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79]&amp;&quot;, &quot; &amp; [.H979]&amp;&quot;,  &quot;&amp;[.I979]&amp;&quot; &quot;&amp;[.J979]&amp;&quot;, &quot;&amp;[.K97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0]&amp;&quot;, &quot; &amp; [.H980]&amp;&quot;,  &quot;&amp;[.I980]&amp;&quot; &quot;&amp;[.J980]&amp;&quot;, &quot;&amp;[.K980]"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1]&amp;&quot;, &quot; &amp; [.H981]&amp;&quot;,  &quot;&amp;[.I981]&amp;&quot; &quot;&amp;[.J981]&amp;&quot;, &quot;&amp;[.K981]"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2]&amp;&quot;, &quot; &amp; [.H982]&amp;&quot;,  &quot;&amp;[.I982]&amp;&quot; &quot;&amp;[.J982]&amp;&quot;, &quot;&amp;[.K982]"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3]&amp;&quot;, &quot; &amp; [.H983]&amp;&quot;,  &quot;&amp;[.I983]&amp;&quot; &quot;&amp;[.J983]&amp;&quot;, &quot;&amp;[.K983]"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4]&amp;&quot;, &quot; &amp; [.H984]&amp;&quot;,  &quot;&amp;[.I984]&amp;&quot; &quot;&amp;[.J984]&amp;&quot;, &quot;&amp;[.K984]"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5]&amp;&quot;, &quot; &amp; [.H985]&amp;&quot;,  &quot;&amp;[.I985]&amp;&quot; &quot;&amp;[.J985]&amp;&quot;, &quot;&amp;[.K985]"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6]&amp;&quot;, &quot; &amp; [.H986]&amp;&quot;,  &quot;&amp;[.I986]&amp;&quot; &quot;&amp;[.J986]&amp;&quot;, &quot;&amp;[.K986]"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7]&amp;&quot;, &quot; &amp; [.H987]&amp;&quot;,  &quot;&amp;[.I987]&amp;&quot; &quot;&amp;[.J987]&amp;&quot;, &quot;&amp;[.K987]"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8]&amp;&quot;, &quot; &amp; [.H988]&amp;&quot;,  &quot;&amp;[.I988]&amp;&quot; &quot;&amp;[.J988]&amp;&quot;, &quot;&amp;[.K988]"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89]&amp;&quot;, &quot; &amp; [.H989]&amp;&quot;,  &quot;&amp;[.I989]&amp;&quot; &quot;&amp;[.J989]&amp;&quot;, &quot;&amp;[.K989]" office:value-type="string" office:string-value=", ,   , " calcext:value-type="string">
            <text:p>, , <text:s text:c="2"/>, </text:p>
          </table:table-cell>
          <table:table-cell table:number-columns-repeated="1012"/>
        </table:table-row>
        <table:table-row table:style-name="ro9" table:visibility="collapse">
          <table:table-cell table:style-name="ce61" table:content-validation-name="val3"/>
          <table:table-cell table:style-name="ce61" table:content-validation-name="val4"/>
          <table:table-cell table:style-name="ce61" table:content-validation-name="val5"/>
          <table:table-cell table:number-columns-repeated="4"/>
          <table:table-cell table:style-name="ce63"/>
          <table:table-cell table:number-columns-repeated="3"/>
          <table:table-cell table:style-name="ce61" table:formula="of:=[.G990]&amp;&quot;, &quot; &amp; [.H990]&amp;&quot;,  &quot;&amp;[.I990]&amp;&quot; &quot;&amp;[.J990]&amp;&quot;, &quot;&amp;[.K990]" office:value-type="string" office:string-value=", ,   , " calcext:value-type="string">
            <text:p>, , <text:s text:c="2"/>, </text:p>
          </table:table-cell>
          <table:table-cell table:number-columns-repeated="1012"/>
        </table:table-row>
        <table:table-row table:style-name="ro4" table:number-rows-repeated="1047585">
          <table:table-cell table:number-columns-repeated="1024"/>
        </table:table-row>
        <table:table-row table:style-name="ro4">
          <table:table-cell table:number-columns-repeated="1024"/>
        </table:table-row>
        <table:named-expressions>
          <table:named-range table:name="_xlnm._FilterDatabase" table:base-cell-address="$Dashboard.$A$1" table:cell-range-address="$'Extra Data'.$A$1:.$L$990"/>
        </table:named-expressions>
      </table:table>
      <table:table table:name="TPOP Sites" table:style-name="ta5">
        <table:table-column table:style-name="co23"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 table:number-columns-repeated="1019" table:default-cell-style-name="Default"/>
        <table:table-row table:style-name="ro9">
          <table:table-cell table:style-name="ce64" office:value-type="string" calcext:value-type="string">
            <text:p>LOCODE</text:p>
          </table:table-cell>
          <table:table-cell table:style-name="ce64" office:value-type="string" calcext:value-type="string">
            <text:p>Site / City &amp; Provider</text:p>
          </table:table-cell>
          <table:table-cell table:style-name="ce64" office:value-type="string" calcext:value-type="string">
            <text:p>Country</text:p>
          </table:table-cell>
          <table:table-cell table:style-name="ce64" office:value-type="string" calcext:value-type="string">
            <text:p>Address</text:p>
          </table:table-cell>
          <table:table-cell table:style-name="ce64" office:value-type="string" calcext:value-type="string">
            <text:p>Notes</text:p>
          </table:table-cell>
          <table:table-cell table:number-columns-repeated="1019"/>
        </table:table-row>
        <table:table-row table:style-name="ro9">
          <table:table-cell table:style-name="ce65" office:value-type="string" calcext:value-type="string">
            <text:p>US-DEN01</text:p>
          </table:table-cell>
          <table:table-cell table:style-name="ce65" office:value-type="string" calcext:value-type="string">
            <text:p>Denver – Equinix / QTS POP</text:p>
          </table:table-cell>
          <table:table-cell table:style-name="ce65" table:content-validation-name="val6" office:value-type="string" calcext:value-type="string">
            <text:p>USA</text:p>
          </table:table-cell>
          <table:table-cell table:style-name="ce65" office:value-type="string" calcext:value-type="string">
            <text:p>910 15th St, Denver, CO 80202, USA</text:p>
          </table:table-cell>
          <table:table-cell table:style-name="ce65" office:value-type="string" calcext:value-type="string">
            <text:p>Marked Transit POP (tpop) in Addresses – Master List; no hall/rack counts in summary.</text:p>
          </table:table-cell>
          <table:table-cell table:number-columns-repeated="1019"/>
        </table:table-row>
        <table:table-row table:style-name="ro9">
          <table:table-cell table:style-name="ce65" office:value-type="string" calcext:value-type="string">
            <text:p>US-LAX01</text:p>
          </table:table-cell>
          <table:table-cell table:style-name="ce65" office:value-type="string" calcext:value-type="string">
            <text:p>Los Angeles – Coresite / Equinix</text:p>
          </table:table-cell>
          <table:table-cell table:style-name="ce65" table:content-validation-name="val6" office:value-type="string" calcext:value-type="string">
            <text:p>USA</text:p>
          </table:table-cell>
          <table:table-cell table:style-name="ce65" office:value-type="string" calcext:value-type="string">
            <text:p>624 S Grand Ave, Los Angeles, CA 90017, USA</text:p>
          </table:table-cell>
          <table:table-cell table:style-name="ce65" office:value-type="string" calcext:value-type="string">
            <text:p>Transit POP serving LAX region.</text:p>
          </table:table-cell>
          <table:table-cell table:number-columns-repeated="1019"/>
        </table:table-row>
        <table:table-row table:style-name="ro9">
          <table:table-cell table:style-name="ce65" office:value-type="string" calcext:value-type="string">
            <text:p>US-SEA01</text:p>
          </table:table-cell>
          <table:table-cell table:style-name="ce65" office:value-type="string" calcext:value-type="string">
            <text:p>Seattle – 6th Ave #300</text:p>
          </table:table-cell>
          <table:table-cell table:style-name="ce65" table:content-validation-name="val6" office:value-type="string" calcext:value-type="string">
            <text:p>USA</text:p>
          </table:table-cell>
          <table:table-cell table:style-name="ce65" office:value-type="string" calcext:value-type="string">
            <text:p>2001 6th Ave #300, Seattle, WA 98121, USA</text:p>
          </table:table-cell>
          <table:table-cell table:style-name="ce65" office:value-type="string" calcext:value-type="string">
            <text:p>Transit POP (Seattle #1).</text:p>
          </table:table-cell>
          <table:table-cell table:number-columns-repeated="1019"/>
        </table:table-row>
        <table:table-row table:style-name="ro9">
          <table:table-cell table:style-name="ce65" office:value-type="string" calcext:value-type="string">
            <text:p>US-QAS01</text:p>
          </table:table-cell>
          <table:table-cell table:style-name="ce65" office:value-type="string" calcext:value-type="string">
            <text:p>Ashburn – Equinix DCx</text:p>
          </table:table-cell>
          <table:table-cell table:style-name="ce65" table:content-validation-name="val6" office:value-type="string" calcext:value-type="string">
            <text:p>USA</text:p>
          </table:table-cell>
          <table:table-cell table:style-name="ce65" office:value-type="string" calcext:value-type="string">
            <text:p>21715 Filigree Ct, Ashburn, VA 20147, USA</text:p>
          </table:table-cell>
          <table:table-cell table:style-name="ce65" office:value-type="string" calcext:value-type="string">
            <text:p>Transit POP; matches US-QAS01 example in cw_sot docs.</text:p>
          </table:table-cell>
          <table:table-cell table:number-columns-repeated="1019"/>
        </table:table-row>
        <table:table-row table:style-name="ro9">
          <table:table-cell table:style-name="ce65" office:value-type="string" calcext:value-type="string">
            <text:p>US-ATL03</text:p>
          </table:table-cell>
          <table:table-cell table:style-name="ce65" office:value-type="string" calcext:value-type="string">
            <text:p>Atlanta – 180 Peachtree</text:p>
          </table:table-cell>
          <table:table-cell table:style-name="ce65" table:content-validation-name="val6" office:value-type="string" calcext:value-type="string">
            <text:p>USA</text:p>
          </table:table-cell>
          <table:table-cell table:style-name="ce65" office:value-type="string" calcext:value-type="string">
            <text:p>180 Peachtree St, Atlanta, GA 30303, USA</text:p>
          </table:table-cell>
          <table:table-cell table:style-name="ce65" office:value-type="string" calcext:value-type="string">
            <text:p>Transit POP for ATL metro; used in cw_sot as locode="US-ATL3" example.</text:p>
          </table:table-cell>
          <table:table-cell table:number-columns-repeated="1019"/>
        </table:table-row>
        <table:table-row table:style-name="ro9">
          <table:table-cell table:style-name="ce65" office:value-type="string" calcext:value-type="string">
            <text:p>US-CHI01</text:p>
          </table:table-cell>
          <table:table-cell table:style-name="ce65" office:value-type="string" calcext:value-type="string">
            <text:p>Chicago – Equinix 350 E Cermak</text:p>
          </table:table-cell>
          <table:table-cell table:style-name="ce65" table:content-validation-name="val6" office:value-type="string" calcext:value-type="string">
            <text:p>USA</text:p>
          </table:table-cell>
          <table:table-cell table:style-name="ce65" office:value-type="string" calcext:value-type="string">
            <text:p>CoreWeave c/o Equinix, 350 E Cermak Rd, Chicago, IL 60616, USA</text:p>
          </table:table-cell>
          <table:table-cell table:style-name="ce65" office:value-type="string" calcext:value-type="string">
            <text:p>Chicago transit POP.</text:p>
          </table:table-cell>
          <table:table-cell table:number-columns-repeated="1019"/>
        </table:table-row>
        <table:table-row table:style-name="ro9">
          <table:table-cell table:style-name="ce65" office:value-type="string" calcext:value-type="string">
            <text:p>US-PHL01</text:p>
          </table:table-cell>
          <table:table-cell table:style-name="ce65" office:value-type="string" calcext:value-type="string">
            <text:p>Philadelphia – 401 N Broad</text:p>
          </table:table-cell>
          <table:table-cell table:style-name="ce65" table:content-validation-name="val6" office:value-type="string" calcext:value-type="string">
            <text:p>USA</text:p>
          </table:table-cell>
          <table:table-cell table:style-name="ce65" office:value-type="string" calcext:value-type="string">
            <text:p>401 N Broad St, Philadelphia, PA 19108, USA</text:p>
          </table:table-cell>
          <table:table-cell table:style-name="ce65" office:value-type="string" calcext:value-type="string">
            <text:p>Philadelphia transit POP.</text:p>
          </table:table-cell>
          <table:table-cell table:number-columns-repeated="1019"/>
        </table:table-row>
        <table:table-row table:style-name="ro9">
          <table:table-cell table:style-name="ce65" office:value-type="string" calcext:value-type="string">
            <text:p>US-QTS01</text:p>
          </table:table-cell>
          <table:table-cell table:style-name="ce65" office:value-type="string" calcext:value-type="string">
            <text:p>Englewood (Denver) – QTS</text:p>
          </table:table-cell>
          <table:table-cell table:style-name="ce65" table:content-validation-name="val6" office:value-type="string" calcext:value-type="string">
            <text:p>USA</text:p>
          </table:table-cell>
          <table:table-cell table:style-name="ce65" office:value-type="string" calcext:value-type="string">
            <text:p>CoreWeave c/o QTS, 335 Inverness Dr S, Englewood, CO 80112, USA</text:p>
          </table:table-cell>
          <table:table-cell table:style-name="ce65" office:value-type="string" calcext:value-type="string">
            <text:p>Transit POP at QTS.</text:p>
          </table:table-cell>
          <table:table-cell table:number-columns-repeated="1019"/>
        </table:table-row>
        <table:table-row table:style-name="ro9">
          <table:table-cell table:style-name="ce65" office:value-type="string" calcext:value-type="string">
            <text:p>US-SEA02</text:p>
          </table:table-cell>
          <table:table-cell table:style-name="ce65" office:value-type="string" calcext:value-type="string">
            <text:p>Seattle – 6th Ave #350</text:p>
          </table:table-cell>
          <table:table-cell table:style-name="ce65" table:content-validation-name="val6" office:value-type="string" calcext:value-type="string">
            <text:p>USA</text:p>
          </table:table-cell>
          <table:table-cell table:style-name="ce65" office:value-type="string" calcext:value-type="string">
            <text:p>2001 6th Ave #350, Seattle, WA 98121, USA</text:p>
          </table:table-cell>
          <table:table-cell table:style-name="ce65" office:value-type="string" calcext:value-type="string">
            <text:p>Second Seattle transit POP.</text:p>
          </table:table-cell>
          <table:table-cell table:number-columns-repeated="1019"/>
        </table:table-row>
        <table:table-row table:style-name="ro9">
          <table:table-cell table:style-name="ce65" office:value-type="string" calcext:value-type="string">
            <text:p>US-SJC01</text:p>
          </table:table-cell>
          <table:table-cell table:style-name="ce65" office:value-type="string" calcext:value-type="string">
            <text:p>San Jose – Equinix SV1</text:p>
          </table:table-cell>
          <table:table-cell table:style-name="ce65" table:content-validation-name="val6" office:value-type="string" calcext:value-type="string">
            <text:p>USA</text:p>
          </table:table-cell>
          <table:table-cell table:style-name="ce65" office:value-type="string" calcext:value-type="string">
            <text:p>11 Great Oaks Blvd, San Jose, CA 95119, USA</text:p>
          </table:table-cell>
          <table:table-cell table:style-name="ce65" office:value-type="string" calcext:value-type="string">
            <text:p>Silicon Valley POP; referenced in DC site info as US-SJC01.</text:p>
          </table:table-cell>
          <table:table-cell table:number-columns-repeated="1019"/>
        </table:table-row>
        <table:table-row table:style-name="ro9">
          <table:table-cell table:style-name="ce65" office:value-type="string" calcext:value-type="string">
            <text:p>US-UYK01</text:p>
          </table:table-cell>
          <table:table-cell table:style-name="ce65" office:value-type="string" calcext:value-type="string">
            <text:p>Secaucus – Equinix NY6</text:p>
          </table:table-cell>
          <table:table-cell table:style-name="ce65" table:content-validation-name="val6" office:value-type="string" calcext:value-type="string">
            <text:p>USA</text:p>
          </table:table-cell>
          <table:table-cell table:style-name="ce65" office:value-type="string" calcext:value-type="string">
            <text:p>105 Enterprise Ave S, Secaucus, NJ 07094, USA</text:p>
          </table:table-cell>
          <table:table-cell table:style-name="ce65" office:value-type="string" calcext:value-type="string">
            <text:p>NY/NJ transit POP (US-UYK01) used in cw_sot examples.</text:p>
          </table:table-cell>
          <table:table-cell table:number-columns-repeated="1019"/>
        </table:table-row>
        <table:table-row table:style-name="ro9">
          <table:table-cell table:style-name="ce65" office:value-type="string" calcext:value-type="string">
            <text:p>US-HIO04</text:p>
          </table:table-cell>
          <table:table-cell table:style-name="ce65" office:value-type="string" calcext:value-type="string">
            <text:p>Hillsboro – Opus / Evergreen Pkwy</text:p>
          </table:table-cell>
          <table:table-cell table:style-name="ce65" table:content-validation-name="val6" office:value-type="string" calcext:value-type="string">
            <text:p>USA</text:p>
          </table:table-cell>
          <table:table-cell table:style-name="ce65" office:value-type="string" calcext:value-type="string">
            <text:p>8135 NE Evergreen Pkwy, Hillsboro, OR 97124, USA</text:p>
          </table:table-cell>
          <table:table-cell table:style-name="ce65" office:value-type="string" calcext:value-type="string">
            <text:p>Hillsboro transit POP US-HIO04.</text:p>
          </table:table-cell>
          <table:table-cell table:number-columns-repeated="1019"/>
        </table:table-row>
        <table:table-row table:style-name="ro9">
          <table:table-cell table:style-name="ce65" office:value-type="string" calcext:value-type="string">
            <text:p>US-DAL01</text:p>
          </table:table-cell>
          <table:table-cell table:style-name="ce65" office:value-type="string" calcext:value-type="string">
            <text:p>Dallas – 1990 N Stemmons</text:p>
          </table:table-cell>
          <table:table-cell table:style-name="ce65" table:content-validation-name="val6" office:value-type="string" calcext:value-type="string">
            <text:p>USA</text:p>
          </table:table-cell>
          <table:table-cell table:style-name="ce65" office:value-type="string" calcext:value-type="string">
            <text:p>1990 N Stemmons Fwy, Dallas, TX 75207, USA</text:p>
          </table:table-cell>
          <table:table-cell table:style-name="ce65" office:value-type="string" calcext:value-type="string">
            <text:p>Dallas transit POP.</text:p>
          </table:table-cell>
          <table:table-cell table:number-columns-repeated="1019"/>
        </table:table-row>
        <table:table-row table:style-name="ro9">
          <table:table-cell table:style-name="ce65" office:value-type="string" calcext:value-type="string">
            <text:p>CA-TOR01</text:p>
          </table:table-cell>
          <table:table-cell table:style-name="ce65" office:value-type="string" calcext:value-type="string">
            <text:p>Toronto – Equinix TR2</text:p>
          </table:table-cell>
          <table:table-cell table:style-name="ce65" table:content-validation-name="val6" office:value-type="string" calcext:value-type="string">
            <text:p>Canada</text:p>
          </table:table-cell>
          <table:table-cell table:style-name="ce65" office:value-type="string" calcext:value-type="string">
            <text:p>45 Parliament St, Toronto, ON M5A 2Y5, Canada</text:p>
          </table:table-cell>
          <table:table-cell table:style-name="ce65" office:value-type="string" calcext:value-type="string">
            <text:p># LOCODE summary: 4 data halls, 18 racks, 0 devices; marked CoreWeave T‑POP (Transit POP).</text:p>
          </table:table-cell>
          <table:table-cell table:number-columns-repeated="1019"/>
        </table:table-row>
        <table:table-row table:style-name="ro9">
          <table:table-cell table:style-name="ce65" office:value-type="string" calcext:value-type="string">
            <text:p>DE-FRA01</text:p>
          </table:table-cell>
          <table:table-cell table:style-name="ce65" office:value-type="string" calcext:value-type="string">
            <text:p>Frankfurt – Equinix M12002 / cage(s)</text:p>
          </table:table-cell>
          <table:table-cell table:style-name="ce65" table:content-validation-name="val6" office:value-type="string" calcext:value-type="string">
            <text:p>Germany</text:p>
          </table:table-cell>
          <table:table-cell table:style-name="ce65" office:value-type="string" calcext:value-type="string">
            <text:p>Kleyerstraße 90, 60326 Frankfurt am Main, Germany</text:p>
          </table:table-cell>
          <table:table-cell table:style-name="ce65" office:value-type="string" calcext:value-type="string">
            <text:p>Summary shows 5 data halls, 24 racks, 0 devices; site described as CoreWeave T‑POP (Transit POP), with cage M12002 etc.</text:p>
          </table:table-cell>
          <table:table-cell table:number-columns-repeated="1019"/>
        </table:table-row>
        <table:table-row table:style-name="ro9">
          <table:table-cell table:style-name="ce65" office:value-type="string" calcext:value-type="string">
            <text:p>ES-BCN02</text:p>
          </table:table-cell>
          <table:table-cell table:style-name="ce65" office:value-type="string" calcext:value-type="string">
            <text:p>Barcelona – Equinix (Carrer de l’Acer) T‑POP</text:p>
          </table:table-cell>
          <table:table-cell table:style-name="ce65" table:content-validation-name="val6" office:value-type="string" calcext:value-type="string">
            <text:p>Spain</text:p>
          </table:table-cell>
          <table:table-cell table:style-name="ce65" office:value-type="string" calcext:value-type="string">
            <text:p>Carrer de l’Acer 30–32, 08038 Barcelona, Spain</text:p>
          </table:table-cell>
          <table:table-cell table:style-name="ce65" office:value-type="string" calcext:value-type="string">
            <text:p>Summary row: 4 data halls, 21 racks, 0 devices; explicitly noted as CoreWeave T‑POP (Transit POP).</text:p>
          </table:table-cell>
          <table:table-cell table:number-columns-repeated="1019"/>
        </table:table-row>
        <table:table-row table:style-name="ro4" table:number-rows-repeated="1048558">
          <table:table-cell table:number-columns-repeated="1024"/>
        </table:table-row>
        <table:table-row table:style-name="ro4">
          <table:table-cell table:number-columns-repeated="1024"/>
        </table:table-row>
      </table:table>
      <table:table table:name="Site Storage Status" table:style-name="ta6">
        <table:table-column table:style-name="co35" table:default-cell-style-name="Default"/>
        <table:table-column table:style-name="co36" table:default-cell-style-name="Default"/>
        <table:table-column table:style-name="co6" table:default-cell-style-name="Default"/>
        <table:table-column table:style-name="co37" table:default-cell-style-name="Default"/>
        <table:table-column table:style-name="co38" table:default-cell-style-name="Default"/>
        <table:table-column table:style-name="co37" table:default-cell-style-name="Default"/>
        <table:table-column table:style-name="co39" table:default-cell-style-name="Default"/>
        <table:table-column table:style-name="co3" table:number-columns-repeated="1017" table:default-cell-style-name="Default"/>
        <table:table-row table:style-name="ro1">
          <table:table-cell table:style-name="ce52" office:value-type="string" calcext:value-type="string">
            <text:p>LOCODE</text:p>
          </table:table-cell>
          <table:table-cell table:style-name="ce52" office:value-type="string" calcext:value-type="string">
            <text:p>Regional ICM</text:p>
          </table:table-cell>
          <table:table-cell table:style-name="ce52" office:value-type="string" calcext:value-type="string">
            <text:p>ICS</text:p>
          </table:table-cell>
          <table:table-cell table:style-name="ce67" office:value-type="string" calcext:value-type="string">
            <text:p>Current Storage Space Status</text:p>
          </table:table-cell>
          <table:table-cell table:style-name="ce67" office:value-type="string" calcext:value-type="string">
            <text:p>Most Recent Count Date</text:p>
            <text:p>(Q? 20??):</text:p>
          </table:table-cell>
          <table:table-cell table:style-name="ce67" office:value-type="string" calcext:value-type="string">
            <text:p>Any CCACs on-site?</text:p>
          </table:table-cell>
          <table:table-cell table:style-name="ce67" office:value-type="string" calcext:value-type="string">
            <text:p>Stored Items Status:</text:p>
          </table:table-cell>
          <table:table-cell table:number-columns-repeated="1017"/>
        </table:table-row>
        <table:table-row table:style-name="ro1">
          <table:table-cell table:style-name="ce53" office:value-type="string" calcext:value-type="string">
            <text:p>Schertz TX - 3PL</text:p>
          </table:table-cell>
          <table:table-cell table:style-name="ce53" table:content-validation-name="val7" office:value-type="string" calcext:value-type="string">
            <text:p>Jesus Robles</text:p>
          </table:table-cell>
          <table:table-cell table:style-name="ce53" table:content-validation-name="val8" office:value-type="string" calcext:value-type="string">
            <text:p>Jesse Flores</text:p>
          </table:table-cell>
          <table:table-cell table:style-name="ce53" table:content-validation-name="val9" office:value-type="string" calcext:value-type="string">
            <text:p>Moderately full</text:p>
          </table:table-cell>
          <table:table-cell table:style-name="ce53" table:content-validation-name="val10" office:value-type="string" calcext:value-type="string">
            <text:p>Q4, 2025</text:p>
          </table:table-cell>
          <table:table-cell table:style-name="ce68" table:content-validation-name="val11"/>
          <table:table-cell table:style-name="ce53" table:content-validation-name="val12" office:value-type="string" calcext:value-type="string">
            <text:p>Palletized</text:p>
          </table:table-cell>
          <table:table-cell table:number-columns-repeated="1017"/>
        </table:table-row>
        <table:table-row table:style-name="ro1">
          <table:table-cell table:style-name="ce54" office:value-type="string" calcext:value-type="string">
            <text:p>US-AUS01</text:p>
          </table:table-cell>
          <table:table-cell table:style-name="ce54" table:content-validation-name="val7" office:value-type="string" calcext:value-type="string">
            <text:p>Jesus Robles</text:p>
          </table:table-cell>
          <table:table-cell table:style-name="ce54" table:content-validation-name="val8" office:value-type="string" calcext:value-type="string">
            <text:p>Brady Bonario</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DTN01</text:p>
          </table:table-cell>
          <table:table-cell table:style-name="ce53" table:content-validation-name="val7" office:value-type="string" calcext:value-type="string">
            <text:p>Jesus Robles</text:p>
          </table:table-cell>
          <table:table-cell table:style-name="ce53" table:content-validation-name="val8" office:value-type="string" calcext:value-type="string">
            <text:p>Terry Simien, Arthur Tran, Jason Turek, Alyson McElroy, Jaylon Heller, Justin Czubas, Randall Gomez, My Bui</text:p>
          </table:table-cell>
          <table:table-cell table:style-name="ce53" table:content-validation-name="val9" office:value-type="string" calcext:value-type="string">
            <text:p>Moderately full</text:p>
          </table:table-cell>
          <table:table-cell table:style-name="ce53" table:content-validation-name="val10"/>
          <table:table-cell table:style-name="ce68" table:content-validation-name="val11" office:value-type="string" calcext:value-type="string">
            <text:p>Yes</text:p>
          </table:table-cell>
          <table:table-cell table:style-name="ce53" table:content-validation-name="val12" office:value-type="string" calcext:value-type="string">
            <text:p>Palletized</text:p>
          </table:table-cell>
          <table:table-cell table:number-columns-repeated="1017"/>
        </table:table-row>
        <table:table-row table:style-name="ro1">
          <table:table-cell table:style-name="ce54" office:value-type="string" calcext:value-type="string">
            <text:p>US-PLZ01</text:p>
          </table:table-cell>
          <table:table-cell table:style-name="ce54" table:content-validation-name="val7" office:value-type="string" calcext:value-type="string">
            <text:p>Jesus Robles</text:p>
          </table:table-cell>
          <table:table-cell table:style-name="ce54" table:content-validation-name="val8" office:value-type="string" calcext:value-type="string">
            <text:p>Esteban Sotelo, Anthony Navarrete</text:p>
          </table:table-cell>
          <table:table-cell table:style-name="ce54" table:content-validation-name="val9" office:value-type="string" calcext:value-type="string">
            <text:p>Moderately full</text:p>
          </table:table-cell>
          <table:table-cell table:style-name="ce54" table:content-validation-name="val10" office:value-type="string" calcext:value-type="string">
            <text:p>Q2, 2025</text:p>
          </table:table-cell>
          <table:table-cell table:style-name="ce69" table:content-validation-name="val11" office:value-type="string" calcext:value-type="string">
            <text:p>Yes</text:p>
          </table:table-cell>
          <table:table-cell table:style-name="ce54" table:content-validation-name="val12"/>
          <table:table-cell table:number-columns-repeated="1017"/>
        </table:table-row>
        <table:table-row table:style-name="ro1">
          <table:table-cell table:style-name="ce53" office:value-type="string" calcext:value-type="string">
            <text:p>US-PLZ02</text:p>
          </table:table-cell>
          <table:table-cell table:style-name="ce53" table:content-validation-name="val7" office:value-type="string" calcext:value-type="string">
            <text:p>Jesus Robles</text:p>
          </table:table-cell>
          <table:table-cell table:style-name="ce53" table:content-validation-name="val8" office:value-type="string" calcext:value-type="string">
            <text:p>Ben Pauling</text:p>
          </table:table-cell>
          <table:table-cell table:style-name="ce53" table:content-validation-name="val9" office:value-type="string" calcext:value-type="string">
            <text:p>Moderately full</text:p>
          </table:table-cell>
          <table:table-cell table:style-name="ce53" table:content-validation-name="val10" office:value-type="string" calcext:value-type="string">
            <text:p>Q3, 2025</text:p>
          </table:table-cell>
          <table:table-cell table:style-name="ce68" table:content-validation-name="val11" office:value-type="string" calcext:value-type="string">
            <text:p>Yes</text:p>
          </table:table-cell>
          <table:table-cell table:style-name="ce53" table:content-validation-name="val12" office:value-type="string" calcext:value-type="string">
            <text:p>Palletized</text:p>
          </table:table-cell>
          <table:table-cell table:number-columns-repeated="1017"/>
        </table:table-row>
        <table:table-row table:style-name="ro1">
          <table:table-cell table:style-name="ce54" office:value-type="string" calcext:value-type="string">
            <text:p>US-RIN01</text:p>
          </table:table-cell>
          <table:table-cell table:style-name="ce54" table:content-validation-name="val7" office:value-type="string" calcext:value-type="string">
            <text:p>Jesus Robles</text:p>
          </table:table-cell>
          <table:table-cell table:style-name="ce54" table:content-validation-name="val8" office:value-type="string" calcext:value-type="string">
            <text:p>Anthony Neis</text:p>
          </table:table-cell>
          <table:table-cell table:style-name="ce54" table:content-validation-name="val9" office:value-type="string" calcext:value-type="string">
            <text:p>Moderately full</text:p>
          </table:table-cell>
          <table:table-cell table:style-name="ce54" table:content-validation-name="val10" office:value-type="string" calcext:value-type="string">
            <text:p>2025</text:p>
          </table:table-cell>
          <table:table-cell table:style-name="ce69" table:content-validation-name="val11" office:value-type="string" calcext:value-type="string">
            <text:p>Yes</text:p>
          </table:table-cell>
          <table:table-cell table:style-name="ce54" table:content-validation-name="val12"/>
          <table:table-cell table:number-columns-repeated="1017"/>
        </table:table-row>
        <table:table-row table:style-name="ro1">
          <table:table-cell table:style-name="ce53" office:value-type="string" calcext:value-type="string">
            <text:p>US-HIO01</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Jesse Brackenbury</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HIO02</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Jesse Brackenbury</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HIO03</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Francis Cabangcalan</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LAS01</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Robert White, Rafael Perez</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LAS02</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Robert White, Rafael Perez</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LAS03</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Robert White, Rafael Perez</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LYF01</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Kaelin Lipscomb</text:p>
          </table:table-cell>
          <table:table-cell table:style-name="ce53" table:content-validation-name="val9" office:value-type="string" calcext:value-type="string">
            <text:p>Moderately full</text:p>
          </table:table-cell>
          <table:table-cell table:style-name="ce53" table:content-validation-name="val10"/>
          <table:table-cell table:style-name="ce68" table:content-validation-name="val11" office:value-type="string" calcext:value-type="string">
            <text:p>Yes</text:p>
          </table:table-cell>
          <table:table-cell table:style-name="ce53" table:content-validation-name="val12"/>
          <table:table-cell table:number-columns-repeated="1017"/>
        </table:table-row>
        <table:table-row table:style-name="ro1">
          <table:table-cell table:style-name="ce54" office:value-type="string" calcext:value-type="string">
            <text:p>US-MSC01</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Tony Hendrix</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PHX01</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Rodrigo Espino</text:p>
          </table:table-cell>
          <table:table-cell table:style-name="ce53" table:content-validation-name="val9" office:value-type="string" calcext:value-type="string">
            <text:p>Moderately full</text:p>
          </table:table-cell>
          <table:table-cell table:style-name="ce53" table:content-validation-name="val10" office:value-type="string" calcext:value-type="string">
            <text:p>Q4, 2025</text:p>
          </table:table-cell>
          <table:table-cell table:style-name="ce68" table:content-validation-name="val11" office:value-type="string" calcext:value-type="string">
            <text:p>No</text:p>
          </table:table-cell>
          <table:table-cell table:style-name="ce53" table:content-validation-name="val12"/>
          <table:table-cell table:number-columns-repeated="1017"/>
        </table:table-row>
        <table:table-row table:style-name="ro1">
          <table:table-cell table:style-name="ce54" office:value-type="string" calcext:value-type="string">
            <text:p>US-SPK01</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Justin Fillmore</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office:value-type="string" calcext:value-type="string">
            <text:p>Palletized</text:p>
          </table:table-cell>
          <table:table-cell table:number-columns-repeated="1017"/>
        </table:table-row>
        <table:table-row table:style-name="ro1">
          <table:table-cell table:style-name="ce53" office:value-type="string" calcext:value-type="string">
            <text:p>US-SPK02</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Justin Fillmore</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SPK03</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Justin Fillmore</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LZL01</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John Sauer</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NKQ01</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Bryan Ennis</text:p>
          </table:table-cell>
          <table:table-cell table:style-name="ce54" table:content-validation-name="val9" office:value-type="string" calcext:value-type="string">
            <text:p>Lots of excess space</text:p>
          </table:table-cell>
          <table:table-cell table:style-name="ce54" table:content-validation-name="val10" office:value-type="string" calcext:value-type="string">
            <text:p>Q3, 2025</text:p>
          </table:table-cell>
          <table:table-cell table:style-name="ce69" table:content-validation-name="val11" office:value-type="string" calcext:value-type="string">
            <text:p>Yes</text:p>
          </table:table-cell>
          <table:table-cell table:style-name="ce54" table:content-validation-name="val12" office:value-type="string" calcext:value-type="string">
            <text:p>Palletized, Segregated by CCAC, Excess is labeled</text:p>
          </table:table-cell>
          <table:table-cell table:number-columns-repeated="1017"/>
        </table:table-row>
        <table:table-row table:style-name="ro1">
          <table:table-cell table:style-name="ce53" office:value-type="string" calcext:value-type="string">
            <text:p>US-NNN01</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Michael Rayburn</text:p>
          </table:table-cell>
          <table:table-cell table:style-name="ce53" table:content-validation-name="val9" office:value-type="string" calcext:value-type="string">
            <text:p>Lots of excess space</text:p>
          </table:table-cell>
          <table:table-cell table:style-name="ce53" table:content-validation-name="val10" office:value-type="string" calcext:value-type="string">
            <text:p>Q4</text:p>
          </table:table-cell>
          <table:table-cell table:style-name="ce68" table:content-validation-name="val11" office:value-type="string" calcext:value-type="string">
            <text:p>Yes</text:p>
          </table:table-cell>
          <table:table-cell table:style-name="ce53" table:content-validation-name="val12"/>
          <table:table-cell table:number-columns-repeated="1017"/>
        </table:table-row>
        <table:table-row table:style-name="ro1">
          <table:table-cell table:style-name="ce54" office:value-type="string" calcext:value-type="string">
            <text:p>US-CDZ01</text:p>
          </table:table-cell>
          <table:table-cell table:style-name="ce54" table:content-validation-name="val7" office:value-type="string" calcext:value-type="string">
            <text:p>Juan Martinez</text:p>
          </table:table-cell>
          <table:table-cell table:style-name="ce54" table:content-validation-name="val8" office:value-type="string" calcext:value-type="string">
            <text:p>Jabbar Mendez</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QNC01</text:p>
          </table:table-cell>
          <table:table-cell table:style-name="ce53" table:content-validation-name="val7" office:value-type="string" calcext:value-type="string">
            <text:p>Juan Martinez</text:p>
          </table:table-cell>
          <table:table-cell table:style-name="ce53" table:content-validation-name="val8" office:value-type="string" calcext:value-type="string">
            <text:p>Ashlie Munro</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CA-GAL01</text:p>
          </table:table-cell>
          <table:table-cell table:style-name="ce54" table:content-validation-name="val7" office:value-type="string" calcext:value-type="string">
            <text:p>Liam Jones</text:p>
          </table:table-cell>
          <table:table-cell table:style-name="ce54" table:content-validation-name="val8" office:value-type="string" calcext:value-type="string">
            <text:p>Ismailyn Bonilla</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BVI01</text:p>
          </table:table-cell>
          <table:table-cell table:style-name="ce53" table:content-validation-name="val7" office:value-type="string" calcext:value-type="string">
            <text:p>Liam Jones</text:p>
          </table:table-cell>
          <table:table-cell table:style-name="ce53" table:content-validation-name="val8" office:value-type="string" calcext:value-type="string">
            <text:p>Jonathan Clemente</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CMH01</text:p>
          </table:table-cell>
          <table:table-cell table:style-name="ce54" table:content-validation-name="val7" office:value-type="string" calcext:value-type="string">
            <text:p>Liam Jones</text:p>
          </table:table-cell>
          <table:table-cell table:style-name="ce54" table:content-validation-name="val8" office:value-type="string" calcext:value-type="string">
            <text:p>Jared Varkonda</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CVG01</text:p>
          </table:table-cell>
          <table:table-cell table:style-name="ce53" table:content-validation-name="val7" office:value-type="string" calcext:value-type="string">
            <text:p>Liam Jones</text:p>
          </table:table-cell>
          <table:table-cell table:style-name="ce53" table:content-validation-name="val8" office:value-type="string" calcext:value-type="string">
            <text:p>Alissah Wiles</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EWS01</text:p>
          </table:table-cell>
          <table:table-cell table:style-name="ce54" table:content-validation-name="val7" office:value-type="string" calcext:value-type="string">
            <text:p>Liam Jones</text:p>
          </table:table-cell>
          <table:table-cell table:style-name="ce54" table:content-validation-name="val8" office:value-type="string" calcext:value-type="string">
            <text:p>Pat McDermott</text:p>
          </table:table-cell>
          <table:table-cell table:style-name="ce54" table:content-validation-name="val9" office:value-type="string" calcext:value-type="string">
            <text:p>Overflowing</text:p>
          </table:table-cell>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HMN01</text:p>
          </table:table-cell>
          <table:table-cell table:style-name="ce53" table:content-validation-name="val7" office:value-type="string" calcext:value-type="string">
            <text:p>Liam Jones</text:p>
          </table:table-cell>
          <table:table-cell table:style-name="ce53" table:content-validation-name="val8" office:value-type="string" calcext:value-type="string">
            <text:p>Kenneth Taylor</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LNB01</text:p>
          </table:table-cell>
          <table:table-cell table:style-name="ce54" table:content-validation-name="val7" office:value-type="string" calcext:value-type="string">
            <text:p>Liam Jones</text:p>
          </table:table-cell>
          <table:table-cell table:style-name="ce54" table:content-validation-name="val8" office:value-type="string" calcext:value-type="string">
            <text:p>Alissah Wiles</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LOE01</text:p>
          </table:table-cell>
          <table:table-cell table:style-name="ce53" table:content-validation-name="val7" office:value-type="string" calcext:value-type="string">
            <text:p>Liam Jones</text:p>
          </table:table-cell>
          <table:table-cell table:style-name="ce53" table:content-validation-name="val8" office:value-type="string" calcext:value-type="string">
            <text:p>Austin Lum</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OBG01</text:p>
          </table:table-cell>
          <table:table-cell table:style-name="ce54" table:content-validation-name="val7" office:value-type="string" calcext:value-type="string">
            <text:p>Liam Jones</text:p>
          </table:table-cell>
          <table:table-cell table:style-name="ce54" table:content-validation-name="val8" office:value-type="string" calcext:value-type="string">
            <text:p>Frank D'Arrigo</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VO201</text:p>
          </table:table-cell>
          <table:table-cell table:style-name="ce53" table:content-validation-name="val7" office:value-type="string" calcext:value-type="string">
            <text:p>Liam Jones</text:p>
          </table:table-cell>
          <table:table-cell table:style-name="ce53" table:content-validation-name="val8" office:value-type="string" calcext:value-type="string">
            <text:p>Scott Middleton</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WCI01</text:p>
          </table:table-cell>
          <table:table-cell table:style-name="ce54" table:content-validation-name="val7" office:value-type="string" calcext:value-type="string">
            <text:p>Liam Jones</text:p>
          </table:table-cell>
          <table:table-cell table:style-name="ce54" table:content-validation-name="val8" office:value-type="string" calcext:value-type="string">
            <text:p>Scott Middleton</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WJQ01</text:p>
          </table:table-cell>
          <table:table-cell table:style-name="ce53" table:content-validation-name="val7" office:value-type="string" calcext:value-type="string">
            <text:p>Liam Jones</text:p>
          </table:table-cell>
          <table:table-cell table:style-name="ce53" table:content-validation-name="val8" office:value-type="string" calcext:value-type="string">
            <text:p>Xavier Adams</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EVI01</text:p>
          </table:table-cell>
          <table:table-cell table:style-name="ce54" table:content-validation-name="val7" office:value-type="string" calcext:value-type="string">
            <text:p>Liam Jones</text:p>
          </table:table-cell>
          <table:table-cell table:style-name="ce54" table:content-validation-name="val8" office:value-type="string" calcext:value-type="string">
            <text:p>Brian McClure</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PPY01</text:p>
          </table:table-cell>
          <table:table-cell table:style-name="ce53" table:content-validation-name="val7" office:value-type="string" calcext:value-type="string">
            <text:p>Liam Jones</text:p>
          </table:table-cell>
          <table:table-cell table:style-name="ce53" table:content-validation-name="val8" office:value-type="string" calcext:value-type="string">
            <text:p>Raymond Fuller</text:p>
          </table:table-cell>
          <table:table-cell table:style-name="ce53" table:content-validation-name="val9"/>
          <table:table-cell table:style-name="ce53" table:content-validation-name="val10"/>
          <table:table-cell table:style-name="ce53" table:content-validation-name="val11"/>
          <table:table-cell table:style-name="ce53" table:content-validation-name="val12"/>
          <table:table-cell table:number-columns-repeated="1017"/>
        </table:table-row>
        <table:table-row table:style-name="ro1">
          <table:table-cell table:style-name="ce54" office:value-type="string" calcext:value-type="string">
            <text:p>US-SKY01</text:p>
          </table:table-cell>
          <table:table-cell table:style-name="ce54" table:content-validation-name="val7" office:value-type="string" calcext:value-type="string">
            <text:p>Liam Jones</text:p>
          </table:table-cell>
          <table:table-cell table:style-name="ce54" table:content-validation-name="val8"/>
          <table:table-cell table:style-name="ce54" table:content-validation-name="val9"/>
          <table:table-cell table:style-name="ce54" table:content-validation-name="val10"/>
          <table:table-cell table:style-name="ce54" table:content-validation-name="val11"/>
          <table:table-cell table:style-name="ce54" table:content-validation-name="val12"/>
          <table:table-cell table:number-columns-repeated="1017"/>
        </table:table-row>
        <table:table-row table:style-name="ro1">
          <table:table-cell table:style-name="ce53" office:value-type="string" calcext:value-type="string">
            <text:p>US-KWO01</text:p>
          </table:table-cell>
          <table:table-cell table:style-name="ce53" table:content-validation-name="val7" office:value-type="string" calcext:value-type="string">
            <text:p>Liam Jones</text:p>
          </table:table-cell>
          <table:table-cell table:style-name="ce53" table:content-validation-name="val8"/>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AAI01</text:p>
          </table:table-cell>
          <table:table-cell table:style-name="ce54" table:content-validation-name="val7" office:value-type="string" calcext:value-type="string">
            <text:p>Matt Whittle</text:p>
          </table:table-cell>
          <table:table-cell table:style-name="ce54" table:content-validation-name="val8" office:value-type="string" calcext:value-type="string">
            <text:p>Amanda Desir</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CSZ01</text:p>
          </table:table-cell>
          <table:table-cell table:style-name="ce53" table:content-validation-name="val7" office:value-type="string" calcext:value-type="string">
            <text:p>Matt Whittle</text:p>
          </table:table-cell>
          <table:table-cell table:style-name="ce53" table:content-validation-name="val8" office:value-type="string" calcext:value-type="string">
            <text:p>Angel Rosado</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CVY01</text:p>
          </table:table-cell>
          <table:table-cell table:style-name="ce54" table:content-validation-name="val7" office:value-type="string" calcext:value-type="string">
            <text:p>Matt Whittle</text:p>
          </table:table-cell>
          <table:table-cell table:style-name="ce54" table:content-validation-name="val8" office:value-type="string" calcext:value-type="string">
            <text:p>Shantanell Robinson</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66" office:value-type="string" calcext:value-type="string">
            <text:p>US-DGV01</text:p>
          </table:table-cell>
          <table:table-cell table:style-name="ce53" table:content-validation-name="val7" office:value-type="string" calcext:value-type="string">
            <text:p>Matt Whittle</text:p>
          </table:table-cell>
          <table:table-cell table:style-name="ce66" table:content-validation-name="val8" office:value-type="string" calcext:value-type="string">
            <text:p>Nehemiah Johnson</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5" office:value-type="string" calcext:value-type="string">
            <text:p>US-LHS01</text:p>
          </table:table-cell>
          <table:table-cell table:style-name="ce54" table:content-validation-name="val7" office:value-type="string" calcext:value-type="string">
            <text:p>Matt Whittle</text:p>
          </table:table-cell>
          <table:table-cell table:style-name="ce55" table:content-validation-name="val8" office:value-type="string" calcext:value-type="string">
            <text:p>Nehemiah Johnson</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SVG01</text:p>
          </table:table-cell>
          <table:table-cell table:style-name="ce53" table:content-validation-name="val7" office:value-type="string" calcext:value-type="string">
            <text:p>Matt Whittle</text:p>
          </table:table-cell>
          <table:table-cell table:style-name="ce53" table:content-validation-name="val8" office:value-type="string" calcext:value-type="string">
            <text:p>Joseph Styers</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ARQ01</text:p>
          </table:table-cell>
          <table:table-cell table:style-name="ce54" table:content-validation-name="val7" office:value-type="string" calcext:value-type="string">
            <text:p>Matt Whittle</text:p>
          </table:table-cell>
          <table:table-cell table:style-name="ce54" table:content-validation-name="val8" office:value-type="string" calcext:value-type="string">
            <text:p>Lane Gibson, Andrew Barnhart</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CYL01</text:p>
          </table:table-cell>
          <table:table-cell table:style-name="ce53" table:content-validation-name="val7" office:value-type="string" calcext:value-type="string">
            <text:p>Matt Whittle</text:p>
          </table:table-cell>
          <table:table-cell table:style-name="ce53" table:content-validation-name="val8" office:value-type="string" calcext:value-type="string">
            <text:p>Devin Felix</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US-DNN02</text:p>
          </table:table-cell>
          <table:table-cell table:style-name="ce54" table:content-validation-name="val7" office:value-type="string" calcext:value-type="string">
            <text:p>Matt Whittle</text:p>
          </table:table-cell>
          <table:table-cell table:style-name="ce54" table:content-validation-name="val8" office:value-type="string" calcext:value-type="string">
            <text:p>Reanna Moore, Ben Callahan, Otis Tate, Grady Martin</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ES-BCN01</text:p>
          </table:table-cell>
          <table:table-cell table:style-name="ce53" table:content-validation-name="val7" office:value-type="string" calcext:value-type="string">
            <text:p>Rhys Lopez-Lloyd</text:p>
          </table:table-cell>
          <table:table-cell table:style-name="ce53" table:content-validation-name="val8" office:value-type="string" calcext:value-type="string">
            <text:p>Ezequiel Ramos Vertiz</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ES-BCN03</text:p>
          </table:table-cell>
          <table:table-cell table:style-name="ce54" table:content-validation-name="val7" office:value-type="string" calcext:value-type="string">
            <text:p>Rhys Lopez-Lloyd</text:p>
          </table:table-cell>
          <table:table-cell table:style-name="ce54" table:content-validation-name="val8" office:value-type="string" calcext:value-type="string">
            <text:p>Ezequiel Ramos Vertiz</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GB-CWY01</text:p>
          </table:table-cell>
          <table:table-cell table:style-name="ce53" table:content-validation-name="val7" office:value-type="string" calcext:value-type="string">
            <text:p>Rhys Lopez-Lloyd</text:p>
          </table:table-cell>
          <table:table-cell table:style-name="ce53" table:content-validation-name="val8" office:value-type="string" calcext:value-type="string">
            <text:p>Rhys Lopez-Lloyd</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GB-PPL01</text:p>
          </table:table-cell>
          <table:table-cell table:style-name="ce54" table:content-validation-name="val7" office:value-type="string" calcext:value-type="string">
            <text:p>Rhys Lopez-Lloyd</text:p>
          </table:table-cell>
          <table:table-cell table:style-name="ce54" table:content-validation-name="val8" office:value-type="string" calcext:value-type="string">
            <text:p>Scott Hall</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NO-OVO01</text:p>
          </table:table-cell>
          <table:table-cell table:style-name="ce53" table:content-validation-name="val7" office:value-type="string" calcext:value-type="string">
            <text:p>Rhys Lopez-Lloyd</text:p>
          </table:table-cell>
          <table:table-cell table:style-name="ce53" table:content-validation-name="val8" office:value-type="string" calcext:value-type="string">
            <text:p>George Agbo</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ES-AVQ01</text:p>
          </table:table-cell>
          <table:table-cell table:style-name="ce54" table:content-validation-name="val7" office:value-type="string" calcext:value-type="string">
            <text:p>Rhys Lopez-Lloyd</text:p>
          </table:table-cell>
          <table:table-cell table:style-name="ce54" table:content-validation-name="val8" office:value-type="string" calcext:value-type="string">
            <text:p>Tamara Beisti</text:p>
          </table:table-cell>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DK-SVL01</text:p>
          </table:table-cell>
          <table:table-cell table:style-name="ce53" table:content-validation-name="val7" office:value-type="string" calcext:value-type="string">
            <text:p>Rhys Lopez-Lloyd</text:p>
          </table:table-cell>
          <table:table-cell table:style-name="ce53" table:content-validation-name="val8"/>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ES-BCN02</text:p>
          </table:table-cell>
          <table:table-cell table:style-name="ce54" table:content-validation-name="val7" office:value-type="string" calcext:value-type="string">
            <text:p>Rhys Lopez-Lloyd</text:p>
          </table:table-cell>
          <table:table-cell table:style-name="ce54" table:content-validation-name="val8"/>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SE-FAN01</text:p>
          </table:table-cell>
          <table:table-cell table:style-name="ce53" table:content-validation-name="val7" office:value-type="string" calcext:value-type="string">
            <text:p>Rhys Lopez-Lloyd</text:p>
          </table:table-cell>
          <table:table-cell table:style-name="ce53" table:content-validation-name="val8" office:value-type="string" calcext:value-type="string">
            <text:p>Zain Nasir</text:p>
          </table:table-cell>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1">
          <table:table-cell table:style-name="ce54" office:value-type="string" calcext:value-type="string">
            <text:p>SE-SKH01</text:p>
          </table:table-cell>
          <table:table-cell table:style-name="ce54" table:content-validation-name="val7" office:value-type="string" calcext:value-type="string">
            <text:p>Rhys Lopez-Lloyd</text:p>
          </table:table-cell>
          <table:table-cell table:style-name="ce54" table:content-validation-name="val8"/>
          <table:table-cell table:style-name="ce54" table:content-validation-name="val9"/>
          <table:table-cell table:style-name="ce54" table:content-validation-name="val10"/>
          <table:table-cell table:style-name="ce69" table:content-validation-name="val11"/>
          <table:table-cell table:style-name="ce54" table:content-validation-name="val12"/>
          <table:table-cell table:number-columns-repeated="1017"/>
        </table:table-row>
        <table:table-row table:style-name="ro1">
          <table:table-cell table:style-name="ce53" office:value-type="string" calcext:value-type="string">
            <text:p>US-MKO01</text:p>
          </table:table-cell>
          <table:table-cell table:style-name="ce53"/>
          <table:table-cell table:style-name="ce53" table:content-validation-name="val8"/>
          <table:table-cell table:style-name="ce53" table:content-validation-name="val9"/>
          <table:table-cell table:style-name="ce53" table:content-validation-name="val10"/>
          <table:table-cell table:style-name="ce68" table:content-validation-name="val11"/>
          <table:table-cell table:style-name="ce53" table:content-validation-name="val12"/>
          <table:table-cell table:number-columns-repeated="1017"/>
        </table:table-row>
        <table:table-row table:style-name="ro4" table:number-rows-repeated="1048515">
          <table:table-cell table:number-columns-repeated="1024"/>
        </table:table-row>
        <table:table-row table:style-name="ro4">
          <table:table-cell table:number-columns-repeated="1024"/>
        </table:table-row>
        <table:named-expressions>
          <table:named-range table:name="_xlnm._FilterDatabase" table:base-cell-address="$Dashboard.$A$1" table:cell-range-address="$'Site Storage Status'.$A$1:.$G$60"/>
        </table:named-expressions>
      </table:table>
      <table:table table:name="Request Changes" table:style-name="ta7">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6" table:default-cell-style-name="Default"/>
        <table:table-column table:style-name="co3" table:number-columns-repeated="1014" table:default-cell-style-name="Default"/>
        <table:table-row table:style-name="ro9">
          <table:table-cell table:style-name="ce60" office:value-type="string" calcext:value-type="string">
            <text:p>Timestamp</text:p>
          </table:table-cell>
          <table:table-cell table:style-name="ce60" office:value-type="string" calcext:value-type="string">
            <text:p>What is your name?</text:p>
          </table:table-cell>
          <table:table-cell table:style-name="ce60" office:value-type="string" calcext:value-type="string">
            <text:p>What would you like changed?</text:p>
          </table:table-cell>
          <table:table-cell table:style-name="ce60" office:value-type="string" calcext:value-type="string">
            <text:p>Any additional feedback? (optional)</text:p>
          </table:table-cell>
          <table:table-cell table:number-columns-repeated="1020"/>
        </table:table-row>
        <table:table-row table:style-name="ro9">
          <table:table-cell table:style-name="ce70" office:value-type="date" office:date-value="2025-12-02T11:31:36.981" calcext:value-type="date">
            <text:p>12/2/2025 11:31:37</text:p>
          </table:table-cell>
          <table:table-cell table:style-name="ce61" office:value-type="string" calcext:value-type="string">
            <text:p>Mitchell</text:p>
          </table:table-cell>
          <table:table-cell table:style-name="ce61" office:value-type="string" calcext:value-type="string">
            <text:p>Less work pls</text:p>
          </table:table-cell>
          <table:table-cell table:style-name="ce61" office:value-type="string" calcext:value-type="string">
            <text:p>no</text:p>
          </table:table-cell>
          <table:table-cell table:number-columns-repeated="1020"/>
        </table:table-row>
        <table:table-row table:style-name="ro9">
          <table:table-cell table:style-name="ce70" office:value-type="date" office:date-value="2025-12-02T16:44:10.319" calcext:value-type="date">
            <text:p>12/2/2025 16:44:10</text:p>
          </table:table-cell>
          <table:table-cell table:style-name="ce61" office:value-type="string" calcext:value-type="string">
            <text:p>Jason Turek</text:p>
          </table:table-cell>
          <table:table-cell table:style-name="ce61" office:value-type="string" calcext:value-type="string">
            <text:p>The email for DTN01 should be dentonics@coreweave.com</text:p>
          </table:table-cell>
          <table:table-cell table:style-name="ce61" office:value-type="string" calcext:value-type="string">
            <text:p>Alyson McElroy, Jaylon Heller, Justin Czubas, My Bui, and Randall Gomez all need to be added as ICS's for DTN01</text:p>
          </table:table-cell>
          <table:table-cell table:number-columns-repeated="1020"/>
        </table:table-row>
        <table:table-row table:style-name="ro9">
          <table:table-cell table:style-name="ce70" office:value-type="date" office:date-value="2025-12-08T15:05:29.317" calcext:value-type="date">
            <text:p>12/8/2025 15:05:29</text:p>
          </table:table-cell>
          <table:table-cell table:style-name="ce61" office:value-type="string" calcext:value-type="string">
            <text:p>Rhys Lopez-Lloyd</text:p>
          </table:table-cell>
          <table:table-cell table:style-name="ce61" office:value-type="string" calcext:value-type="string">
            <text:p>Update GB-CWY01 ICS details to be the new ICS. Diego Monroy, dmonroy@coreweave.com, +44 7512 250887</text:p>
          </table:table-cell>
          <table:table-cell table:number-columns-repeated="1021"/>
        </table:table-row>
        <table:table-row table:style-name="ro9">
          <table:table-cell table:style-name="ce70" office:value-type="date" office:date-value="2026-01-10T07:52:48.555" calcext:value-type="date">
            <text:p>1/10/2026 7:52:49</text:p>
          </table:table-cell>
          <table:table-cell table:style-name="ce61" office:value-type="string" calcext:value-type="string">
            <text:p>Rhys Lopez-Lloyd</text:p>
          </table:table-cell>
          <table:table-cell table:style-name="ce61" office:value-type="string" calcext:value-type="string">
            <text:p>Update GB-CWY01 ICS information to the new ICS. Diego Monroy, +447512250887, </text:p>
            <text:p>dmonroy@coreweave.com</text:p>
          </table:table-cell>
          <table:table-cell table:number-columns-repeated="1021"/>
        </table:table-row>
        <table:table-row table:style-name="ro9">
          <table:table-cell table:style-name="ce70" office:value-type="date" office:date-value="2026-02-12T12:51:15.942" calcext:value-type="date">
            <text:p>2/12/2026 12:51:16</text:p>
          </table:table-cell>
          <table:table-cell table:style-name="ce61" office:value-type="string" calcext:value-type="string">
            <text:p>Brady Bonario</text:p>
          </table:table-cell>
          <table:table-cell table:style-name="ce61" office:value-type="string" calcext:value-type="string">
            <text:p>Im now the ICS for US-RRX01 and Katilina Adrian is the new ICS for US-AUS01</text:p>
          </table:table-cell>
          <table:table-cell table:number-columns-repeated="1021"/>
        </table:table-row>
        <table:table-row table:style-name="ro9">
          <table:table-cell table:style-name="ce70" office:value-type="date" office:date-value="2026-02-13T08:32:20.085" calcext:value-type="date">
            <text:p>2/13/2026 8:32:20</text:p>
          </table:table-cell>
          <table:table-cell table:style-name="ce61" office:value-type="string" calcext:value-type="string">
            <text:p>Andreea Dogaru</text:p>
          </table:table-cell>
          <table:table-cell table:style-name="ce61" office:value-type="string" calcext:value-type="string">
            <text:p>I'm the ICS for DK-SVL01 and I would like to add in all the details required for my site.</text:p>
          </table:table-cell>
          <table:table-cell table:number-columns-repeated="1021"/>
        </table:table-row>
        <table:table-row table:style-name="ro9">
          <table:table-cell table:style-name="ce70" office:value-type="date" office:date-value="2026-02-17T08:22:33.338" calcext:value-type="date">
            <text:p>2/17/2026 8:22:33</text:p>
          </table:table-cell>
          <table:table-cell table:style-name="ce61" office:value-type="string" calcext:value-type="string">
            <text:p>Craig Macnish</text:p>
          </table:table-cell>
          <table:table-cell table:style-name="ce61" office:value-type="string" calcext:value-type="string">
            <text:p>Update to SE-SKH01MASTER Logistics &amp; Site Management Dashboard</text:p>
          </table:table-cell>
          <table:table-cell table:number-columns-repeated="1021"/>
        </table:table-row>
        <table:table-row table:style-name="ro9">
          <table:table-cell table:style-name="ce70" office:value-type="date" office:date-value="2026-02-19T02:42:57.244" calcext:value-type="date">
            <text:p>2/19/2026 2:42:57</text:p>
          </table:table-cell>
          <table:table-cell table:style-name="ce61" office:value-type="string" calcext:value-type="string">
            <text:p>Tamara Beisti</text:p>
          </table:table-cell>
          <table:table-cell table:style-name="ce61" office:value-type="string" calcext:value-type="string">
            <text:p>ICS Phone #</text:p>
          </table:table-cell>
          <table:table-cell table:style-name="ce61" office:value-type="string" calcext:value-type="string">
            <text:p>+34 618 513 678</text:p>
          </table:table-cell>
          <table:table-cell table:number-columns-repeated="1020"/>
        </table:table-row>
        <table:table-row table:style-name="ro9">
          <table:table-cell table:style-name="ce70" office:value-type="date" office:date-value="2026-02-25T13:18:41.31" calcext:value-type="date">
            <text:p>2/25/2026 13:18:41</text:p>
          </table:table-cell>
          <table:table-cell table:style-name="ce61" office:value-type="string" calcext:value-type="string">
            <text:p>Anthony Neis</text:p>
          </table:table-cell>
          <table:table-cell table:style-name="ce61" office:value-type="string" calcext:value-type="string">
            <text:p>I need my phone number updated to 214-306-3062 due to the MDM policy change. </text:p>
          </table:table-cell>
          <table:table-cell table:number-columns-repeated="1021"/>
        </table:table-row>
        <table:table-row table:style-name="ro9">
          <table:table-cell table:style-name="ce70" office:value-type="date" office:date-value="2026-03-02T11:01:07.898" calcext:value-type="date">
            <text:p>3/2/2026 11:01:08</text:p>
          </table:table-cell>
          <table:table-cell table:style-name="ce61" office:value-type="string" calcext:value-type="string">
            <text:p>Esteban Sotelo</text:p>
          </table:table-cell>
          <table:table-cell table:style-name="ce61" office:value-type="string" calcext:value-type="string">
            <text:p>+1(945) 331-2856 or +1(680) 323-2721</text:p>
          </table:table-cell>
          <table:table-cell table:number-columns-repeated="1021"/>
        </table:table-row>
        <table:table-row table:style-name="ro9">
          <table:table-cell table:style-name="ce70" office:value-type="date" office:date-value="2026-04-13T10:13:19.485" calcext:value-type="date">
            <text:p>4/13/2026 10:13:19</text:p>
          </table:table-cell>
          <table:table-cell table:style-name="ce61" office:value-type="string" calcext:value-type="string">
            <text:p>Esteban Sotelo</text:p>
          </table:table-cell>
          <table:table-cell table:style-name="ce61" office:value-type="string" calcext:value-type="string">
            <text:p>ICS Phone numbers: +1 (945) 331-2856 and/or +1 (680) 323-2721</text:p>
          </table:table-cell>
          <table:table-cell table:style-name="ce61" office:value-type="string" calcext:value-type="string">
            <text:p>Can we add more space to see all the text in each box?</text:p>
          </table:table-cell>
          <table:table-cell table:number-columns-repeated="1020"/>
        </table:table-row>
        <table:table-row table:style-name="ro9">
          <table:table-cell table:style-name="ce70" office:value-type="date" office:date-value="2026-04-24T14:22:39.871" calcext:value-type="date">
            <text:p>4/24/2026 14:22:40</text:p>
          </table:table-cell>
          <table:table-cell table:style-name="ce61" office:value-type="string" calcext:value-type="string">
            <text:p>Amanda Desir</text:p>
          </table:table-cell>
          <table:table-cell table:style-name="ce61" office:value-type="string" calcext:value-type="string">
            <text:p>Phone number changed to 470-201-9525</text:p>
          </table:table-cell>
          <table:table-cell table:number-columns-repeated="1021"/>
        </table:table-row>
        <table:table-row table:style-name="ro9">
          <table:table-cell table:style-name="ce70" office:value-type="date" office:date-value="2026-04-24T14:23:01.045" calcext:value-type="date">
            <text:p>4/24/2026 14:23:01</text:p>
          </table:table-cell>
          <table:table-cell table:style-name="ce61" office:value-type="string" calcext:value-type="string">
            <text:p>Andrew Barnhart</text:p>
          </table:table-cell>
          <table:table-cell table:style-name="ce61" office:value-type="string" calcext:value-type="string">
            <text:p>My contact information needs to be added along side Lane's. <text:s/></text:p>
          </table:table-cell>
          <table:table-cell table:number-columns-repeated="1021"/>
        </table:table-row>
        <table:table-row table:style-name="ro9">
          <table:table-cell table:style-name="ce70" office:value-type="date" office:date-value="2026-04-24T14:25:45.661" calcext:value-type="date">
            <text:p>4/24/2026 14:25:46</text:p>
          </table:table-cell>
          <table:table-cell table:style-name="ce61" office:value-type="string" calcext:value-type="string">
            <text:p>Justin Fillmore</text:p>
          </table:table-cell>
          <table:table-cell table:style-name="ce61" office:value-type="string" calcext:value-type="string">
            <text:p>Please add Andres Cordova as an ICS for SPK01, SPK02, and SPK03</text:p>
          </table:table-cell>
          <table:table-cell table:number-columns-repeated="1021"/>
        </table:table-row>
        <table:table-row table:style-name="ro9">
          <table:table-cell table:style-name="ce70" office:value-type="date" office:date-value="2026-04-24T14:44:26.43" calcext:value-type="date">
            <text:p>4/24/2026 14:44:26</text:p>
          </table:table-cell>
          <table:table-cell table:style-name="ce61" office:value-type="string" calcext:value-type="string">
            <text:p>Ben Pauling</text:p>
          </table:table-cell>
          <table:table-cell table:style-name="ce61" office:value-type="string" calcext:value-type="string">
            <text:p>Please change ICS phone number for PLZ02 to 972-533-4251</text:p>
          </table:table-cell>
          <table:table-cell table:number-columns-repeated="1021"/>
        </table:table-row>
        <table:table-row table:style-name="ro9">
          <table:table-cell table:style-name="ce70" office:value-type="date" office:date-value="2026-04-24T14:53:46.408" calcext:value-type="date">
            <text:p>4/24/2026 14:53:46</text:p>
          </table:table-cell>
          <table:table-cell table:style-name="ce61" office:value-type="string" calcext:value-type="string">
            <text:p>Ashlie Munro</text:p>
          </table:table-cell>
          <table:table-cell table:style-name="ce61" office:value-type="string" calcext:value-type="string">
            <text:p>ICS phone number changed to 509.293.3190 &amp; Regional DCM is now Oliver Luo</text:p>
          </table:table-cell>
          <table:table-cell table:number-columns-repeated="1021"/>
        </table:table-row>
        <table:table-row table:style-name="ro9">
          <table:table-cell table:style-name="ce70" office:value-type="date" office:date-value="2026-04-24T15:03:28.602" calcext:value-type="date">
            <text:p>4/24/2026 15:03:29</text:p>
          </table:table-cell>
          <table:table-cell table:style-name="ce61" office:value-type="string" calcext:value-type="string">
            <text:p>Kenneth Taylor</text:p>
          </table:table-cell>
          <table:table-cell table:style-name="ce61" office:value-type="string" calcext:value-type="string">
            <text:p>Site Lead DCT = Christopher Muckle</text:p>
          </table:table-cell>
          <table:table-cell table:style-name="ce61" office:value-type="string" calcext:value-type="string">
            <text:p>DCM = Rodney Ballard </text:p>
          </table:table-cell>
          <table:table-cell table:number-columns-repeated="1020"/>
        </table:table-row>
        <table:table-row table:style-name="ro9">
          <table:table-cell table:style-name="ce70" office:value-type="date" office:date-value="2026-04-24T15:04:12.154" calcext:value-type="date">
            <text:p>4/24/2026 15:04:12</text:p>
          </table:table-cell>
          <table:table-cell table:style-name="ce61" office:value-type="string" calcext:value-type="string">
            <text:p>Kenneth Taylor</text:p>
          </table:table-cell>
          <table:table-cell table:style-name="ce61" office:value-type="string" calcext:value-type="string">
            <text:p>Phone Number <text:s/>312-241-8824</text:p>
          </table:table-cell>
          <table:table-cell table:number-columns-repeated="1021"/>
        </table:table-row>
        <table:table-row table:style-name="ro9">
          <table:table-cell table:style-name="ce70" office:value-type="date" office:date-value="2026-04-24T15:05:35.434" calcext:value-type="date">
            <text:p>4/24/2026 15:05:35</text:p>
          </table:table-cell>
          <table:table-cell table:style-name="ce61" office:value-type="string" calcext:value-type="string">
            <text:p>Kenneth Taylor</text:p>
          </table:table-cell>
          <table:table-cell table:style-name="ce61" office:value-type="string" calcext:value-type="string">
            <text:p>Power Consumption = approx 5.7 MB</text:p>
          </table:table-cell>
          <table:table-cell table:number-columns-repeated="1021"/>
        </table:table-row>
        <table:table-row table:style-name="ro9">
          <table:table-cell table:style-name="ce70" office:value-type="date" office:date-value="2026-04-24T15:12:03.98" calcext:value-type="date">
            <text:p>4/24/2026 15:12:04</text:p>
          </table:table-cell>
          <table:table-cell table:style-name="ce61" office:value-type="string" calcext:value-type="string">
            <text:p>Liam Jones</text:p>
          </table:table-cell>
          <table:table-cell table:style-name="ce61" office:value-type="string" calcext:value-type="string">
            <text:p>Added as Regional ICM for US-EVI01, US-SKY01, and US-KWO</text:p>
          </table:table-cell>
          <table:table-cell table:style-name="ce61" office:value-type="string" calcext:value-type="string">
            <text:p>Move Xavier Adams as KWO ICS / CJ Tunstall as WJQ ICS / Chris Spehar as SKY ICS</text:p>
          </table:table-cell>
          <table:table-cell table:number-columns-repeated="1020"/>
        </table:table-row>
        <table:table-row table:style-name="ro9">
          <table:table-cell table:style-name="ce70" office:value-type="date" office:date-value="2026-04-24T15:16:18.699" calcext:value-type="date">
            <text:p>4/24/2026 15:16:19</text:p>
          </table:table-cell>
          <table:table-cell table:style-name="ce61" office:value-type="string" calcext:value-type="string">
            <text:p>Liam Jones</text:p>
          </table:table-cell>
          <table:table-cell table:style-name="ce61" office:value-type="string" calcext:value-type="string">
            <text:p>US-CHI01 Regional - Liam Jones / ICS - Ken Taylor</text:p>
            <text:p>US-UYK01 Regional - Liam Jones / ICS CJ Tunstall</text:p>
            <text:p>CA-TOR01 Regional - Liam Jones / ICS Ismailyn Bonilla</text:p>
            <text:p>US-PHL01 Regional - Liam Jones / ICS Patrick McDermott</text:p>
          </table:table-cell>
          <table:table-cell table:number-columns-repeated="1021"/>
        </table:table-row>
        <table:table-row table:style-name="ro9">
          <table:table-cell table:style-name="ce70" office:value-type="date" office:date-value="2026-04-24T16:40:10.59" calcext:value-type="date">
            <text:p>4/24/2026 16:40:11</text:p>
          </table:table-cell>
          <table:table-cell table:style-name="ce61" office:value-type="string" calcext:value-type="string">
            <text:p>Katalina Annette</text:p>
          </table:table-cell>
          <table:table-cell table:style-name="ce61" office:value-type="string" calcext:value-type="string">
            <text:p>I would like to change ICS name, phone number, and email. Name- Katalina Annette. Number -8327752202 Email- Kadrian@coreweave.com </text:p>
          </table:table-cell>
          <table:table-cell table:style-name="ce61" office:value-type="string" calcext:value-type="string">
            <text:p>N/A Thank you !</text:p>
          </table:table-cell>
          <table:table-cell table:number-columns-repeated="1020"/>
        </table:table-row>
        <table:table-row table:style-name="ro9">
          <table:table-cell table:style-name="ce70" office:value-type="date" office:date-value="2026-04-25T10:56:11.496" calcext:value-type="date">
            <text:p>4/25/2026 10:56:11</text:p>
          </table:table-cell>
          <table:table-cell table:style-name="ce61" office:value-type="string" calcext:value-type="string">
            <text:p>Alyson </text:p>
          </table:table-cell>
          <table:table-cell table:style-name="ce61" office:value-type="string" calcext:value-type="string">
            <text:p>We need to remove Tony Neis from the ICS list for DTN01, we need to update the contact number as well but not sure if you want all of the team's work cell numbers or just the Mgr's number. <text:s/>If so, that would be Jason Turek and his work cell is 978-833-6087</text:p>
          </table:table-cell>
          <table:table-cell table:number-columns-repeated="1021"/>
        </table:table-row>
        <table:table-row table:style-name="ro9">
          <table:table-cell table:style-name="ce70" office:value-type="date" office:date-value="2026-04-27T09:06:45.299" calcext:value-type="date">
            <text:p>4/27/2026 9:06:45</text:p>
          </table:table-cell>
          <table:table-cell table:style-name="ce61" office:value-type="string" calcext:value-type="string">
            <text:p>Jabbar Mendez</text:p>
          </table:table-cell>
          <table:table-cell table:style-name="ce61" office:value-type="string" calcext:value-type="string">
            <text:p>Phone Number </text:p>
          </table:table-cell>
          <table:table-cell table:style-name="ce61" office:value-type="string" calcext:value-type="string">
            <text:p>New Phone # 949-875-5590</text:p>
          </table:table-cell>
          <table:table-cell table:number-columns-repeated="1020"/>
        </table:table-row>
        <table:table-row table:style-name="ro9">
          <table:table-cell table:style-name="ce70" office:value-type="date" office:date-value="2026-04-27T11:03:44.607" calcext:value-type="date">
            <text:p>4/27/2026 11:03:45</text:p>
          </table:table-cell>
          <table:table-cell table:style-name="ce61" office:value-type="string" calcext:value-type="string">
            <text:p>Tony Hendrix</text:p>
          </table:table-cell>
          <table:table-cell table:style-name="ce61" office:value-type="string" calcext:value-type="string">
            <text:p>Phone number</text:p>
          </table:table-cell>
          <table:table-cell table:style-name="ce61" office:value-type="string" calcext:value-type="string">
            <text:p>602-233-7923</text:p>
          </table:table-cell>
          <table:table-cell table:number-columns-repeated="1020"/>
        </table:table-row>
        <table:table-row table:style-name="ro9">
          <table:table-cell table:style-name="ce70" office:value-type="date" office:date-value="2026-04-27T11:04:31.081" calcext:value-type="date">
            <text:p>4/27/2026 11:04:31</text:p>
          </table:table-cell>
          <table:table-cell table:style-name="ce61" office:value-type="string" calcext:value-type="string">
            <text:p>Tony Hendrix</text:p>
          </table:table-cell>
          <table:table-cell table:style-name="ce61" office:value-type="string" calcext:value-type="string">
            <text:p>Address is wrong</text:p>
          </table:table-cell>
          <table:table-cell table:style-name="ce61" office:value-type="string" calcext:value-type="string">
            <text:p>1300 W. University Ave</text:p>
          </table:table-cell>
          <table:table-cell table:number-columns-repeated="1020"/>
        </table:table-row>
        <table:table-row table:style-name="ro4" table:number-rows-repeated="1048548">
          <table:table-cell table:number-columns-repeated="1024"/>
        </table:table-row>
        <table:table-row table:style-name="ro4">
          <table:table-cell table:number-columns-repeated="1024"/>
        </table:table-row>
      </table:table>
      <table:named-expressions/>
      <table:database-ranges>
        <table:database-range table:name="Extra_Data" table:target-range-address="'Extra Data'.A1:'Extra Data'.L990" table:display-filter-buttons="true">
          <table:filter>
            <table:filter-and>
              <table:filter-condition table:field-number="2" table:value="Operational" table:operator="=">
                <table:filter-set-item table:value="Operational"/>
                <table:filter-set-item table:value="Under construction"/>
              </table:filter-condition>
            </table:filter-and>
          </table:filter>
        </table:database-range>
        <table:database-range table:name="Form_Responses" table:target-range-address="'Request Changes'.A1:'Request Changes'.D27"/>
        <table:database-range table:name="TPOP" table:target-range-address="'TPOP Sites'.A1:'TPOP Sites'.E17"/>
        <table:database-range table:name="__Anonymous_Sheet_DB__1" table:target-range-address="'Logistics Database'.A1:'Logistics Database'.AY79" table:display-filter-buttons="true"/>
        <table:database-range table:name="__Anonymous_Sheet_DB__2" table:target-range-address="'DC Operations Database'.A1:'DC Operations Database'.I79" table:display-filter-buttons="true"/>
        <table:database-range table:name="__Anonymous_Sheet_DB__3" table:target-range-address="'Extra Data'.A1:'Extra Data'.L990"/>
        <table:database-range table:name="__Anonymous_Sheet_DB__5" table:target-range-address="'Site Storage Status'.A1:'Site Storage Status'.G6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Logistics_20_Database" style:display-name="PageStyle_Logistics Database" style:page-layout-name="Mpm3">
      <style:header style:display="false"/>
      <style:header-left style:display="false"/>
      <style:footer style:display="false"/>
      <style:footer-left style:display="false"/>
    </style:master-page>
    <style:master-page style:name="PageStyle_5f_DC_20_Operations_20_Database" style:display-name="PageStyle_DC Operations Database" style:page-layout-name="Mpm3">
      <style:header style:display="false"/>
      <style:header-left style:display="false"/>
      <style:footer style:display="false"/>
      <style:footer-left style:display="false"/>
    </style:master-page>
    <style:master-page style:name="PageStyle_5f_Extra_20_Data" style:display-name="PageStyle_Extra Data" style:page-layout-name="Mpm3">
      <style:header style:display="false"/>
      <style:header-left style:display="false"/>
      <style:footer style:display="false"/>
      <style:footer-left style:display="false"/>
    </style:master-page>
    <style:master-page style:name="PageStyle_5f_TPOP_20_Sites" style:display-name="PageStyle_TPOP Sites" style:page-layout-name="Mpm3">
      <style:header style:display="false"/>
      <style:header-left style:display="false"/>
      <style:footer style:display="false"/>
      <style:footer-left style:display="false"/>
    </style:master-page>
    <style:master-page style:name="PageStyle_5f_Site_20_Storage_20_Status" style:display-name="PageStyle_Site Storage Status" style:page-layout-name="Mpm3">
      <style:header style:display="false"/>
      <style:header-left style:display="false"/>
      <style:footer style:display="false"/>
      <style:footer-left style:display="false"/>
    </style:master-page>
    <style:master-page style:name="PageStyle_5f_Request_20_Changes" style:display-name="PageStyle_Request Chang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5035" meta:object-count="0"/>
    <meta:generator>LibreOfficeDev/6.0.5.2$Linux_X86_64 LibreOffice_project/</meta:generator>
  </office:meta>
</office:document-meta>
</file>